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3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3.175cm" fo:break-before="auto" style:use-optimal-row-height="true"/>
    </style:style>
    <style:style style:name="ro3" style:family="table-row">
      <style:table-row-properties style:row-height="4.357cm" fo:break-before="auto" style:use-optimal-row-height="true"/>
    </style:style>
    <style:style style:name="ro4" style:family="table-row">
      <style:table-row-properties style:row-height="5.133cm" fo:break-before="auto" style:use-optimal-row-height="true"/>
    </style:style>
    <style:style style:name="ro5" style:family="table-row">
      <style:table-row-properties style:row-height="4.745cm" fo:break-before="auto" style:use-optimal-row-height="true"/>
    </style:style>
    <style:style style:name="ro6" style:family="table-row">
      <style:table-row-properties style:row-height="3.969cm" fo:break-before="auto" style:use-optimal-row-height="true"/>
    </style:style>
    <style:style style:name="ro7" style:family="table-row">
      <style:table-row-properties style:row-height="3.563cm" fo:break-before="auto" style:use-optimal-row-height="true"/>
    </style:style>
    <style:style style:name="ro8" style:family="table-row">
      <style:table-row-properties style:row-height="5.909cm" fo:break-before="auto" style:use-optimal-row-height="true"/>
    </style:style>
    <style:style style:name="ro9" style:family="table-row">
      <style:table-row-properties style:row-height="5.521cm" fo:break-before="auto" style:use-optimal-row-height="true"/>
    </style:style>
    <style:style style:name="ro10" style:family="table-row">
      <style:table-row-properties style:row-height="6.297cm" fo:break-before="auto" style:use-optimal-row-height="true"/>
    </style:style>
    <style:style style:name="ro11" style:family="table-row">
      <style:table-row-properties style:row-height="7.849cm" fo:break-before="auto" style:use-optimal-row-height="true"/>
    </style:style>
    <style:style style:name="ro12" style:family="table-row">
      <style:table-row-properties style:row-height="6.685cm" fo:break-before="auto" style:use-optimal-row-height="true"/>
    </style:style>
    <style:style style:name="ro13" style:family="table-row">
      <style:table-row-properties style:row-height="7.073cm" fo:break-before="auto" style:use-optimal-row-height="true"/>
    </style:style>
    <style:style style:name="ro14" style:family="table-row">
      <style:table-row-properties style:row-height="7.461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7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hannel</text:p>
          </table:table-cell>
          <table:table-cell table:style-name="ce1" office:value-type="string" calcext:value-type="string">
            <text:p>Customer</text:p>
          </table:table-cell>
          <table:table-cell table:style-name="ce1" office:value-type="string" calcext:value-type="string">
            <text:p>Identification</text:p>
          </table:table-cell>
          <table:table-cell table:style-name="ce1" office:value-type="string" calcext:value-type="string">
            <text:p>Group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honeProvider</text:p>
          </table:table-cell>
          <table:table-cell table:style-name="ce1" office:value-type="string" calcext:value-type="string">
            <text:p>PhoneNumber</text:p>
          </table:table-cell>
          <table:table-cell table:style-name="ce1" office:value-type="string" calcext:value-type="string">
            <text:p>DataSourcesType</text:p>
          </table:table-cell>
          <table:table-cell table:style-name="ce1" office:value-type="string" calcext:value-type="string">
            <text:p>TipoUnidad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number-columns-repeated="2"/>
          <table:table-cell table:style-name="ce1" office:value-type="string" calcext:value-type="string">
            <text:p>LastGps</text:p>
          </table:table-cell>
          <table:table-cell table:style-name="ce1" office:value-type="string" calcext:value-type="string">
            <text:p>LastVariable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CEIS S.A.</text:p>
          </table:table-cell>
          <table:table-cell table:style-name="ce1" office:value-type="string" calcext:value-type="string">
            <text:p>PARQUE LA RESERVA MALL</text:p>
          </table:table-cell>
          <table:table-cell table:style-name="ce1" office:value-type="string" calcext:value-type="string">
            <text:p>SEDE MEDELLIN; LA RESERVA MALL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615</text:p>
          </table:table-cell>
          <table:table-cell table:style-name="ce1" office:value-type="float" office:value="8.95202001929001E+017" calcext:value-type="float">
            <text:p>8,95202001929001E+017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55492" calcext:value-type="float">
            <text:p>6155492</text:p>
          </table:table-cell>
          <table:table-cell table:style-name="ce1" office:value-type="float" office:value="-75531495" calcext:value-type="float">
            <text:p>-7553149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8-19T02:03:21" calcext:value-type="date">
            <text:p>19/08/23 02:0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ECSA SA</text:p>
          </table:table-cell>
          <table:table-cell table:style-name="ce1" office:value-type="string" calcext:value-type="string">
            <text:p>AECSA SA - CUMMINS NTA855 KW300</text:p>
          </table:table-cell>
          <table:table-cell table:style-name="ce1" office:value-type="string" calcext:value-type="string">
            <text:p>AECSA; SEDE MOSQUER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2289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260282" calcext:value-type="float">
            <text:p>46260282</text:p>
          </table:table-cell>
          <table:table-cell table:style-name="ce1" office:value-type="float" office:value="-741030318" calcext:value-type="float">
            <text:p>-74103031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GENCIA DE CARGA AVIATUR S.A</text:p>
          </table:table-cell>
          <table:table-cell table:style-name="ce1" office:value-type="string" calcext:value-type="string">
            <text:p>AVIATUR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030</text:p>
          </table:table-cell>
          <table:table-cell table:style-name="ce1" office:value-type="float" office:value="8.93407720000166E+018" calcext:value-type="float">
            <text:p>8,93407720000166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2999625212" calcext:value-type="float">
            <text:p>4682999625212</text:p>
          </table:table-cell>
          <table:table-cell table:style-name="ce1" office:value-type="float" office:value="-74134175781659" calcext:value-type="float">
            <text:p>-7413417578165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GRO AVICOLA SAN MARINO SA</text:p>
          </table:table-cell>
          <table:table-cell table:style-name="ce1" office:value-type="string" calcext:value-type="string">
            <text:p>AGRO AVICOLA SAN MARINO GEN 2</text:p>
          </table:table-cell>
          <table:table-cell table:style-name="ce1" office:value-type="string" calcext:value-type="string">
            <text:p>SEDE BARRANQUILLA; SAN MARIN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435</text:p>
          </table:table-cell>
          <table:table-cell table:style-name="ce1" office:value-type="float" office:value="5.71015019120965E+016" calcext:value-type="float">
            <text:p>5,71015019120965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963305" calcext:value-type="float">
            <text:p>10963305</text:p>
          </table:table-cell>
          <table:table-cell table:style-name="ce1" office:value-type="float" office:value="-74794013" calcext:value-type="float">
            <text:p>-7479401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06-21T14:43:44" calcext:value-type="date">
            <text:p>21/06/24 14:4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GRODEX INTERNATIONAL S.A.S</text:p>
          </table:table-cell>
          <table:table-cell table:style-name="ce1" office:value-type="string" calcext:value-type="string">
            <text:p>AGRODEX GALAPA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443</text:p>
          </table:table-cell>
          <table:table-cell table:style-name="ce1" office:value-type="float" office:value="5.71015018046169E+016" calcext:value-type="float">
            <text:p>5,71015018046169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140661" calcext:value-type="float">
            <text:p>110140661</text:p>
          </table:table-cell>
          <table:table-cell table:style-name="ce1" office:value-type="float" office:value="-748366892" calcext:value-type="float">
            <text:p>-74836689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7-04T03:10:49" calcext:value-type="date">
            <text:p>04/07/23 03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GRUPACION ALTOS DE BELLAVISTA</text:p>
          </table:table-cell>
          <table:table-cell table:style-name="ce1" office:value-type="string" calcext:value-type="string">
            <text:p>ALTOS DE BELLAVISTA TORRE 2 GEN01</text:p>
          </table:table-cell>
          <table:table-cell table:style-name="ce1" office:value-type="string" calcext:value-type="string">
            <text:p>SEDE MOSQUERA; TORRE 2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034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3841" calcext:value-type="float">
            <text:p>4653841</text:p>
          </table:table-cell>
          <table:table-cell table:style-name="ce1" office:value-type="float" office:value="-74049113" calcext:value-type="float">
            <text:p>-7404911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10-23T14:07:53" calcext:value-type="date">
            <text:p>23/10/24 14:07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GRUPACION ALTOS DE BELLAVISTA</text:p>
          </table:table-cell>
          <table:table-cell table:style-name="ce1" office:value-type="string" calcext:value-type="string">
            <text:p>ALTOS DE BELLAVISTA TORRE 4 GEN01</text:p>
          </table:table-cell>
          <table:table-cell table:style-name="ce1" office:value-type="string" calcext:value-type="string">
            <text:p>SEDE MOSQUERA; TORRE 4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035</text:p>
          </table:table-cell>
          <table:table-cell table:style-name="ce1" office:value-type="float" office:value="8.93407510025853E+018" calcext:value-type="float">
            <text:p>8,93407510025853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4135" calcext:value-type="float">
            <text:p>4654135</text:p>
          </table:table-cell>
          <table:table-cell table:style-name="ce1" office:value-type="float" office:value="-74048711" calcext:value-type="float">
            <text:p>-7404871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ACEROS TURIA DE COLOMBIA SAS - PLAN LUZ</text:p>
          </table:table-cell>
          <table:table-cell table:style-name="ce1" office:value-type="string" calcext:value-type="string">
            <text:p>SOLVO; ALIANZA FIDUCIARIA 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706/M2M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96581" calcext:value-type="float">
            <text:p>6196581</text:p>
          </table:table-cell>
          <table:table-cell table:style-name="ce1" office:value-type="float" office:value="-75587417" calcext:value-type="float">
            <text:p>-7558741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7" calcext:value-type="date">
            <text:p>14/07/26 15:10</text:p>
          </table:table-cell>
          <table:table-cell/>
        </table:table-row>
        <table:table-row table:style-name="ro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ANDERCOL - PLAN LUZ</text:p>
          </table:table-cell>
          <table:table-cell table:style-name="ce1" office:value-type="string" calcext:value-type="string">
            <text:p>SEDE BARRANQUILLA; ANDERCOL; ALIANZA FIDUCIARIA SEDE BARRANQUILLA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734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2925842" calcext:value-type="float">
            <text:p>102925842</text:p>
          </table:table-cell>
          <table:table-cell table:style-name="ce1" office:value-type="float" office:value="-755075999" calcext:value-type="float">
            <text:p>-75507599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12-12T16:32:42" calcext:value-type="date">
            <text:p>12/12/23 16:3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ANTIOQUIA GOLD LTD - PLAN LUZ</text:p>
          </table:table-cell>
          <table:table-cell table:style-name="ce1" office:value-type="string" calcext:value-type="string">
            <text:p>ANTIOQUIA GOLD; ALIANZA FIDUCIARIA SEDE MEDELLIN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ModbusGenset PCC2x3x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4084094E+016" calcext:value-type="float">
            <text:p>5,71017024084094E+016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4715629" calcext:value-type="float">
            <text:p>64715629</text:p>
          </table:table-cell>
          <table:table-cell table:style-name="ce1" office:value-type="float" office:value="-751734013" calcext:value-type="float">
            <text:p>-751734013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6-28T09:11:11" calcext:value-type="date">
            <text:p>28/06/26 09:11</text:p>
          </table:table-cell>
          <table:table-cell table:style-name="ce4" office:value-type="date" office:date-value="2025-05-20T15:46:41" calcext:value-type="date">
            <text:p>20/05/25 15:46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ART HOTEL BOUTIQUE MEDELLIN - PLAN LUZ</text:p>
          </table:table-cell>
          <table:table-cell table:style-name="ce1" office:value-type="string" calcext:value-type="string">
            <text:p>BOUTIQUE; ALIANZA FIDUCIARIA SEDE MEDELLIN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ModbusGenset PCC 1301/1.x/0500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MED804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94786" calcext:value-type="float">
            <text:p>62094786</text:p>
          </table:table-cell>
          <table:table-cell table:style-name="ce1" office:value-type="float" office:value="-755691366" calcext:value-type="float">
            <text:p>-75569136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8:46" calcext:value-type="date">
            <text:p>14/07/26 15:08</text:p>
          </table:table-cell>
          <table:table-cell/>
        </table:table-row>
        <table:table-row table:style-name="ro4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BIOAGRO G1 - PLAN LUZ</text:p>
          </table:table-cell>
          <table:table-cell table:style-name="ce1" office:value-type="string" calcext:value-type="string">
            <text:p>SEDE BARRANQUILLA; BIOAGRO; ALIANZA FIDUCIARIA SEDE BARRANQUILLA; BIOAGRO G1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007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630398" calcext:value-type="float">
            <text:p>10630398</text:p>
          </table:table-cell>
          <table:table-cell table:style-name="ce1" office:value-type="float" office:value="-74803074" calcext:value-type="float">
            <text:p>-74803074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6-19T14:36:13" calcext:value-type="date">
            <text:p>19/06/26 14:36</text:p>
          </table:table-cell>
          <table:table-cell table:style-name="ce4" office:value-type="date" office:date-value="2026-07-14T15:10:22" calcext:value-type="date">
            <text:p>14/07/26 15:10</text:p>
          </table:table-cell>
          <table:table-cell/>
        </table:table-row>
        <table:table-row table:style-name="ro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BIOAGRO G2 - PLAN LUZ</text:p>
          </table:table-cell>
          <table:table-cell table:style-name="ce1" office:value-type="string" calcext:value-type="string">
            <text:p>SEDE BARRANQUILLA; BIOAGRO; ALIANZA FIDUCIARIA SEDE BARRANQUILLA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008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630398" calcext:value-type="float">
            <text:p>10630398</text:p>
          </table:table-cell>
          <table:table-cell table:style-name="ce1" office:value-type="float" office:value="-74803074" calcext:value-type="float">
            <text:p>-74803074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6-22T14:23:52" calcext:value-type="date">
            <text:p>22/06/26 14:23</text:p>
          </table:table-cell>
          <table:table-cell table:style-name="ce4" office:value-type="date" office:date-value="2026-07-14T15:10:20" calcext:value-type="date">
            <text:p>14/07/26 15:10</text:p>
          </table:table-cell>
          <table:table-cell/>
        </table:table-row>
        <table:table-row table:style-name="ro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CARIBE AVENTURA - PLAN LUZ</text:p>
          </table:table-cell>
          <table:table-cell table:style-name="ce1" office:value-type="string" calcext:value-type="string">
            <text:p>SEDE BARRANQUILLA; CARIBE AVENTURA; ALIANZA FIDUCIARIA SEDE BARRANQUILLA; JULIAN ANDRES RINCON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CC2.X-3.X|Trifasico|24VDC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BQL-1008</text:p>
          </table:table-cell>
          <table:table-cell table:style-name="ce1" office:value-type="float" office:value="8.93407650000414E+018" calcext:value-type="float">
            <text:p>8,93407650000414E+018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768665" calcext:value-type="float">
            <text:p>10768665</text:p>
          </table:table-cell>
          <table:table-cell table:style-name="ce1" office:value-type="float" office:value="-751981739" calcext:value-type="float">
            <text:p>-75198173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5-01-25T09:47:32" calcext:value-type="date">
            <text:p>25/01/25 09:47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CC GRAN MANZANA GEN01 - PLAN LUZ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CC2.X-3.X|Trifasico|24VDC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MOVISTAR M2M</text:p>
          </table:table-cell>
          <table:table-cell table:style-name="ce1" office:value-type="float" office:value="8.93407550000437E+018" calcext:value-type="float">
            <text:p>8,93407550000437E+018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3991686" calcext:value-type="float">
            <text:p>103991686</text:p>
          </table:table-cell>
          <table:table-cell table:style-name="ce1" office:value-type="float" office:value="-754597653" calcext:value-type="float">
            <text:p>-75459765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02T00:45:46" calcext:value-type="date">
            <text:p>02/07/26 00:45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CC GRAN MANZANA GEN02 - PLAN LUZ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CC2.X-3.X|Trifasico|24VDC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MOVISTAR M2M</text:p>
          </table:table-cell>
          <table:table-cell table:style-name="ce1" office:value-type="float" office:value="5.71017024095818E+016" calcext:value-type="float">
            <text:p>5,71017024095818E+016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3991686" calcext:value-type="float">
            <text:p>103991686</text:p>
          </table:table-cell>
          <table:table-cell table:style-name="ce1" office:value-type="float" office:value="-754597653" calcext:value-type="float">
            <text:p>-754597653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6-25T11:41:25" calcext:value-type="date">
            <text:p>25/06/26 11:41</text:p>
          </table:table-cell>
          <table:table-cell table:style-name="ce4" office:value-type="date" office:date-value="2026-07-14T15:08:59" calcext:value-type="date">
            <text:p>14/07/26 15:08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CC GRAN MANZANA GEN03 - PLAN LUZ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CC2.X-3.X|Trifasico|24VDC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MOVISTAR M2M</text:p>
          </table:table-cell>
          <table:table-cell table:style-name="ce1" office:value-type="float" office:value="5.71017024095818E+016" calcext:value-type="float">
            <text:p>5,71017024095818E+016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3991686" calcext:value-type="float">
            <text:p>103991686</text:p>
          </table:table-cell>
          <table:table-cell table:style-name="ce1" office:value-type="float" office:value="-754597653" calcext:value-type="float">
            <text:p>-75459765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12" calcext:value-type="date">
            <text:p>14/07/26 15:09</text:p>
          </table:table-cell>
          <table:table-cell/>
        </table:table-row>
        <table:table-row table:style-name="ro5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CC GRAN PLAZA DEL SOL - PLAN LUZ</text:p>
          </table:table-cell>
          <table:table-cell table:style-name="ce1" office:value-type="string" calcext:value-type="string">
            <text:p>SEDE BARRANQUILLA; GRAN PLAZA DEL SOL; ALIANZA FIDUCIARIA SEDE BARRANQUILLA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511</text:p>
          </table:table-cell>
          <table:table-cell table:style-name="ce1" office:value-type="float" office:value="5.71015019120966E+016" calcext:value-type="float">
            <text:p>5,71015019120966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926984" calcext:value-type="float">
            <text:p>10926984</text:p>
          </table:table-cell>
          <table:table-cell table:style-name="ce1" office:value-type="float" office:value="-74779745" calcext:value-type="float">
            <text:p>-74779745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6-23T13:29:24" calcext:value-type="date">
            <text:p>23/06/26 13:29</text:p>
          </table:table-cell>
          <table:table-cell table:style-name="ce4" office:value-type="date" office:date-value="2026-06-24T09:13:12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CDC BUGA BUS A - PLAN LUZ</text:p>
          </table:table-cell>
          <table:table-cell table:style-name="ce1" office:value-type="string" calcext:value-type="string">
            <text:p>SEDE CALI; EPSA CELSIA BUGA; ALIANZA FIDUCIARIA SEDE YUMB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AL0360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894992" calcext:value-type="float">
            <text:p>3894992</text:p>
          </table:table-cell>
          <table:table-cell table:style-name="ce1" office:value-type="float" office:value="-76295509" calcext:value-type="float">
            <text:p>-7629550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CDC BUGA BUS B - PLAN LUZ</text:p>
          </table:table-cell>
          <table:table-cell table:style-name="ce1" office:value-type="string" calcext:value-type="string">
            <text:p>SEDE CALI; EPSA CELSIA BUGA; ALIANZA FIDUCIARIA SEDE YUMB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AL0364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894994" calcext:value-type="float">
            <text:p>3894994</text:p>
          </table:table-cell>
          <table:table-cell table:style-name="ce1" office:value-type="float" office:value="-76295511" calcext:value-type="float">
            <text:p>-7629551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CELPA - PLAN LUZ</text:p>
          </table:table-cell>
          <table:table-cell table:style-name="ce1" office:value-type="string" calcext:value-type="string">
            <text:p>SEDE CALI; CELPA; ALIANZA FIDUCIARIA SEDE YUMBO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CC1302-PCC1.1|Trifasico|12VDC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3112653E+016" calcext:value-type="float">
            <text:p>5,71017023112653E+016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885692" calcext:value-type="float">
            <text:p>3885692</text:p>
          </table:table-cell>
          <table:table-cell table:style-name="ce1" office:value-type="float" office:value="-76973118" calcext:value-type="float">
            <text:p>-7697311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19T20:29:47" calcext:value-type="date">
            <text:p>19/06/26 20:29</text:p>
          </table:table-cell>
          <table:table-cell/>
        </table:table-row>
        <table:table-row table:style-name="ro6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CENTRO DE TECNOLOGIA OFTALMICA - PLAN LUZ</text:p>
          </table:table-cell>
          <table:table-cell table:style-name="ce1" office:value-type="string" calcext:value-type="string">
            <text:p>SEDE MOSQUERA; CTO; ALIANZA FIDUCIARIA SEDE MOSQUERA; MARIA FERNANDA GOMEZ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895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2915" calcext:value-type="float">
            <text:p>4682915</text:p>
          </table:table-cell>
          <table:table-cell table:style-name="ce1" office:value-type="float" office:value="-74048687" calcext:value-type="float">
            <text:p>-7404868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7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COLCERAMICA GIRARDOTA - PLAN LUZ</text:p>
          </table:table-cell>
          <table:table-cell table:style-name="ce1" office:value-type="string" calcext:value-type="string">
            <text:p>GIRARDOTA; ALIANZA FIDUCIARIA SEDE MEDELLIN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CC2.X-3.X|Trifasico|24VDC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MED844</text:p>
          </table:table-cell>
          <table:table-cell table:style-name="ce1" office:value-type="float" office:value="8.93407650000415E+018" calcext:value-type="float">
            <text:p>8,93407650000415E+018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174171" calcext:value-type="float">
            <text:p>47174171</text:p>
          </table:table-cell>
          <table:table-cell table:style-name="ce1" office:value-type="float" office:value="-752315356" calcext:value-type="float">
            <text:p>-752315356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6-05T11:08:31" calcext:value-type="date">
            <text:p>05/06/26 11:08</text:p>
          </table:table-cell>
          <table:table-cell table:style-name="ce4" office:value-type="date" office:date-value="2026-06-09T19:26:36" calcext:value-type="date">
            <text:p>09/06/26 19:26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COLCERAMICA LA ESTRELLA - PLAN LUZ</text:p>
          </table:table-cell>
          <table:table-cell table:style-name="ce1" office:value-type="string" calcext:value-type="string">
            <text:p>ESTRELLA; ALIANZA FIDUCIARIA 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009</text:p>
          </table:table-cell>
          <table:table-cell table:style-name="ce1" office:value-type="float" office:value="5.71015018046169E+016" calcext:value-type="float">
            <text:p>5,71015018046169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51271" calcext:value-type="float">
            <text:p>6151271</text:p>
          </table:table-cell>
          <table:table-cell table:style-name="ce1" office:value-type="float" office:value="-75635766" calcext:value-type="float">
            <text:p>-7563576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2" calcext:value-type="date">
            <text:p>24/06/26 09:13</text:p>
          </table:table-cell>
          <table:table-cell/>
        </table:table-row>
        <table:table-row table:style-name="ro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COLISEO LIVE 800kW - PLAN LUZ</text:p>
          </table:table-cell>
          <table:table-cell table:style-name="ce1" office:value-type="string" calcext:value-type="string">
            <text:p>SEDE MOSQUERA; COLISEO; CAMKIT2; ALIANZA FIDUCIARIA SEDE MOSQUERA; MARIA FERNANDA GOMEZ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CC2.X-3.X|Trifasico|24VDC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BOG2240</text:p>
          </table:table-cell>
          <table:table-cell table:style-name="ce1" office:value-type="float" office:value="8.93407650000415E+018" calcext:value-type="float">
            <text:p>8,93407650000415E+018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370842" calcext:value-type="float">
            <text:p>47370842</text:p>
          </table:table-cell>
          <table:table-cell table:style-name="ce1" office:value-type="float" office:value="-741364617" calcext:value-type="float">
            <text:p>-74136461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10" calcext:value-type="date">
            <text:p>14/07/26 15:09</text:p>
          </table:table-cell>
          <table:table-cell/>
        </table:table-row>
        <table:table-row table:style-name="ro6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COMERCIALIZADORA SANTANDER - PLAN LUZ</text:p>
          </table:table-cell>
          <table:table-cell table:style-name="ce1" office:value-type="string" calcext:value-type="string">
            <text:p>SEDE PEREIRA; COMERCIALIZADORA; ALIANZA FIDUCIARIA SEDE PEREIRA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PEI0506</text:p>
          </table:table-cell>
          <table:table-cell table:style-name="ce3" office:value-type="float" office:value="8.93408E+017" calcext:value-type="float">
            <text:p>8,93E+17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116845" calcext:value-type="float">
            <text:p>48116845</text:p>
          </table:table-cell>
          <table:table-cell table:style-name="ce1" office:value-type="float" office:value="-756885158" calcext:value-type="float">
            <text:p>-75688515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0" calcext:value-type="date">
            <text:p>14/07/26 15:10</text:p>
          </table:table-cell>
          <table:table-cell/>
        </table:table-row>
        <table:table-row table:style-name="ro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CONDOMINIO BRISAS DEL MAR - PLAN LUZ</text:p>
          </table:table-cell>
          <table:table-cell table:style-name="ce1" office:value-type="string" calcext:value-type="string">
            <text:p>SEDE BARRANQUILLA; BRISAS DEL MAR; ALIANZA FIDUCIARIA SEDE BARRANQUILLA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766</text:p>
          </table:table-cell>
          <table:table-cell table:style-name="ce1" office:value-type="float" office:value="8.93407610014978E+018" calcext:value-type="float">
            <text:p>8,93407610014978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578423" calcext:value-type="float">
            <text:p>104578423</text:p>
          </table:table-cell>
          <table:table-cell table:style-name="ce1" office:value-type="float" office:value="-755085801" calcext:value-type="float">
            <text:p>-75508580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20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CONDOMINIO EL PINO - PLAN LUZ</text:p>
          </table:table-cell>
          <table:table-cell table:style-name="ce1" office:value-type="string" calcext:value-type="string">
            <text:p>SEDE CALI; EL PINO; ALIANZA FIDUCIARIA SEDE YUMB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AL0498</text:p>
          </table:table-cell>
          <table:table-cell table:style-name="ce1" office:value-type="float" office:value="5.71015018077101E+016" calcext:value-type="float">
            <text:p>5,71015018077101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258751" calcext:value-type="float">
            <text:p>3258751</text:p>
          </table:table-cell>
          <table:table-cell table:style-name="ce1" office:value-type="float" office:value="-76553605" calcext:value-type="float">
            <text:p>-76553605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6-26T15:48:58" calcext:value-type="date">
            <text:p>26/06/26 15:48</text:p>
          </table:table-cell>
          <table:table-cell table:style-name="ce4" office:value-type="date" office:date-value="2026-07-14T15:10:23" calcext:value-type="date">
            <text:p>14/07/26 15:10</text:p>
          </table:table-cell>
          <table:table-cell/>
        </table:table-row>
        <table:table-row table:style-name="ro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CONDOMINIO KARIBANA - PLAN LUZ</text:p>
          </table:table-cell>
          <table:table-cell table:style-name="ce1" office:value-type="string" calcext:value-type="string">
            <text:p>SEDE BARRANQUILLA; KARIBANA; ALIANZA FIDUCIARIA SEDE BARRANQUILLA; JULIAN ANDRES RINCON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CC2.X-3.X|Trifasico|24VDC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BQL-0930</text:p>
          </table:table-cell>
          <table:table-cell table:style-name="ce1" office:value-type="float" office:value="8.93407650000414E+018" calcext:value-type="float">
            <text:p>8,93407650000414E+018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5446415" calcext:value-type="float">
            <text:p>105446415</text:p>
          </table:table-cell>
          <table:table-cell table:style-name="ce1" office:value-type="float" office:value="-754922609" calcext:value-type="float">
            <text:p>-75492260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01-03T19:05:06" calcext:value-type="date">
            <text:p>03/01/24 19:05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DT ALTOZANO</text:p>
          </table:table-cell>
          <table:table-cell table:style-name="ce1" office:value-type="string" calcext:value-type="string">
            <text:p>SEDE PEREIRA; ALIANZA FIDUCIARIA SEDE PEREIRA; DT ALTOZANO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IBG0114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296332" calcext:value-type="float">
            <text:p>4296332</text:p>
          </table:table-cell>
          <table:table-cell table:style-name="ce1" office:value-type="float" office:value="-74803541" calcext:value-type="float">
            <text:p>-7480354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07-09T18:03:31" calcext:value-type="date">
            <text:p>09/07/24 18:0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EDIFICIO ICONO 60 - PLAN LUZ</text:p>
          </table:table-cell>
          <table:table-cell table:style-name="ce1" office:value-type="string" calcext:value-type="string">
            <text:p>JUAN RICARDO HINCAPIE; ICONO 60; ALIANZA FIDUCIARIA SEDE IBAGUE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ModbusGenset PCC 1301/1.x/0500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IBG0540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4432084" calcext:value-type="float">
            <text:p>44432084</text:p>
          </table:table-cell>
          <table:table-cell table:style-name="ce1" office:value-type="float" office:value="-752048624" calcext:value-type="float">
            <text:p>-75204862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15" calcext:value-type="date">
            <text:p>14/07/26 15:09</text:p>
          </table:table-cell>
          <table:table-cell/>
        </table:table-row>
        <table:table-row table:style-name="ro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EL CELELE - PLAN LUZ</text:p>
          </table:table-cell>
          <table:table-cell table:style-name="ce1" office:value-type="string" calcext:value-type="string">
            <text:p>SEDE BARRANQUILLA; EL CELELE; ALIANZA FIDUCIARIA SEDE BARRANQUILLA; JULIAN ANDRES RINCON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ModbusGenset PCC 1301/1.x/0500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BQL-0865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221551" calcext:value-type="float">
            <text:p>104221551</text:p>
          </table:table-cell>
          <table:table-cell table:style-name="ce1" office:value-type="float" office:value="-755445795" calcext:value-type="float">
            <text:p>-75544579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3-23T20:41:18" calcext:value-type="date">
            <text:p>23/03/26 20:41</text:p>
          </table:table-cell>
          <table:table-cell/>
        </table:table-row>
        <table:table-row table:style-name="ro5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EQUITEL SEDE MOSQUERA - PLAN LUZ</text:p>
          </table:table-cell>
          <table:table-cell table:style-name="ce1" office:value-type="string" calcext:value-type="string">
            <text:p>SEDE MOSQUERA; EQUITEL; Lib; CAMKIT2; ALIANZA FIDUCIARIA SEDE MOSQUERA; MARIA FERNANDA GOMEZ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CC1302-PCC1.1|Trifasico|24VDC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BOG0741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99202" calcext:value-type="float">
            <text:p>4699202</text:p>
          </table:table-cell>
          <table:table-cell table:style-name="ce1" office:value-type="float" office:value="-74204396" calcext:value-type="float">
            <text:p>-7420439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8:38" calcext:value-type="date">
            <text:p>14/07/26 15:08</text:p>
          </table:table-cell>
          <table:table-cell/>
        </table:table-row>
        <table:table-row table:style-name="ro5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ESCUELA DE INGENIERIA DE ANTIOQUIA - PLAN LUZ</text:p>
          </table:table-cell>
          <table:table-cell table:style-name="ce1" office:value-type="string" calcext:value-type="string">
            <text:p>INGENIERIA DE ANTIOQUIA; ESCUELA DE INGENIERIA DE ANTIOQUIA - PLAN LUZ; ALIANZA FIDUCIARIA SEDE MEDELLIN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ModbusGenset PCC 1301/1.x/0500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MED833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1580719" calcext:value-type="float">
            <text:p>51580719</text:p>
          </table:table-cell>
          <table:table-cell table:style-name="ce1" office:value-type="float" office:value="-755205903" calcext:value-type="float">
            <text:p>-75520590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3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ESCUELA DE INGENIERIA DE ANTIOQUIA (EIA) FESE II</text:p>
          </table:table-cell>
          <table:table-cell table:style-name="ce1" office:value-type="string" calcext:value-type="string">
            <text:p>ALIANZA FIDUCIARIA 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OVISTAR M2M</text:p>
          </table:table-cell>
          <table:table-cell table:style-name="ce1" office:value-type="float" office:value="8.93407510026199E+018" calcext:value-type="float">
            <text:p>8,93407510026199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580719" calcext:value-type="float">
            <text:p>61580719</text:p>
          </table:table-cell>
          <table:table-cell table:style-name="ce1" office:value-type="float" office:value="-755205903" calcext:value-type="float">
            <text:p>-75520590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2" calcext:value-type="date">
            <text:p>14/07/26 15:10</text:p>
          </table:table-cell>
          <table:table-cell/>
        </table:table-row>
        <table:table-row table:style-name="ro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ESTE ES MI BUS - PLAN LUZ</text:p>
          </table:table-cell>
          <table:table-cell table:style-name="ce1" office:value-type="string" calcext:value-type="string">
            <text:p>SEDE MOSQUERA; MI BUS; Camkit; ALIANZA FIDUCIARIA SEDE MOSQUERA; MARIA FERNANDA GOMEZ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ModbusGenset PCC2x3x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BOG1967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65517" calcext:value-type="float">
            <text:p>4765517</text:p>
          </table:table-cell>
          <table:table-cell table:style-name="ce1" office:value-type="float" office:value="-74078945" calcext:value-type="float">
            <text:p>-7407894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8:40" calcext:value-type="date">
            <text:p>14/07/26 15:08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F&amp;P TRADING - PLAN LUZ</text:p>
          </table:table-cell>
          <table:table-cell table:style-name="ce1" office:value-type="string" calcext:value-type="string">
            <text:p>JUAN RICARDO HINCAPIE; TRADING; ALIANZA FIDUCIARIA SEDE IBAGU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IBG0511/M2M</text:p>
          </table:table-cell>
          <table:table-cell table:style-name="ce1" office:value-type="float" office:value="8.93407510025853E+018" calcext:value-type="float">
            <text:p>8,93407510025853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0363939" calcext:value-type="float">
            <text:p>50363939</text:p>
          </table:table-cell>
          <table:table-cell table:style-name="ce1" office:value-type="float" office:value="-748812266" calcext:value-type="float">
            <text:p>-74881226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FEDERICO OSORIO MI CORRAL - PLAN LUZ</text:p>
          </table:table-cell>
          <table:table-cell table:style-name="ce1" office:value-type="string" calcext:value-type="string">
            <text:p>SEDE BARRANQUILLA; MI CORRAL; ALIANZA FIDUCIARIA SEDE BARRANQUILLA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736</text:p>
          </table:table-cell>
          <table:table-cell table:style-name="ce1" office:value-type="float" office:value="8.93407110030027E+018" calcext:value-type="float">
            <text:p>8,93407110030027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953957" calcext:value-type="float">
            <text:p>10953957</text:p>
          </table:table-cell>
          <table:table-cell table:style-name="ce1" office:value-type="float" office:value="-74834833" calcext:value-type="float">
            <text:p>-7483483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04-04T08:59:35" calcext:value-type="date">
            <text:p>04/04/24 08:59</text:p>
          </table:table-cell>
          <table:table-cell/>
        </table:table-row>
        <table:table-row table:style-name="ro6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FRUTY GREEN - PLAN LUZ</text:p>
          </table:table-cell>
          <table:table-cell table:style-name="ce1" office:value-type="string" calcext:value-type="string">
            <text:p>SEDE PEREIRA; FRUTY GREEN; ALIANZA FIDUCIARIA SEDE PEREIRA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PEI0484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350981" calcext:value-type="float">
            <text:p>5350981</text:p>
          </table:table-cell>
          <table:table-cell table:style-name="ce1" office:value-type="float" office:value="-75765421" calcext:value-type="float">
            <text:p>-7576542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08T08:43:25" calcext:value-type="date">
            <text:p>08/07/26 08:43</text:p>
          </table:table-cell>
          <table:table-cell/>
        </table:table-row>
        <table:table-row table:style-name="ro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GRAN AMERICAS GEN 01 - PLAN LUZ</text:p>
          </table:table-cell>
          <table:table-cell table:style-name="ce1" office:value-type="string" calcext:value-type="string">
            <text:p>SEDE MOSQUERA; Camkit; AMERICAS; ALIANZA FIDUCIARIA SEDE MOSQUERA; MARIA FERNANDA GOMEZ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ModbusGenset PCC2x3x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BOG1962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54855" calcext:value-type="float">
            <text:p>46854855</text:p>
          </table:table-cell>
          <table:table-cell table:style-name="ce1" office:value-type="float" office:value="-741526307" calcext:value-type="float">
            <text:p>-74152630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34" calcext:value-type="date">
            <text:p>14/07/26 15:09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HOSPICLEAN - PLAN LUZ</text:p>
          </table:table-cell>
          <table:table-cell table:style-name="ce1" office:value-type="string" calcext:value-type="string">
            <text:p>SEDE PEREIRA; HOSPICLEAN; ALIANZA FIDUCIARIA SEDE PEREIRA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PEI0256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30189" calcext:value-type="float">
            <text:p>4830189</text:p>
          </table:table-cell>
          <table:table-cell table:style-name="ce1" office:value-type="float" office:value="-75698654" calcext:value-type="float">
            <text:p>-7569865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3:54:52" calcext:value-type="date">
            <text:p>14/07/26 13:54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HOSPITAL SAN JOSE DE BUGA - PLAN LUZ</text:p>
          </table:table-cell>
          <table:table-cell table:style-name="ce1" office:value-type="string" calcext:value-type="string">
            <text:p>SEDE CALI; ALIANZA FIDUCIARIA SEDE YUMBO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ModbusGenset PCC 1301/1.x/0500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L0697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906858" calcext:value-type="float">
            <text:p>3906858</text:p>
          </table:table-cell>
          <table:table-cell table:style-name="ce1" office:value-type="float" office:value="-762956514" calcext:value-type="float">
            <text:p>-76295651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8:45" calcext:value-type="date">
            <text:p>14/07/26 15:08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IPS CEDIMA - PLAN LUZ</text:p>
          </table:table-cell>
          <table:table-cell table:style-name="ce1" office:value-type="string" calcext:value-type="string">
            <text:p>SEDE CALI; CEDIMA; ALIANZA FIDUCIARIA SEDE YUMBO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ModbusGenset PCC 1301/1.x/0500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L0698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412601" calcext:value-type="float">
            <text:p>3412601</text:p>
          </table:table-cell>
          <table:table-cell table:style-name="ce1" office:value-type="float" office:value="-765378829" calcext:value-type="float">
            <text:p>-76537882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8:45" calcext:value-type="date">
            <text:p>14/07/26 15:08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JECO DECORACIONES GEN01 - PLAN LUZ</text:p>
          </table:table-cell>
          <table:table-cell table:style-name="ce1" office:value-type="string" calcext:value-type="string">
            <text:p>SEDE BARRANQUILLA; JECO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546</text:p>
          </table:table-cell>
          <table:table-cell table:style-name="ce1" office:value-type="float" office:value="8.93407110030027E+018" calcext:value-type="float">
            <text:p>8,93407110030027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877989" calcext:value-type="float">
            <text:p>10877989</text:p>
          </table:table-cell>
          <table:table-cell table:style-name="ce1" office:value-type="float" office:value="-74890454" calcext:value-type="float">
            <text:p>-7489045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02-25T10:31:44" calcext:value-type="date">
            <text:p>25/02/24 10:31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JUANCAMOLE - PLAN LUZ</text:p>
          </table:table-cell>
          <table:table-cell table:style-name="ce1" office:value-type="string" calcext:value-type="string">
            <text:p>SEDE PEREIRA; DANIEL OCAMPO; JUANCAMOLE; ALIANZA FIDUCIARIA SEDE PEREIR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PEI0257</text:p>
          </table:table-cell>
          <table:table-cell table:style-name="ce1" office:value-type="float" office:value="8.93407520000261E+018" calcext:value-type="float">
            <text:p>8,93407520000261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32807" calcext:value-type="float">
            <text:p>4832807</text:p>
          </table:table-cell>
          <table:table-cell table:style-name="ce1" office:value-type="float" office:value="-75690654" calcext:value-type="float">
            <text:p>-7569065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8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LABORATORIO HORMONAL - PLAN LUZ</text:p>
          </table:table-cell>
          <table:table-cell table:style-name="ce1" office:value-type="string" calcext:value-type="string">
            <text:p>SEDE MOSQUERA; LABORATORIO HORMONAL; LABORATORIO HORMONAL; ALIANZA FIDUCIARIA SEDE MOSQUERA; MARIA FERNANDA GOMEZ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551</text:p>
          </table:table-cell>
          <table:table-cell table:style-name="ce1" office:value-type="float" office:value="5.71015020056227E+016" calcext:value-type="float">
            <text:p>5,71015020056227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47285" calcext:value-type="float">
            <text:p>4747285</text:p>
          </table:table-cell>
          <table:table-cell table:style-name="ce1" office:value-type="float" office:value="-74044369" calcext:value-type="float">
            <text:p>-7404436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LOCERIA COLOMBIANA GEN02 - PLAN LUZ</text:p>
          </table:table-cell>
          <table:table-cell table:style-name="ce1" office:value-type="string" calcext:value-type="string">
            <text:p>LOCERIA; ALIANZA FIDUCIARIA SEDE MEDELLIN; ALEXANDRA TABORD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656</text:p>
          </table:table-cell>
          <table:table-cell table:style-name="ce1" office:value-type="float" office:value="8.93407510025567E+018" calcext:value-type="float">
            <text:p>8,93407510025567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6.0895</text:p>
          </table:table-cell>
          <table:table-cell table:style-name="ce1" office:value-type="float" office:value="-75638666" calcext:value-type="float">
            <text:p>-7563866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2" calcext:value-type="date">
            <text:p>14/07/26 15:10</text:p>
          </table:table-cell>
          <table:table-cell/>
        </table:table-row>
        <table:table-row table:style-name="ro6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MEGASERV - PLAN LUZ</text:p>
          </table:table-cell>
          <table:table-cell table:style-name="ce1" office:value-type="string" calcext:value-type="string">
            <text:p>SEDE MOSQUERA; MEGASERV; ALIANZA FIDUCIARIA SEDE MOSQUERA; MARIA FERNANDA GOMEZ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700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93648" calcext:value-type="float">
            <text:p>793648</text:p>
          </table:table-cell>
          <table:table-cell table:style-name="ce1" office:value-type="float" office:value="-72492456" calcext:value-type="float">
            <text:p>-7249245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5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MERCADOLIBRE - PLAN LUZ</text:p>
          </table:table-cell>
          <table:table-cell table:style-name="ce1" office:value-type="string" calcext:value-type="string">
            <text:p>SEDE MOSQUERA; MERCADO LIBRE; CAMKIT2; ALIANZA FIDUCIARIA SEDE MOSQUERA; MARIA FERNANDA GOMEZ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CC2.X-3.X|Trifasico|24VDC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BOG2149</text:p>
          </table:table-cell>
          <table:table-cell table:style-name="ce1" office:value-type="float" office:value="8.93407650000415E+018" calcext:value-type="float">
            <text:p>8,93407650000415E+018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377693" calcext:value-type="float">
            <text:p>47377693</text:p>
          </table:table-cell>
          <table:table-cell table:style-name="ce1" office:value-type="float" office:value="-741628219" calcext:value-type="float">
            <text:p>-74162821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22" calcext:value-type="date">
            <text:p>14/07/26 15:09</text:p>
          </table:table-cell>
          <table:table-cell/>
        </table:table-row>
        <table:table-row table:style-name="ro5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MUTUAL SER EPS - PLAN LUZ</text:p>
          </table:table-cell>
          <table:table-cell table:style-name="ce1" office:value-type="string" calcext:value-type="string">
            <text:p>SEDE BARRANQUILLA; MUTUAL SER; ALIANZA FIDUCIARIA SEDE BARRANQUILLA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527</text:p>
          </table:table-cell>
          <table:table-cell table:style-name="ce1" office:value-type="float" office:value="8.95202001929001E+018" calcext:value-type="float">
            <text:p>8,95202001929001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952827" calcext:value-type="float">
            <text:p>10952827</text:p>
          </table:table-cell>
          <table:table-cell table:style-name="ce1" office:value-type="float" office:value="-74809065" calcext:value-type="float">
            <text:p>-7480906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3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NOVA YUMBO EPSA BUS A - PLAN LUZ</text:p>
          </table:table-cell>
          <table:table-cell table:style-name="ce1" office:value-type="string" calcext:value-type="string">
            <text:p>SEDE CALI; NOVA YUMBO; ALIANZA FIDUCIARIA SEDE YUMB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AL0491</text:p>
          </table:table-cell>
          <table:table-cell table:style-name="ce1" office:value-type="float" office:value="8.93407720000165E+018" calcext:value-type="float">
            <text:p>8,9340772000016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517171" calcext:value-type="float">
            <text:p>3517171</text:p>
          </table:table-cell>
          <table:table-cell table:style-name="ce1" office:value-type="float" office:value="-76500771" calcext:value-type="float">
            <text:p>-7650077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8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NOVA YUMBO EPSA BUS B - PLAN LUZ</text:p>
          </table:table-cell>
          <table:table-cell table:style-name="ce1" office:value-type="string" calcext:value-type="string">
            <text:p>SEDE CALI; NOVA YUMBO; ALIANZA FIDUCIARIA SEDE YUMB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AL0492</text:p>
          </table:table-cell>
          <table:table-cell table:style-name="ce1" office:value-type="float" office:value="8.93407720000166E+018" calcext:value-type="float">
            <text:p>8,93407720000166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517173" calcext:value-type="float">
            <text:p>3517173</text:p>
          </table:table-cell>
          <table:table-cell table:style-name="ce1" office:value-type="float" office:value="-77500773" calcext:value-type="float">
            <text:p>-7750077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5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NUTRESA GC FOODS GEN01 - PLAN LUZ</text:p>
          </table:table-cell>
          <table:table-cell table:style-name="ce1" office:value-type="string" calcext:value-type="string">
            <text:p>SEDE BARRANQUILLA; NUTRESA GC FOODS; ALIANZA FIDUCIARIA SEDE BARRANQUILLA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489</text:p>
          </table:table-cell>
          <table:table-cell table:style-name="ce1" office:value-type="float" office:value="8.93407110030027E+018" calcext:value-type="float">
            <text:p>8,93407110030027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1965173" calcext:value-type="float">
            <text:p>111965173</text:p>
          </table:table-cell>
          <table:table-cell table:style-name="ce1" office:value-type="float" office:value="-741892772" calcext:value-type="float">
            <text:p>-74189277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06T08:29:03" calcext:value-type="date">
            <text:p>06/07/26 08:29</text:p>
          </table:table-cell>
          <table:table-cell/>
        </table:table-row>
        <table:table-row table:style-name="ro5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NUTRESA GC FOODS GEN02 - PLAN LUZ</text:p>
          </table:table-cell>
          <table:table-cell table:style-name="ce1" office:value-type="string" calcext:value-type="string">
            <text:p>SEDE BARRANQUILLA; NUTRESA GC FOODS; ALIANZA FIDUCIARIA SEDE BARRANQUILLA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869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1965173" calcext:value-type="float">
            <text:p>111965173</text:p>
          </table:table-cell>
          <table:table-cell table:style-name="ce1" office:value-type="float" office:value="-741892772" calcext:value-type="float">
            <text:p>-74189277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6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SOBERANA - PLAN LUZ</text:p>
          </table:table-cell>
          <table:table-cell table:style-name="ce1" office:value-type="string" calcext:value-type="string">
            <text:p>SOBERANA; ALIANZA FIDUCIARIA 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631</text:p>
          </table:table-cell>
          <table:table-cell table:style-name="ce1" office:value-type="float" office:value="8.952020019629E+018" calcext:value-type="float">
            <text:p>8,952020019629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88524" calcext:value-type="float">
            <text:p>888524</text:p>
          </table:table-cell>
          <table:table-cell table:style-name="ce1" office:value-type="float" office:value="-75767743" calcext:value-type="float">
            <text:p>-7576774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3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STILH SAS - PLAN LUZ</text:p>
          </table:table-cell>
          <table:table-cell table:style-name="ce1" office:value-type="string" calcext:value-type="string">
            <text:p>STHIL; CAMKIT2; ALIANZA FIDUCIARIA SEDE MEDELLIN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CC1302-PCC1.1|Trifasico|24VDC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MED750</text:p>
          </table:table-cell>
          <table:table-cell table:style-name="ce1" office:value-type="float" office:value="8.93407650000414E+018" calcext:value-type="float">
            <text:p>8,93407650000414E+018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782959" calcext:value-type="float">
            <text:p>61782959</text:p>
          </table:table-cell>
          <table:table-cell table:style-name="ce1" office:value-type="float" office:value="-754392472" calcext:value-type="float">
            <text:p>-75439247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08T10:35:00" calcext:value-type="date">
            <text:p>08/07/26 10:35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SUMICOL - PLAN LUZ</text:p>
          </table:table-cell>
          <table:table-cell table:style-name="ce1" office:value-type="string" calcext:value-type="string">
            <text:p>SUMICOL; ALIANZA FIDUCIARIA 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481</text:p>
          </table:table-cell>
          <table:table-cell table:style-name="ce1" office:value-type="float" office:value="8.93407510025574E+018" calcext:value-type="float">
            <text:p>8,934075100255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53589" calcext:value-type="float">
            <text:p>6153589</text:p>
          </table:table-cell>
          <table:table-cell table:style-name="ce1" office:value-type="float" office:value="-75619645" calcext:value-type="float">
            <text:p>-7561964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5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TECNOGRANJAS - PLAN LUZ</text:p>
          </table:table-cell>
          <table:table-cell table:style-name="ce1" office:value-type="string" calcext:value-type="string">
            <text:p>SEDE BARRANQUILLA; TECNOGRANJAS; ALIANZA FIDUCIARIA SEDE BARRANQUILLA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486</text:p>
          </table:table-cell>
          <table:table-cell table:style-name="ce1" office:value-type="float" office:value="5.71015019120965E+016" calcext:value-type="float">
            <text:p>5,71015019120965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795292" calcext:value-type="float">
            <text:p>10795292</text:p>
          </table:table-cell>
          <table:table-cell table:style-name="ce1" office:value-type="float" office:value="-74875657" calcext:value-type="float">
            <text:p>-7487565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6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TECNOGRANJAS SANTA MARIA - PLAN LUZ</text:p>
          </table:table-cell>
          <table:table-cell table:style-name="ce1" office:value-type="string" calcext:value-type="string">
            <text:p>SEDE BARRANQUILLA; ALIANZA FIDUCIARIA SEDE BARRANQUILLA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787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8002406" calcext:value-type="float">
            <text:p>108002406</text:p>
          </table:table-cell>
          <table:table-cell table:style-name="ce1" office:value-type="float" office:value="-747600533" calcext:value-type="float">
            <text:p>-74760053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11-07T12:14:53" calcext:value-type="date">
            <text:p>07/11/24 12:14</text:p>
          </table:table-cell>
          <table:table-cell/>
        </table:table-row>
        <table:table-row table:style-name="ro6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TORRES DEL SURCO - PLAN LUZ</text:p>
          </table:table-cell>
          <table:table-cell table:style-name="ce1" office:value-type="string" calcext:value-type="string">
            <text:p>SEDE PEREIRA; TORRES DEL SURCO; ALIANZA FIDUCIARIA SEDE PEREIRA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PEI0258</text:p>
          </table:table-cell>
          <table:table-cell table:style-name="ce1" office:value-type="float" office:value="5.71015018089151E+016" calcext:value-type="float">
            <text:p>5,71015018089151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327225" calcext:value-type="float">
            <text:p>4327225</text:p>
          </table:table-cell>
          <table:table-cell table:style-name="ce1" office:value-type="float" office:value="-75826844" calcext:value-type="float">
            <text:p>-7582684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12-21T13:35:20" calcext:value-type="date">
            <text:p>21/12/23 13:35</text:p>
          </table:table-cell>
          <table:table-cell/>
        </table:table-row>
        <table:table-row table:style-name="ro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UNIPHOS GEN01 - PLAN LUZ</text:p>
          </table:table-cell>
          <table:table-cell table:style-name="ce1" office:value-type="string" calcext:value-type="string">
            <text:p>SEDE BARRANQUILLA; UNIPHOS; ALIANZA FIDUCIARIA SEDE BARRANQUILLA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AMF-5|Trifasico</text:p>
          </table:table-cell>
          <table:table-cell table:style-name="ce1" office:value-type="string" calcext:value-type="string">
            <text:p>AMF5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4084094E+016" calcext:value-type="float">
            <text:p>5,71017024084094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26668" calcext:value-type="float">
            <text:p>11026668</text:p>
          </table:table-cell>
          <table:table-cell table:style-name="ce1" office:value-type="float" office:value="-74804524" calcext:value-type="float">
            <text:p>-7480452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08T08:43:26" calcext:value-type="date">
            <text:p>08/07/26 08:43</text:p>
          </table:table-cell>
          <table:table-cell/>
        </table:table-row>
        <table:table-row table:style-name="ro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UNIPHOS GEN02 - PLAN LUZ</text:p>
          </table:table-cell>
          <table:table-cell table:style-name="ce1" office:value-type="string" calcext:value-type="string">
            <text:p>SEDE BARRANQUILLA; UNIPHOS; ALIANZA FIDUCIARIA SEDE BARRANQUILLA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AMF-5|Trifasico</text:p>
          </table:table-cell>
          <table:table-cell table:style-name="ce1" office:value-type="string" calcext:value-type="string">
            <text:p>AMF5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4084094E+016" calcext:value-type="float">
            <text:p>5,71017024084094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26666" calcext:value-type="float">
            <text:p>11026666</text:p>
          </table:table-cell>
          <table:table-cell table:style-name="ce1" office:value-type="float" office:value="-74804521" calcext:value-type="float">
            <text:p>-7480452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1T22:06:59" calcext:value-type="date">
            <text:p>11/07/26 22:06</text:p>
          </table:table-cell>
          <table:table-cell/>
        </table:table-row>
        <table:table-row table:style-name="ro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UNIPHOS GEN03 - PLAN LUZ</text:p>
          </table:table-cell>
          <table:table-cell table:style-name="ce1" office:value-type="string" calcext:value-type="string">
            <text:p>SEDE BARRANQUILLA; UNIPHOS; ALIANZA FIDUCIARIA SEDE BARRANQUILLA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703 / MOVISTAR</text:p>
          </table:table-cell>
          <table:table-cell table:style-name="ce1" office:value-type="float" office:value="19290004795" calcext:value-type="float">
            <text:p>19290004795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2671" calcext:value-type="float">
            <text:p>1102671</text:p>
          </table:table-cell>
          <table:table-cell table:style-name="ce1" office:value-type="float" office:value="-74804546" calcext:value-type="float">
            <text:p>-7480454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6" calcext:value-type="date">
            <text:p>24/06/26 09:13</text:p>
          </table:table-cell>
          <table:table-cell/>
        </table:table-row>
        <table:table-row table:style-name="ro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UNIPHOS GEN04 - PLAN LUZ</text:p>
          </table:table-cell>
          <table:table-cell table:style-name="ce1" office:value-type="string" calcext:value-type="string">
            <text:p>SEDE BARRANQUILLA; UNIPHOS; ALIANZA FIDUCIARIA SEDE BARRANQUILLA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704 / TELCEL</text:p>
          </table:table-cell>
          <table:table-cell table:style-name="ce1" office:value-type="float" office:value="19290004787" calcext:value-type="float">
            <text:p>19290004787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2671" calcext:value-type="float">
            <text:p>1102671</text:p>
          </table:table-cell>
          <table:table-cell table:style-name="ce1" office:value-type="float" office:value="-74804546" calcext:value-type="float">
            <text:p>-7480454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6" calcext:value-type="date">
            <text:p>24/06/26 09:13</text:p>
          </table:table-cell>
          <table:table-cell/>
        </table:table-row>
        <table:table-row table:style-name="ro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UNIVERSIDAD CENTRAL SEDE 616 Y 624 - PLAN LUZ</text:p>
          </table:table-cell>
          <table:table-cell table:style-name="ce1" office:value-type="string" calcext:value-type="string">
            <text:p>SEDE MOSQUERA; UNIVERSIDAD CENTRAL; ALIANZA FIDUCIARIA SEDE MOSQUERA; MARIA FERNANDA GOMEZ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ModbusGenset PCC 1301/1.x/0500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BOG2198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07881546020500" calcext:value-type="float">
            <text:p>4607881546020500</text:p>
          </table:table-cell>
          <table:table-cell table:style-name="ce1" office:value-type="float" office:value="-7406990814208980" calcext:value-type="float">
            <text:p>-7406990814208980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5-25T05:35:19" calcext:value-type="date">
            <text:p>25/05/26 05:35</text:p>
          </table:table-cell>
          <table:table-cell table:style-name="ce4" office:value-type="date" office:date-value="2026-07-14T15:09:39" calcext:value-type="date">
            <text:p>14/07/26 15:09</text:p>
          </table:table-cell>
          <table:table-cell/>
        </table:table-row>
        <table:table-row table:style-name="ro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UNIVERSIDAD CENTRAL SEDE FULLER - PLAN LUZ</text:p>
          </table:table-cell>
          <table:table-cell table:style-name="ce1" office:value-type="string" calcext:value-type="string">
            <text:p>SEDE MOSQUERA; UNIVERSIDAD CENTRAL; ALIANZA FIDUCIARIA SEDE MOSQUERA; MARIA FERNANDA GOMEZ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mkit-1|PS0600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BOG2197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6064397" calcext:value-type="float">
            <text:p>66064397</text:p>
          </table:table-cell>
          <table:table-cell table:style-name="ce1" office:value-type="float" office:value="-74069531" calcext:value-type="float">
            <text:p>-7406953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5" calcext:value-type="date">
            <text:p>14/07/26 15:10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UTB 300KW LA MANGA - PLAN LUZ</text:p>
          </table:table-cell>
          <table:table-cell table:style-name="ce1" office:value-type="string" calcext:value-type="string">
            <text:p>SEDE BARRANQUILLA; MANGA; ALIANZA FIDUCIARIA 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441</text:p>
          </table:table-cell>
          <table:table-cell table:style-name="ce1" office:value-type="float" office:value="5710150192096547" calcext:value-type="float">
            <text:p>5710150192096547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12979" calcext:value-type="float">
            <text:p>10412979</text:p>
          </table:table-cell>
          <table:table-cell table:style-name="ce1" office:value-type="float" office:value="-75538125" calcext:value-type="float">
            <text:p>-7553812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5" calcext:value-type="date">
            <text:p>14/07/26 15:10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UTB TURBACO 450KW EDIFICIO A3-PLAN LUZ</text:p>
          </table:table-cell>
          <table:table-cell table:style-name="ce1" office:value-type="string" calcext:value-type="string">
            <text:p>SEDE BARRANQUILLA; UTB TURBACO; ALIANZA FIDUCIARIA 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554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369811" calcext:value-type="float">
            <text:p>10369811</text:p>
          </table:table-cell>
          <table:table-cell table:style-name="ce1" office:value-type="float" office:value="-75464944" calcext:value-type="float">
            <text:p>-7546494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6" calcext:value-type="date">
            <text:p>24/06/26 09:13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LIANZA FIDUCIARIA SA FIDEICOMISOS (PA)</text:p>
          </table:table-cell>
          <table:table-cell table:style-name="ce1" office:value-type="string" calcext:value-type="string">
            <text:p>UTB TURBACO 800KW TERNERA ALCATRAZ - PLAN LUZ</text:p>
          </table:table-cell>
          <table:table-cell table:style-name="ce1" office:value-type="string" calcext:value-type="string">
            <text:p>SEDE BARRANQUILLA; UTB TURBACO; ALIANZA FIDUCIARIA SEDE BARRANQUILLA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ModbusGenset PCC2x3x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BQL-0555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370133" calcext:value-type="float">
            <text:p>10370133</text:p>
          </table:table-cell>
          <table:table-cell table:style-name="ce1" office:value-type="float" office:value="-75465483" calcext:value-type="float">
            <text:p>-7546548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04-20T09:16:56" calcext:value-type="date">
            <text:p>20/04/24 09:16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ALTO TESORO ACEIS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4084094E+016" calcext:value-type="float">
            <text:p>5,71017024084094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95" calcext:value-type="float">
            <text:p>6195</text:p>
          </table:table-cell>
          <table:table-cell table:style-name="ce1" office:value-type="float" office:value="-75558" calcext:value-type="float">
            <text:p>-7555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APUESTAS LAS MARGARITAS LTDA</text:p>
          </table:table-cell>
          <table:table-cell table:style-name="ce1" office:value-type="string" calcext:value-type="string">
            <text:p>APUESTAS LAS MARGARITAS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018</text:p>
          </table:table-cell>
          <table:table-cell table:style-name="ce3" office:value-type="float" office:value="5.71011E+016" calcext:value-type="float">
            <text:p>5,71E+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944513" calcext:value-type="float">
            <text:p>10944513</text:p>
          </table:table-cell>
          <table:table-cell table:style-name="ce1" office:value-type="float" office:value="-7476642" calcext:value-type="float">
            <text:p>-747664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B BRAUN SURGICAL S.A.S</text:p>
          </table:table-cell>
          <table:table-cell table:style-name="ce1" office:value-type="string" calcext:value-type="string">
            <text:p>SEDE MOSQUERA; RAFAEL TRIANA; Camkit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ModbusGenset PCC2x3x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BOG1944/M2M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203872" calcext:value-type="float">
            <text:p>47203872</text:p>
          </table:table-cell>
          <table:table-cell table:style-name="ce1" office:value-type="float" office:value="-742411409" calcext:value-type="float">
            <text:p>-74241140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1:30" calcext:value-type="date">
            <text:p>14/07/26 15:01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ANEXO A PEM01 (Test)</text:p>
          </table:table-cell>
          <table:table-cell table:style-name="ce1" office:value-type="string" calcext:value-type="string">
            <text:p>SEDE MOSQUER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AMF25 Electrónico</text:p>
          </table:table-cell>
          <table:table-cell table:style-name="ce1" office:value-type="string" calcext:value-type="string">
            <text:p>AMF25</text:p>
          </table:table-cell>
          <table:table-cell table:style-name="ce1" office:value-type="string" calcext:value-type="string">
            <text:p>BOG2022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60234853598186E+016" calcext:value-type="float">
            <text:p>4,60234853598186E+016</text:p>
          </table:table-cell>
          <table:table-cell table:style-name="ce1" office:value-type="float" office:value="-7407215905798210" calcext:value-type="float">
            <text:p>-7407215905798210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ARMENIA GEN 1 (Test)</text:p>
          </table:table-cell>
          <table:table-cell table:style-name="ce1" office:value-type="string" calcext:value-type="string">
            <text:p>SEDE PEREIRA; DANIEL OCAMPO; BANCO DE LA REPUBLIC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AMF-25|Trifasico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PEI0529 / M2M</text:p>
          </table:table-cell>
          <table:table-cell table:style-name="ce1" office:value-type="float" office:value="8.93407610014965E+018" calcext:value-type="float">
            <text:p>8,9340761001496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533565610370710" calcext:value-type="float">
            <text:p>4533565610370710</text:p>
          </table:table-cell>
          <table:table-cell table:style-name="ce1" office:value-type="float" office:value="-7567449756067500" calcext:value-type="float">
            <text:p>-7567449756067500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8-11T02:47:21" calcext:value-type="date">
            <text:p>11/08/23 02:47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BARRANQUILLA PEM01 (test)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s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817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987128" calcext:value-type="float">
            <text:p>10987128</text:p>
          </table:table-cell>
          <table:table-cell table:style-name="ce1" office:value-type="float" office:value="-747855487" calcext:value-type="float">
            <text:p>-74785548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6-05T13:26:36" calcext:value-type="date">
            <text:p>05/06/23 13:26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BARRANQUILLA PEM02 (test)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816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987128" calcext:value-type="float">
            <text:p>10987128</text:p>
          </table:table-cell>
          <table:table-cell table:style-name="ce1" office:value-type="float" office:value="-747855487" calcext:value-type="float">
            <text:p>-74785548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2-12-07T17:59:56" calcext:value-type="date">
            <text:p>07/12/22 17:5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BOGOTA BLAA PEM 04</text:p>
          </table:table-cell>
          <table:table-cell table:style-name="ce1" office:value-type="string" calcext:value-type="string">
            <text:p>SEDE MOSQUERA; BANCO DE LA REPUBLIC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AMF-25|Trifasico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2025 / M2M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59703" calcext:value-type="float">
            <text:p>459703</text:p>
          </table:table-cell>
          <table:table-cell table:style-name="ce1" office:value-type="float" office:value="-7407273" calcext:value-type="float">
            <text:p>-740727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2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BOGOTA BLAA PEM02 (test)</text:p>
          </table:table-cell>
          <table:table-cell table:style-name="ce1" office:value-type="string" calcext:value-type="string">
            <text:p>SEDE MOSQUERA; BANCO DE LA REPUBLIC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2024 / M2M</text:p>
          </table:table-cell>
          <table:table-cell table:style-name="ce1" office:value-type="float" office:value="8.93407610014965E+018" calcext:value-type="float">
            <text:p>8,9340761001496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59692" calcext:value-type="float">
            <text:p>459692</text:p>
          </table:table-cell>
          <table:table-cell table:style-name="ce1" office:value-type="float" office:value="-7407273" calcext:value-type="float">
            <text:p>-740727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3-23T10:20:43" calcext:value-type="date">
            <text:p>23/03/23 10:2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BOGOTA ED PRINCIPAL PEM10 (Test)</text:p>
          </table:table-cell>
          <table:table-cell table:style-name="ce1" office:value-type="string" calcext:value-type="string">
            <text:p>SEDE MOSQUERA; BANCO DE LA REPUBLIC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2034</text:p>
          </table:table-cell>
          <table:table-cell table:style-name="ce1" office:value-type="float" office:value="8.93407610014966E+018" calcext:value-type="float">
            <text:p>8,93407610014966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60176471618821E+016" calcext:value-type="float">
            <text:p>4,60176471618821E+016</text:p>
          </table:table-cell>
          <table:table-cell table:style-name="ce1" office:value-type="float" office:value="-740730630035868" calcext:value-type="float">
            <text:p>-74073063003586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CENTRAL DE EFECTIVO PEM 19</text:p>
          </table:table-cell>
          <table:table-cell table:style-name="ce1" office:value-type="string" calcext:value-type="string">
            <text:p>SEDE MOSQUER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2027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05159" calcext:value-type="float">
            <text:p>46505159</text:p>
          </table:table-cell>
          <table:table-cell table:style-name="ce1" office:value-type="float" office:value="-741042637" calcext:value-type="float">
            <text:p>-74104263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CENTRAL DE EFECTIVO PEM 20</text:p>
          </table:table-cell>
          <table:table-cell table:style-name="ce1" office:value-type="string" calcext:value-type="string">
            <text:p>SEDE MOSQUER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2028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05159" calcext:value-type="float">
            <text:p>46505159</text:p>
          </table:table-cell>
          <table:table-cell table:style-name="ce1" office:value-type="float" office:value="-741042637" calcext:value-type="float">
            <text:p>-74104263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5:40" calcext:value-type="date">
            <text:p>14/07/26 15:05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CENTRAL DE EFECTIVO PEM 21</text:p>
          </table:table-cell>
          <table:table-cell table:style-name="ce1" office:value-type="string" calcext:value-type="string">
            <text:p>SEDE MOSQUER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2029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05159" calcext:value-type="float">
            <text:p>46505159</text:p>
          </table:table-cell>
          <table:table-cell table:style-name="ce1" office:value-type="float" office:value="-741042637" calcext:value-type="float">
            <text:p>-74104263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4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CENTRAL DE EFECTIVO PEM 22</text:p>
          </table:table-cell>
          <table:table-cell table:style-name="ce1" office:value-type="string" calcext:value-type="string">
            <text:p>SEDE MOSQUER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2030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05159" calcext:value-type="float">
            <text:p>46505159</text:p>
          </table:table-cell>
          <table:table-cell table:style-name="ce1" office:value-type="float" office:value="-741042637" calcext:value-type="float">
            <text:p>-74104263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10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CLUB CHOQUENZA PEM 13 (test)</text:p>
          </table:table-cell>
          <table:table-cell table:style-name="ce1" office:value-type="string" calcext:value-type="string">
            <text:p>SEDE MOSQUERA; BANCO DE LA REPUBLIC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2032 / M2M</text:p>
          </table:table-cell>
          <table:table-cell table:style-name="ce1" office:value-type="float" office:value="8.93407610014978E+018" calcext:value-type="float">
            <text:p>8,93407610014978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0799" calcext:value-type="float">
            <text:p>470799</text:p>
          </table:table-cell>
          <table:table-cell table:style-name="ce1" office:value-type="float" office:value="-7407984" calcext:value-type="float">
            <text:p>-740798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ED PRINCIPAL PEM09</text:p>
          </table:table-cell>
          <table:table-cell table:style-name="ce1" office:value-type="string" calcext:value-type="string">
            <text:p>SEDE MOSQUERA; BANCO DE LA REPUBLIC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2033 / M2M</text:p>
          </table:table-cell>
          <table:table-cell table:style-name="ce3" office:value-type="float" office:value="8.93408E+018" calcext:value-type="float">
            <text:p>8,93E+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01700550682570" calcext:value-type="float">
            <text:p>4601700550682570</text:p>
          </table:table-cell>
          <table:table-cell table:style-name="ce1" office:value-type="float" office:value="-7407304154591400" calcext:value-type="float">
            <text:p>-7407304154591400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4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ED PRINCIPAL PEM11 (Test)</text:p>
          </table:table-cell>
          <table:table-cell table:style-name="ce1" office:value-type="string" calcext:value-type="string">
            <text:p>SEDE MOSQUERA; BANCO DE LA REPUBLIC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2035 / M2M</text:p>
          </table:table-cell>
          <table:table-cell table:style-name="ce1" office:value-type="float" office:value="8.93407610014965E+018" calcext:value-type="float">
            <text:p>8,9340761001496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60176471618821E+016" calcext:value-type="float">
            <text:p>4,60176471618821E+016</text:p>
          </table:table-cell>
          <table:table-cell table:style-name="ce1" office:value-type="float" office:value="-740730630035868" calcext:value-type="float">
            <text:p>-74073063003586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FLORENCIA GEN 1 (Test)</text:p>
          </table:table-cell>
          <table:table-cell table:style-name="ce1" office:value-type="string" calcext:value-type="string">
            <text:p>SEDE IBAGUE; JUAN HINCAPIE; BANCO DE LA REPUBLIC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IBG0526 / M2M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.6159993742281E+016" calcext:value-type="float">
            <text:p>1,6159993742281E+016</text:p>
          </table:table-cell>
          <table:table-cell table:style-name="ce1" office:value-type="float" office:value="-75612842" calcext:value-type="float">
            <text:p>-7561284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6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FLORENCIA GEN 2 (Test)</text:p>
          </table:table-cell>
          <table:table-cell table:style-name="ce1" office:value-type="string" calcext:value-type="string">
            <text:p>SEDE IBAGUE; JUAN HINCAPIE; BANCO DE LA REPUBLIC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IBG0527 / M2M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.6159949158434E+016" calcext:value-type="float">
            <text:p>1,6159949158434E+016</text:p>
          </table:table-cell>
          <table:table-cell table:style-name="ce1" office:value-type="float" office:value="-756128533839898" calcext:value-type="float">
            <text:p>-75612853383989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6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GIRARDOT</text:p>
          </table:table-cell>
          <table:table-cell table:style-name="ce1" office:value-type="string" calcext:value-type="string">
            <text:p>SEDE IBAGUE; JUAN HINCAPIE; BANCO DE LA REPUBLIC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AMF-25|Trifasico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IBG0528 / M2M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297386120122570" calcext:value-type="float">
            <text:p>4297386120122570</text:p>
          </table:table-cell>
          <table:table-cell table:style-name="ce1" office:value-type="float" office:value="-7480778158046500" calcext:value-type="float">
            <text:p>-7480778158046500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9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IBAGUE CASA DE LA MONEDA PEM03</text:p>
          </table:table-cell>
          <table:table-cell table:style-name="ce1" office:value-type="string" calcext:value-type="string">
            <text:p>SEDE IBAGUE; JUAN HINCAPIE; BANCO DE LA REPUBLIC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IBG0530 / M2M</text:p>
          </table:table-cell>
          <table:table-cell table:style-name="ce1" office:value-type="float" office:value="8.93407610015345E+017" calcext:value-type="float">
            <text:p>8,93407610015345E+017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40131" calcext:value-type="float">
            <text:p>440131</text:p>
          </table:table-cell>
          <table:table-cell table:style-name="ce1" office:value-type="float" office:value="-7514736" calcext:value-type="float">
            <text:p>-751473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4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IBAGUE CASA DE LA MONEDA PEM06</text:p>
          </table:table-cell>
          <table:table-cell table:style-name="ce1" office:value-type="string" calcext:value-type="string">
            <text:p>SEDE IBAGUE; JUAN HINCAPIE; BANCO DE LA REPUBLIC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IBG0532 / M2M</text:p>
          </table:table-cell>
          <table:table-cell table:style-name="ce1" office:value-type="float" office:value="8.93407610015345E+017" calcext:value-type="float">
            <text:p>8,93407610015345E+017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40131" calcext:value-type="float">
            <text:p>440131</text:p>
          </table:table-cell>
          <table:table-cell table:style-name="ce1" office:value-type="float" office:value="-7514736" calcext:value-type="float">
            <text:p>-751473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4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IBAGUE CASA DE LA MONEDA PEM08 (Test)</text:p>
          </table:table-cell>
          <table:table-cell table:style-name="ce1" office:value-type="string" calcext:value-type="string">
            <text:p>SEDE IBAGUE; JUAN HINCAPIE; BANCO DE LA REPUBLIC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IBG0533 / M2M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40131" calcext:value-type="float">
            <text:p>440131</text:p>
          </table:table-cell>
          <table:table-cell table:style-name="ce1" office:value-type="float" office:value="-7514736" calcext:value-type="float">
            <text:p>-751473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IBAGUE CASA DE LA MONEDA PEM09 (Test)</text:p>
          </table:table-cell>
          <table:table-cell table:style-name="ce1" office:value-type="string" calcext:value-type="string">
            <text:p>SEDE IBAGUE; JUAN HINCAPIE; BANCO DE LA REPUBLIC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IBG0534 / M2M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40131" calcext:value-type="float">
            <text:p>440131</text:p>
          </table:table-cell>
          <table:table-cell table:style-name="ce1" office:value-type="float" office:value="-7514736" calcext:value-type="float">
            <text:p>-751473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MUSEO DE ARTE PEM17 (test)</text:p>
          </table:table-cell>
          <table:table-cell table:style-name="ce1" office:value-type="string" calcext:value-type="string">
            <text:p>SEDE MOSQUERA; BANCO DE LA REPUBLIC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2036 / M2M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59703" calcext:value-type="float">
            <text:p>459703</text:p>
          </table:table-cell>
          <table:table-cell table:style-name="ce1" office:value-type="float" office:value="-7407341" calcext:value-type="float">
            <text:p>-740734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08:11:22" calcext:value-type="date">
            <text:p>14/07/26 08:11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MUSEO DE ARTE PEM18 (test)</text:p>
          </table:table-cell>
          <table:table-cell table:style-name="ce1" office:value-type="string" calcext:value-type="string">
            <text:p>SEDE MOSQUERA; BANCO DE LA REPUBLIC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2037 / M2M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59707" calcext:value-type="float">
            <text:p>459707</text:p>
          </table:table-cell>
          <table:table-cell table:style-name="ce1" office:value-type="float" office:value="-7407340892688610" calcext:value-type="float">
            <text:p>-7407340892688610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03:49:21" calcext:value-type="date">
            <text:p>14/07/26 03:4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MUSEO DEL ORO PEM15 (Test)</text:p>
          </table:table-cell>
          <table:table-cell table:style-name="ce1" office:value-type="string" calcext:value-type="string">
            <text:p>SEDE MOSQUERA; BANCO DE LA REPUBLIC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s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2038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01773653992500" calcext:value-type="float">
            <text:p>4601773653992500</text:p>
          </table:table-cell>
          <table:table-cell table:style-name="ce1" office:value-type="float" office:value="-7407201072685910" calcext:value-type="float">
            <text:p>-7407201072685910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3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NEIVA BIBLIOTECA (Test)</text:p>
          </table:table-cell>
          <table:table-cell table:style-name="ce1" office:value-type="string" calcext:value-type="string">
            <text:p>SEDE IBAGUE; JUAN HINCAPIE; BANCO DE LA REPUBLIC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IBG0537 / M2M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92625" calcext:value-type="float">
            <text:p>292625</text:p>
          </table:table-cell>
          <table:table-cell table:style-name="ce1" office:value-type="float" office:value="-7528818" calcext:value-type="float">
            <text:p>-752881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4:18:07" calcext:value-type="date">
            <text:p>14/07/26 14:18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PEREIRA AGENCIA CULTURAL (Test)</text:p>
          </table:table-cell>
          <table:table-cell table:style-name="ce1" office:value-type="string" calcext:value-type="string">
            <text:p>SEDE PEREIRA; DANIEL OCAMPO; BANCO DE LA REPUBLIC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PEI0531 / M2M</text:p>
          </table:table-cell>
          <table:table-cell table:style-name="ce1" office:value-type="float" office:value="8.93407610014965E+018" calcext:value-type="float">
            <text:p>8,9340761001496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1309" calcext:value-type="float">
            <text:p>481309</text:p>
          </table:table-cell>
          <table:table-cell table:style-name="ce1" office:value-type="float" office:value="-7569386" calcext:value-type="float">
            <text:p>-756938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09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QUIBDO GEN 1 (test)</text:p>
          </table:table-cell>
          <table:table-cell table:style-name="ce1" office:value-type="string" calcext:value-type="string">
            <text:p>SEDE MEDELLIN; BANCO DE LA REPUBLIC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744 / M2M</text:p>
          </table:table-cell>
          <table:table-cell table:style-name="ce1" office:value-type="float" office:value="8.93407610014978E+017" calcext:value-type="float">
            <text:p>8,93407610014978E+017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68947" calcext:value-type="float">
            <text:p>568947</text:p>
          </table:table-cell>
          <table:table-cell table:style-name="ce1" office:value-type="float" office:value="-7665104" calcext:value-type="float">
            <text:p>-766510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8-22T15:54:29" calcext:value-type="date">
            <text:p>22/08/23 15:54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SINCELEJO PEM01 (test)</text:p>
          </table:table-cell>
          <table:table-cell table:style-name="ce1" office:value-type="string" calcext:value-type="string">
            <text:p>SEDE MEDELLIN; BANCO DE LA REPUBLIC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748 / CLARO</text:p>
          </table:table-cell>
          <table:table-cell table:style-name="ce1" office:value-type="float" office:value="5.71017024033077E+016" calcext:value-type="float">
            <text:p>5,71017024033077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30196" calcext:value-type="float">
            <text:p>930196</text:p>
          </table:table-cell>
          <table:table-cell table:style-name="ce1" office:value-type="float" office:value="-7539461" calcext:value-type="float">
            <text:p>-753946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SINCELEJO PEM02 (test)</text:p>
          </table:table-cell>
          <table:table-cell table:style-name="ce1" office:value-type="string" calcext:value-type="string">
            <text:p>SEDE MEDELLIN; BANCO DE LA REPUBLIC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749 / CLARO</text:p>
          </table:table-cell>
          <table:table-cell table:style-name="ce1" office:value-type="float" office:value="5.71017024095817E+016" calcext:value-type="float">
            <text:p>5,71017024095817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30196" calcext:value-type="float">
            <text:p>930196</text:p>
          </table:table-cell>
          <table:table-cell table:style-name="ce1" office:value-type="float" office:value="-7539461" calcext:value-type="float">
            <text:p>-753946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9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TESORERIA BOGOTA PEM 06</text:p>
          </table:table-cell>
          <table:table-cell table:style-name="ce1" office:value-type="string" calcext:value-type="string">
            <text:p>SEDE MOSQUERA; BANCO DE LA REPUBLIC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AMF-25|Trifasico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2040 / M2M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1893" calcext:value-type="float">
            <text:p>461893</text:p>
          </table:table-cell>
          <table:table-cell table:style-name="ce1" office:value-type="float" office:value="-7409578" calcext:value-type="float">
            <text:p>-740957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8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BANCO DE LA REPUBLICA TESORERIA BOGOTA PEM 12</text:p>
          </table:table-cell>
          <table:table-cell table:style-name="ce1" office:value-type="string" calcext:value-type="string">
            <text:p>SEDE MOSQUERA; BANCO DE LA REPUBLIC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AMF-25|Trifasico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2041 / M2M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1893" calcext:value-type="float">
            <text:p>461893</text:p>
          </table:table-cell>
          <table:table-cell table:style-name="ce1" office:value-type="float" office:value="-7409578" calcext:value-type="float">
            <text:p>-740957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6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SUCURSAL IBAGUE PEM01</text:p>
          </table:table-cell>
          <table:table-cell table:style-name="ce1" office:value-type="string" calcext:value-type="string">
            <text:p>SEDE IBAGUE; JUAN HINCAPI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IBG0535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4442099" calcext:value-type="float">
            <text:p>44442099</text:p>
          </table:table-cell>
          <table:table-cell table:style-name="ce1" office:value-type="float" office:value="-752415136" calcext:value-type="float">
            <text:p>-75241513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ANCO DE LA REPUBLICA</text:p>
          </table:table-cell>
          <table:table-cell table:style-name="ce1" office:value-type="string" calcext:value-type="string">
            <text:p>SUCURSAL IBAGUE PEM02</text:p>
          </table:table-cell>
          <table:table-cell table:style-name="ce1" office:value-type="string" calcext:value-type="string">
            <text:p>SEDE IBAGUE; JUAN HINCAPI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IBG0536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4442099" calcext:value-type="float">
            <text:p>44442099</text:p>
          </table:table-cell>
          <table:table-cell table:style-name="ce1" office:value-type="float" office:value="-752415136" calcext:value-type="float">
            <text:p>-75241513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4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LUE TOWER PROPIEDAD HORIZONTAL</text:p>
          </table:table-cell>
          <table:table-cell table:style-name="ce1" office:value-type="string" calcext:value-type="string">
            <text:p>EDIFICIO BLUE TOWER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530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76303" calcext:value-type="float">
            <text:p>4676303</text:p>
          </table:table-cell>
          <table:table-cell table:style-name="ce1" office:value-type="float" office:value="-74055773" calcext:value-type="float">
            <text:p>-7405577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20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MP COMPANY SAS</text:p>
          </table:table-cell>
          <table:table-cell table:style-name="ce1" office:value-type="string" calcext:value-type="string">
            <text:p>ASOCELTA UNO GEN 1</text:p>
          </table:table-cell>
          <table:table-cell table:style-name="ce1" office:value-type="string" calcext:value-type="string">
            <text:p>SEDE MOSQUERA; RAFAEL TRIANA; BMP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958 / CLARO</text:p>
          </table:table-cell>
          <table:table-cell table:style-name="ce1" office:value-type="float" office:value="5.71015018046169E+016" calcext:value-type="float">
            <text:p>5,71015018046169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72072" calcext:value-type="float">
            <text:p>4772072</text:p>
          </table:table-cell>
          <table:table-cell table:style-name="ce1" office:value-type="float" office:value="-7417523" calcext:value-type="float">
            <text:p>-741752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BOG HOTEL OPERADORA SAS</text:p>
          </table:table-cell>
          <table:table-cell table:style-name="ce1" office:value-type="string" calcext:value-type="string">
            <text:p>BOG HOTEL</text:p>
          </table:table-cell>
          <table:table-cell table:style-name="ce1" office:value-type="string" calcext:value-type="string">
            <text:p>SEDE MOSQUERA; RAFAEL TRIANA; BOG HOTEL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117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70294" calcext:value-type="float">
            <text:p>4670294</text:p>
          </table:table-cell>
          <table:table-cell table:style-name="ce1" office:value-type="float" office:value="-7405116" calcext:value-type="float">
            <text:p>-740511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BURO 24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Exemys</text:p>
          </table:table-cell>
          <table:table-cell table:style-name="ce1" office:value-type="string" calcext:value-type="string">
            <text:p>Exemys Digital</text:p>
          </table:table-cell>
          <table:table-cell table:style-name="ce1" office:value-type="string" calcext:value-type="string">
            <text:p>Digital</text:p>
          </table:table-cell>
          <table:table-cell table:style-name="ce1" office:value-type="string" calcext:value-type="string">
            <text:p>BOG0604</text:p>
          </table:table-cell>
          <table:table-cell table:style-name="ce1" office:value-type="float" office:value="5.71011014028532E+016" calcext:value-type="float">
            <text:p>5,71011014028532E+016</text:p>
          </table:table-cell>
          <table:table-cell table:style-name="ce1" office:value-type="string" calcext:value-type="string">
            <text:p>Exemys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72537" calcext:value-type="float">
            <text:p>4672537</text:p>
          </table:table-cell>
          <table:table-cell table:style-name="ce1" office:value-type="float" office:value="-7412621" calcext:value-type="float">
            <text:p>-741262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1:00" calcext:value-type="date">
            <text:p>14/07/26 15:11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CARDIOVASCULAR DEL MAGDALENA - CENCAR S.A</text:p>
          </table:table-cell>
          <table:table-cell table:style-name="ce1" office:value-type="string" calcext:value-type="string">
            <text:p>CENCAR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756</text:p>
          </table:table-cell>
          <table:table-cell table:style-name="ce1" office:value-type="float" office:value="8.93407610014978E+018" calcext:value-type="float">
            <text:p>8,93407610014978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2372886" calcext:value-type="float">
            <text:p>112372886</text:p>
          </table:table-cell>
          <table:table-cell table:style-name="ce1" office:value-type="float" office:value="-742130834" calcext:value-type="float">
            <text:p>-74213083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CENTRO COMERCIAL AVES MARIA ACEIS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037</text:p>
          </table:table-cell>
          <table:table-cell table:style-name="ce1" office:value-type="float" office:value="8.93407510026198E+018" calcext:value-type="float">
            <text:p>8,93407510026198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48" calcext:value-type="float">
            <text:p>6148</text:p>
          </table:table-cell>
          <table:table-cell table:style-name="ce1" office:value-type="float" office:value="-75617" calcext:value-type="float">
            <text:p>-7561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5T07:41:57" calcext:value-type="date">
            <text:p>25/06/26 07:41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COMERCIAL PARQUE CENTRAL</text:p>
          </table:table-cell>
          <table:table-cell table:style-name="ce1" office:value-type="string" calcext:value-type="string">
            <text:p>CENTRO COMERCIAL PARQUE CENTRAL BARRANQUILLA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120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984199" calcext:value-type="float">
            <text:p>10984199</text:p>
          </table:table-cell>
          <table:table-cell table:style-name="ce1" office:value-type="float" office:value="-74789822" calcext:value-type="float">
            <text:p>-7478982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CENTRO COMERCIAL PASEO DE LA CASTELLANA CARTAGENA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121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10.4082</text:p>
          </table:table-cell>
          <table:table-cell table:style-name="ce1" office:value-type="float" office:value="-75515" calcext:value-type="float">
            <text:p>-7551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5-31T19:51:06" calcext:value-type="date">
            <text:p>31/05/23 19:51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COMERCIAL PLAZA DE LAS AMERICAS</text:p>
          </table:table-cell>
          <table:table-cell table:style-name="ce1" office:value-type="string" calcext:value-type="string">
            <text:p>CC PLAZA DE LAS AMÉRICAS PE #11 ETAPA 8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lazaAmericas-GEN01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BOG2466</text:p>
          </table:table-cell>
          <table:table-cell table:style-name="ce1" office:value-type="float" office:value="8.93407650000415E+018" calcext:value-type="float">
            <text:p>8,93407650000415E+018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18056" calcext:value-type="float">
            <text:p>4618056</text:p>
          </table:table-cell>
          <table:table-cell table:style-name="ce1" office:value-type="float" office:value="-741376045" calcext:value-type="float">
            <text:p>-74137604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3:52:40" calcext:value-type="date">
            <text:p>14/07/26 13:5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COMERCIAL PLAZA DE LAS AMERICAS</text:p>
          </table:table-cell>
          <table:table-cell table:style-name="ce1" office:value-type="string" calcext:value-type="string">
            <text:p>CC PLAZA DE LAS AMÉRICAS PE #13 ETAPA 8</text:p>
          </table:table-cell>
          <table:table-cell table:style-name="ce1" office:value-type="string" calcext:value-type="string">
            <text:p>RAFAEL TRIANA; SEDE MOSQUERA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lazaAmericas-GEN03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BOG2468</text:p>
          </table:table-cell>
          <table:table-cell table:style-name="ce1" office:value-type="float" office:value="8.93407650000415E+018" calcext:value-type="float">
            <text:p>8,93407650000415E+018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18056" calcext:value-type="float">
            <text:p>4618056</text:p>
          </table:table-cell>
          <table:table-cell table:style-name="ce1" office:value-type="float" office:value="-741376045" calcext:value-type="float">
            <text:p>-74137604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3:52:40" calcext:value-type="date">
            <text:p>14/07/26 13:5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COMERCIAL PLAZA DE LAS AMERICAS</text:p>
          </table:table-cell>
          <table:table-cell table:style-name="ce1" office:value-type="string" calcext:value-type="string">
            <text:p>CC PLAZA DE LAS AMÉRICAS PE #14 ETAPA 8</text:p>
          </table:table-cell>
          <table:table-cell table:style-name="ce1" office:value-type="string" calcext:value-type="string">
            <text:p>RAFAEL TRIANA; SEDE MOSQUERA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lazaAmericas-GEN04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BOG2469</text:p>
          </table:table-cell>
          <table:table-cell table:style-name="ce1" office:value-type="float" office:value="8.93407650000415E+018" calcext:value-type="float">
            <text:p>8,93407650000415E+018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18056" calcext:value-type="float">
            <text:p>4618056</text:p>
          </table:table-cell>
          <table:table-cell table:style-name="ce1" office:value-type="float" office:value="-741376045" calcext:value-type="float">
            <text:p>-74137604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3:52:40" calcext:value-type="date">
            <text:p>14/07/26 13:5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COMERCIAL SAN DIEGO</text:p>
          </table:table-cell>
          <table:table-cell table:style-name="ce1" office:value-type="string" calcext:value-type="string">
            <text:p>CENTRO COMERCIAL SAN DIEGO TORRE NORTE</text:p>
          </table:table-cell>
          <table:table-cell table:style-name="ce1" office:value-type="string" calcext:value-type="string">
            <text:p>SEDE MEDELLIN; TORRENORT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186 / MOVISTAR</text:p>
          </table:table-cell>
          <table:table-cell table:style-name="ce1" office:value-type="float" office:value="5.71017014084094E+016" calcext:value-type="float">
            <text:p>5,71017014084094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36168" calcext:value-type="float">
            <text:p>6236168</text:p>
          </table:table-cell>
          <table:table-cell table:style-name="ce1" office:value-type="float" office:value="-75569136" calcext:value-type="float">
            <text:p>-7556913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4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COMERCIAL SAN DIEGO</text:p>
          </table:table-cell>
          <table:table-cell table:style-name="ce1" office:value-type="string" calcext:value-type="string">
            <text:p>CENTRO COMERCIAL SAN DIEGO TORRE SUR</text:p>
          </table:table-cell>
          <table:table-cell table:style-name="ce1" office:value-type="string" calcext:value-type="string">
            <text:p>SEDE MEDELLIN; TORRESUR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185 / M2M</text:p>
          </table:table-cell>
          <table:table-cell table:style-name="ce1" office:value-type="float" office:value="8.93407610014978E+018" calcext:value-type="float">
            <text:p>8,93407610014978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3476" calcext:value-type="float">
            <text:p>623476</text:p>
          </table:table-cell>
          <table:table-cell table:style-name="ce1" office:value-type="float" office:value="-75568686" calcext:value-type="float">
            <text:p>-7556868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COMERCIAL SANTAFE PH</text:p>
          </table:table-cell>
          <table:table-cell table:style-name="ce1" office:value-type="string" calcext:value-type="string">
            <text:p>CC SANTAFE BRASIL GEN 03 ZONAS COMUNES</text:p>
          </table:table-cell>
          <table:table-cell table:style-name="ce1" office:value-type="string" calcext:value-type="string">
            <text:p>SEDE MOSQUERA; RAFAEL TRIANA; SANTAF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576</text:p>
          </table:table-cell>
          <table:table-cell table:style-name="ce1" office:value-type="string" calcext:value-type="string">
            <text:p>IP 172.16.10.103 netmask 255.255.255.0 gateIP 172.16.10.253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6224" calcext:value-type="float">
            <text:p>476224</text:p>
          </table:table-cell>
          <table:table-cell table:style-name="ce1" office:value-type="float" office:value="-7404642" calcext:value-type="float">
            <text:p>-7404642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5-28T12:51:50" calcext:value-type="date">
            <text:p>28/05/26 12:51</text:p>
          </table:table-cell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COMERCIAL SANTAFE PH</text:p>
          </table:table-cell>
          <table:table-cell table:style-name="ce1" office:value-type="string" calcext:value-type="string">
            <text:p>CC SANTAFE BRASIL GEN02 LEÑOS Y MANGOS</text:p>
          </table:table-cell>
          <table:table-cell table:style-name="ce1" office:value-type="string" calcext:value-type="string">
            <text:p>SEDE MOSQUERA; RAFAEL TRIANA; SANTAF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O575</text:p>
          </table:table-cell>
          <table:table-cell table:style-name="ce1" office:value-type="string" calcext:value-type="string">
            <text:p>IP 172.16.10.29 Netmask 255.255.255.0 GateID 172.16.10.253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6224" calcext:value-type="float">
            <text:p>476224</text:p>
          </table:table-cell>
          <table:table-cell table:style-name="ce1" office:value-type="float" office:value="-7404642" calcext:value-type="float">
            <text:p>-7404642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5-28T12:53:23" calcext:value-type="date">
            <text:p>28/05/26 12:53</text:p>
          </table:table-cell>
          <table:table-cell table:style-name="ce4" office:value-type="date" office:date-value="2026-07-14T15:10:2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COMERCIAL SANTAFE PH</text:p>
          </table:table-cell>
          <table:table-cell table:style-name="ce1" office:value-type="string" calcext:value-type="string">
            <text:p>CC SANTAFE BRASIL GEN1 PISOS Y LOCALES</text:p>
          </table:table-cell>
          <table:table-cell table:style-name="ce1" office:value-type="string" calcext:value-type="string">
            <text:p>SEDE MOSQUERA; RAFAEL TRIANA; SANTAF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574</text:p>
          </table:table-cell>
          <table:table-cell table:style-name="ce1" office:value-type="string" calcext:value-type="string">
            <text:p>IP 172.16.10.30 NetMask 255.255.255.0 GateIP 172.16.10.253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6224" calcext:value-type="float">
            <text:p>476224</text:p>
          </table:table-cell>
          <table:table-cell table:style-name="ce1" office:value-type="float" office:value="-7404642" calcext:value-type="float">
            <text:p>-7404642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5-28T12:53:34" calcext:value-type="date">
            <text:p>28/05/26 12:53</text:p>
          </table:table-cell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COMERCIAL SANTAFE PH</text:p>
          </table:table-cell>
          <table:table-cell table:style-name="ce1" office:value-type="string" calcext:value-type="string">
            <text:p>CC SANTAFE FRANCIA GEN01 SUB02</text:p>
          </table:table-cell>
          <table:table-cell table:style-name="ce1" office:value-type="string" calcext:value-type="string">
            <text:p>SEDE MOSQUERA; RAFAEL TRIANA; SANTAF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581</text:p>
          </table:table-cell>
          <table:table-cell table:style-name="ce1" office:value-type="string" calcext:value-type="string">
            <text:p>IP 172.16.10.20 NetMask 255.255.255.0 GateIP 172.16.10.253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62338" calcext:value-type="float">
            <text:p>4762338</text:p>
          </table:table-cell>
          <table:table-cell table:style-name="ce1" office:value-type="float" office:value="-74046338" calcext:value-type="float">
            <text:p>-7404633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COMERCIAL SANTAFE PH</text:p>
          </table:table-cell>
          <table:table-cell table:style-name="ce1" office:value-type="string" calcext:value-type="string">
            <text:p>CC SANTAFE FRANCIA GEN02 SUB02</text:p>
          </table:table-cell>
          <table:table-cell table:style-name="ce1" office:value-type="string" calcext:value-type="string">
            <text:p>SEDE MOSQUERA; RAFAEL TRIANA; SANTAF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579</text:p>
          </table:table-cell>
          <table:table-cell table:style-name="ce1" office:value-type="string" calcext:value-type="string">
            <text:p>IP 172.16.10.21 NetMask 255.255.255.0 GateIP 172.16.10.253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62305" calcext:value-type="float">
            <text:p>4762305</text:p>
          </table:table-cell>
          <table:table-cell table:style-name="ce1" office:value-type="float" office:value="-74046317" calcext:value-type="float">
            <text:p>-7404631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9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COMERCIAL SANTAFE PH</text:p>
          </table:table-cell>
          <table:table-cell table:style-name="ce1" office:value-type="string" calcext:value-type="string">
            <text:p>CC SANTAFE FRANCIA GEN03 SUB02</text:p>
          </table:table-cell>
          <table:table-cell table:style-name="ce1" office:value-type="string" calcext:value-type="string">
            <text:p>SEDE MOSQUERA; RAFAEL TRIANA; SANTAF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580</text:p>
          </table:table-cell>
          <table:table-cell table:style-name="ce1" office:value-type="string" calcext:value-type="string">
            <text:p>IP 172.16.10.22 Net Mask 255.255.255.0 GateIP 172.16.10.253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62472" calcext:value-type="float">
            <text:p>4762472</text:p>
          </table:table-cell>
          <table:table-cell table:style-name="ce1" office:value-type="float" office:value="-7404653" calcext:value-type="float">
            <text:p>-7404653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6-22T10:32:48" calcext:value-type="date">
            <text:p>22/06/26 10:32</text:p>
          </table:table-cell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COMERCIAL SANTAFE PH</text:p>
          </table:table-cell>
          <table:table-cell table:style-name="ce1" office:value-type="string" calcext:value-type="string">
            <text:p>CC SANTAFE ITALIA</text:p>
          </table:table-cell>
          <table:table-cell table:style-name="ce1" office:value-type="string" calcext:value-type="string">
            <text:p>SEDE MOSQUERA; RAFAEL TRIANA; SANTAF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584</text:p>
          </table:table-cell>
          <table:table-cell table:style-name="ce1" office:value-type="string" calcext:value-type="string">
            <text:p>IP 172.16.10.28 netmask 255.255.255.0 GateIP 172.16.10.253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62338" calcext:value-type="float">
            <text:p>4762338</text:p>
          </table:table-cell>
          <table:table-cell table:style-name="ce1" office:value-type="float" office:value="-74046338" calcext:value-type="float">
            <text:p>-74046338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5-29T08:58:08" calcext:value-type="date">
            <text:p>29/05/26 08:58</text:p>
          </table:table-cell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COMERCIAL SANTAFE PH</text:p>
          </table:table-cell>
          <table:table-cell table:style-name="ce1" office:value-type="string" calcext:value-type="string">
            <text:p>CC SANTAFE PERU GEN01 SUB03</text:p>
          </table:table-cell>
          <table:table-cell table:style-name="ce1" office:value-type="string" calcext:value-type="string">
            <text:p>SEDE MOSQUERA; RAFAEL TRIANA; SANTAF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578</text:p>
          </table:table-cell>
          <table:table-cell table:style-name="ce1" office:value-type="string" calcext:value-type="string">
            <text:p>IP 172.16.10.26 Netmask 255.255.255.0 GateIP 172.16.10.253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62305" calcext:value-type="float">
            <text:p>4762305</text:p>
          </table:table-cell>
          <table:table-cell table:style-name="ce1" office:value-type="float" office:value="-74046327" calcext:value-type="float">
            <text:p>-74046327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5-29T07:48:05" calcext:value-type="date">
            <text:p>29/05/26 07:48</text:p>
          </table:table-cell>
          <table:table-cell table:style-name="ce4" office:value-type="date" office:date-value="2026-07-14T15:09:56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COMERCIAL SANTAFE PH</text:p>
          </table:table-cell>
          <table:table-cell table:style-name="ce1" office:value-type="string" calcext:value-type="string">
            <text:p>CC SANTAFE PERU GEN02 SUB03</text:p>
          </table:table-cell>
          <table:table-cell table:style-name="ce1" office:value-type="string" calcext:value-type="string">
            <text:p>SEDE MOSQUERA; RAFAEL TRIANA; SANTAF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583</text:p>
          </table:table-cell>
          <table:table-cell table:style-name="ce1" office:value-type="string" calcext:value-type="string">
            <text:p>IP 172.16.10.27 NetMask 255.255.255.0 GateIP 172.16.10.1253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62305" calcext:value-type="float">
            <text:p>4762305</text:p>
          </table:table-cell>
          <table:table-cell table:style-name="ce1" office:value-type="float" office:value="-74046327" calcext:value-type="float">
            <text:p>-74046327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5-29T08:02:45" calcext:value-type="date">
            <text:p>29/05/26 08:02</text:p>
          </table:table-cell>
          <table:table-cell table:style-name="ce4" office:value-type="date" office:date-value="2026-07-06T13:02:41" calcext:value-type="date">
            <text:p>06/07/26 13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COMERCIAL SANTAFE PH</text:p>
          </table:table-cell>
          <table:table-cell table:style-name="ce1" office:value-type="string" calcext:value-type="string">
            <text:p>CC SANTAFE VENEZUELA GEN01 SUB01</text:p>
          </table:table-cell>
          <table:table-cell table:style-name="ce1" office:value-type="string" calcext:value-type="string">
            <text:p>SEDE MOSQUERA; RAFAEL TRIANA; SANTAF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585</text:p>
          </table:table-cell>
          <table:table-cell table:style-name="ce1" office:value-type="string" calcext:value-type="string">
            <text:p>IP 172.16.10.23 NetMask 255.255.255.0 GateIP 172.16.10.253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62305" calcext:value-type="float">
            <text:p>4762305</text:p>
          </table:table-cell>
          <table:table-cell table:style-name="ce1" office:value-type="float" office:value="-74046327" calcext:value-type="float">
            <text:p>-74046327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5-29T07:49:17" calcext:value-type="date">
            <text:p>29/05/26 07:49</text:p>
          </table:table-cell>
          <table:table-cell table:style-name="ce4" office:value-type="date" office:date-value="2026-07-14T15:09:56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COMERCIAL SANTAFE PH</text:p>
          </table:table-cell>
          <table:table-cell table:style-name="ce1" office:value-type="string" calcext:value-type="string">
            <text:p>CC SANTAFE VENEZUELA GEN02 SUB01</text:p>
          </table:table-cell>
          <table:table-cell table:style-name="ce1" office:value-type="string" calcext:value-type="string">
            <text:p>SEDE MOSQUERA; RAFAEL TRIANA; SANTAF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577</text:p>
          </table:table-cell>
          <table:table-cell table:style-name="ce1" office:value-type="string" calcext:value-type="string">
            <text:p>IP 172.16.10.24 NetMask 2.55.255.255.0 172.16.10.253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62305" calcext:value-type="float">
            <text:p>4762305</text:p>
          </table:table-cell>
          <table:table-cell table:style-name="ce1" office:value-type="float" office:value="-74046327" calcext:value-type="float">
            <text:p>-7404632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6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COMERCIAL SANTAFE PH</text:p>
          </table:table-cell>
          <table:table-cell table:style-name="ce1" office:value-type="string" calcext:value-type="string">
            <text:p>CC SANTAFE VENEZUELA GEN03 SUB01</text:p>
          </table:table-cell>
          <table:table-cell table:style-name="ce1" office:value-type="string" calcext:value-type="string">
            <text:p>SEDE MOSQUERA; RAFAEL TRIANA; SANTAF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582</text:p>
          </table:table-cell>
          <table:table-cell table:style-name="ce1" office:value-type="string" calcext:value-type="string">
            <text:p>IP 172.16.10.25 netMask 255.255.255.0 GateIp 172.16.10.253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62305" calcext:value-type="float">
            <text:p>4762305</text:p>
          </table:table-cell>
          <table:table-cell table:style-name="ce1" office:value-type="float" office:value="-74046327" calcext:value-type="float">
            <text:p>-74046327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5-29T08:52:40" calcext:value-type="date">
            <text:p>29/05/26 08:52</text:p>
          </table:table-cell>
          <table:table-cell table:style-name="ce4" office:value-type="date" office:date-value="2026-07-14T15:09:56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DE NEGOCIOS DIEZ</text:p>
          </table:table-cell>
          <table:table-cell table:style-name="ce1" office:value-type="string" calcext:value-type="string">
            <text:p>CENTRO DE NEGOCIOS DIEZ HOTEL GEN01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Exemys</text:p>
          </table:table-cell>
          <table:table-cell table:style-name="ce1" office:value-type="string" calcext:value-type="string">
            <text:p>Exemys Digital</text:p>
          </table:table-cell>
          <table:table-cell table:style-name="ce1" office:value-type="string" calcext:value-type="string">
            <text:p>Digital</text:p>
          </table:table-cell>
          <table:table-cell table:style-name="ce1" office:value-type="string" calcext:value-type="string">
            <text:p>MED190</text:p>
          </table:table-cell>
          <table:table-cell/>
          <table:table-cell table:style-name="ce1" office:value-type="string" calcext:value-type="string">
            <text:p>Exemys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9332" calcext:value-type="float">
            <text:p>6209332</text:p>
          </table:table-cell>
          <table:table-cell table:style-name="ce1" office:value-type="float" office:value="-7556558" calcext:value-type="float">
            <text:p>-755655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1:00" calcext:value-type="date">
            <text:p>14/07/26 15:11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EMPRESARIAL CIUDAD DEL RIO</text:p>
          </table:table-cell>
          <table:table-cell table:style-name="ce1" office:value-type="string" calcext:value-type="string">
            <text:p>GENERADOR FIC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mkit-1|CarterpillarEMCP-4.2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Med789</text:p>
          </table:table-cell>
          <table:table-cell table:style-name="ce1" office:value-type="float" office:value="8.93407610075474E+018" calcext:value-type="float">
            <text:p>8,93407610075474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242662" calcext:value-type="float">
            <text:p>62242662</text:p>
          </table:table-cell>
          <table:table-cell table:style-name="ce1" office:value-type="float" office:value="-755764741" calcext:value-type="float">
            <text:p>-755764741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6-19T14:32:35" calcext:value-type="date">
            <text:p>19/06/26 14:32</text:p>
          </table:table-cell>
          <table:table-cell table:style-name="ce4" office:value-type="date" office:date-value="2026-07-14T15:08:54" calcext:value-type="date">
            <text:p>14/07/26 15:08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EMPRESARIAL DANN FINANCIERA HOTEL DANN CARLTON PH</text:p>
          </table:table-cell>
          <table:table-cell table:style-name="ce1" office:value-type="string" calcext:value-type="string">
            <text:p>CENTRO EMPRESARIAL DANN FINANCIERA HOTEL DANN CARLTON P.H.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194</text:p>
          </table:table-cell>
          <table:table-cell table:style-name="ce1" office:value-type="float" office:value="5.71017024084094E+016" calcext:value-type="float">
            <text:p>5,71017024084094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7024" calcext:value-type="float">
            <text:p>6207024</text:p>
          </table:table-cell>
          <table:table-cell table:style-name="ce1" office:value-type="float" office:value="-75570823" calcext:value-type="float">
            <text:p>-7557082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EMPRESARIAL POTOSI</text:p>
          </table:table-cell>
          <table:table-cell table:style-name="ce1" office:value-type="string" calcext:value-type="string">
            <text:p>CENTRO COMERCIAL POTOSI</text:p>
          </table:table-cell>
          <table:table-cell table:style-name="ce1" office:value-type="string" calcext:value-type="string">
            <text:p>SEDE MOSQUERA; CC POTOSI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573</text:p>
          </table:table-cell>
          <table:table-cell table:style-name="ce1" office:value-type="float" office:value="8.93407510025853E+018" calcext:value-type="float">
            <text:p>8,93407510025853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10847" calcext:value-type="float">
            <text:p>4810847</text:p>
          </table:table-cell>
          <table:table-cell table:style-name="ce1" office:value-type="float" office:value="-73949661" calcext:value-type="float">
            <text:p>-7394966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LOGISTICO DE OCCIDENTE - PROPIEDAD HORIZONTAL</text:p>
          </table:table-cell>
          <table:table-cell table:style-name="ce1" office:value-type="string" calcext:value-type="string">
            <text:p>CENTRO LOGISTICO DE OCCIDENTE MTS</text:p>
          </table:table-cell>
          <table:table-cell table:style-name="ce1" office:value-type="string" calcext:value-type="string">
            <text:p>SEDE MOSQUERA; RAFAEL TRIANA; LOGISTIC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607</text:p>
          </table:table-cell>
          <table:table-cell table:style-name="ce1" office:value-type="float" office:value="8.93407520000019E+018" calcext:value-type="float">
            <text:p>8,93407520000019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77555" calcext:value-type="float">
            <text:p>4677555</text:p>
          </table:table-cell>
          <table:table-cell table:style-name="ce1" office:value-type="float" office:value="-74163914" calcext:value-type="float">
            <text:p>-7416391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NTRO LOGISTICO DE OCCIDENTE - PROPIEDAD HORIZONTAL</text:p>
          </table:table-cell>
          <table:table-cell table:style-name="ce1" office:value-type="string" calcext:value-type="string">
            <text:p>PARQUE EMPRESARIAL LA ESTANCIA MTS</text:p>
          </table:table-cell>
          <table:table-cell table:style-name="ce1" office:value-type="string" calcext:value-type="string">
            <text:p>SEDE MOSQUERA; RAFAEL TRIANA; ESTANCI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OVISTAR M2M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77534" calcext:value-type="float">
            <text:p>4677534</text:p>
          </table:table-cell>
          <table:table-cell table:style-name="ce1" office:value-type="float" office:value="-74163914" calcext:value-type="float">
            <text:p>-7416391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4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RAMICA SAN LORENZO INDUSTRIAL DE COLOMBIA S.A</text:p>
          </table:table-cell>
          <table:table-cell table:style-name="ce1" office:value-type="string" calcext:value-type="string">
            <text:p>CERAMICA SAN LORENZO BOMBA CONTRA INCENDIOS</text:p>
          </table:table-cell>
          <table:table-cell table:style-name="ce1" office:value-type="string" calcext:value-type="string">
            <text:p>SEDE MOSQUERA; RAFAEL TRIANA; SAN LORENZ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 BCI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609</text:p>
          </table:table-cell>
          <table:table-cell table:style-name="ce1" office:value-type="float" office:value="8.93407720000166E+018" calcext:value-type="float">
            <text:p>8,93407720000166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927" calcext:value-type="float">
            <text:p>4927</text:p>
          </table:table-cell>
          <table:table-cell table:style-name="ce1" office:value-type="float" office:value="-73938" calcext:value-type="float">
            <text:p>-7393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14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RAMICA SAN LORENZO INDUSTRIAL DE COLOMBIA S.A</text:p>
          </table:table-cell>
          <table:table-cell table:style-name="ce1" office:value-type="string" calcext:value-type="string">
            <text:p>CERAMICA SAN LORENZO GEN01</text:p>
          </table:table-cell>
          <table:table-cell table:style-name="ce1" office:value-type="string" calcext:value-type="string">
            <text:p>SEDE MOSQUERA; RAFAEL TRIANA; SAN LORENZO; REPORT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613</text:p>
          </table:table-cell>
          <table:table-cell table:style-name="ce1" office:value-type="float" office:value="5.71015020056227E+016" calcext:value-type="float">
            <text:p>5,71015020056227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925673" calcext:value-type="float">
            <text:p>4925673</text:p>
          </table:table-cell>
          <table:table-cell table:style-name="ce1" office:value-type="float" office:value="-73938526" calcext:value-type="float">
            <text:p>-7393852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7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RAMICA SAN LORENZO INDUSTRIAL DE COLOMBIA S.A</text:p>
          </table:table-cell>
          <table:table-cell table:style-name="ce1" office:value-type="string" calcext:value-type="string">
            <text:p>CERAMICA SAN LORENZO GEN02</text:p>
          </table:table-cell>
          <table:table-cell table:style-name="ce1" office:value-type="string" calcext:value-type="string">
            <text:p>SEDE MOSQUERA; RAFAEL TRIANA; SAN LORENZO; REPORT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608</text:p>
          </table:table-cell>
          <table:table-cell table:style-name="ce1" office:value-type="float" office:value="5.71015020056227E+016" calcext:value-type="float">
            <text:p>5,71015020056227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925673" calcext:value-type="float">
            <text:p>4925673</text:p>
          </table:table-cell>
          <table:table-cell table:style-name="ce1" office:value-type="float" office:value="-73938526" calcext:value-type="float">
            <text:p>-7393852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8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RAMICA SAN LORENZO INDUSTRIAL DE COLOMBIA S.A</text:p>
          </table:table-cell>
          <table:table-cell table:style-name="ce1" office:value-type="string" calcext:value-type="string">
            <text:p>CERAMICA SAN LORENZO HORNO 3</text:p>
          </table:table-cell>
          <table:table-cell table:style-name="ce1" office:value-type="string" calcext:value-type="string">
            <text:p>SEDE MOSQUERA; RAFAEL TRIANA; SAN LORENZ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610</text:p>
          </table:table-cell>
          <table:table-cell table:style-name="ce1" office:value-type="float" office:value="8.93407720000166E+018" calcext:value-type="float">
            <text:p>8,93407720000166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927" calcext:value-type="float">
            <text:p>4927</text:p>
          </table:table-cell>
          <table:table-cell table:style-name="ce1" office:value-type="float" office:value="-73938" calcext:value-type="float">
            <text:p>-7393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7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RAMICA SAN LORENZO INDUSTRIAL DE COLOMBIA S.A</text:p>
          </table:table-cell>
          <table:table-cell table:style-name="ce1" office:value-type="string" calcext:value-type="string">
            <text:p>CERAMICA SAN LORENZO HORNO 4</text:p>
          </table:table-cell>
          <table:table-cell table:style-name="ce1" office:value-type="string" calcext:value-type="string">
            <text:p>SEDE MOSQUERA; RAFAEL TRIANA; SAN LORENZ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611</text:p>
          </table:table-cell>
          <table:table-cell table:style-name="ce1" office:value-type="float" office:value="8.93407720000166E+018" calcext:value-type="float">
            <text:p>8,93407720000166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927" calcext:value-type="float">
            <text:p>4927</text:p>
          </table:table-cell>
          <table:table-cell table:style-name="ce1" office:value-type="float" office:value="-73938" calcext:value-type="float">
            <text:p>-7393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2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ERAMICA SAN LORENZO INDUSTRIAL DE COLOMBIA S.A</text:p>
          </table:table-cell>
          <table:table-cell table:style-name="ce1" office:value-type="string" calcext:value-type="string">
            <text:p>CERAMICA SAN LORENZO HORNO BICANAL</text:p>
          </table:table-cell>
          <table:table-cell table:style-name="ce1" office:value-type="string" calcext:value-type="string">
            <text:p>SEDE MOSQUERA; RAFAEL TRIANA; SAN LORENZ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4084094E+016" calcext:value-type="float">
            <text:p>5,71017024084094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927" calcext:value-type="float">
            <text:p>4927</text:p>
          </table:table-cell>
          <table:table-cell table:style-name="ce1" office:value-type="float" office:value="-73938" calcext:value-type="float">
            <text:p>-7393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08-27T11:48:32" calcext:value-type="date">
            <text:p>27/08/24 11:48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IMENTO S.A.S</text:p>
          </table:table-cell>
          <table:table-cell table:style-name="ce1" office:value-type="string" calcext:value-type="string">
            <text:p>CC ARKADIA COMERCIO 1 GEN01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650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11381" calcext:value-type="float">
            <text:p>6211381</text:p>
          </table:table-cell>
          <table:table-cell table:style-name="ce1" office:value-type="float" office:value="-75594709" calcext:value-type="float">
            <text:p>-7559470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IMENTO S.A.S</text:p>
          </table:table-cell>
          <table:table-cell table:style-name="ce1" office:value-type="string" calcext:value-type="string">
            <text:p>CC ARKADIA COMERCIO 1 GEN02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651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11381" calcext:value-type="float">
            <text:p>6211381</text:p>
          </table:table-cell>
          <table:table-cell table:style-name="ce1" office:value-type="float" office:value="-75594709" calcext:value-type="float">
            <text:p>-7559470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IMENTO S.A.S</text:p>
          </table:table-cell>
          <table:table-cell table:style-name="ce1" office:value-type="string" calcext:value-type="string">
            <text:p>CC ARKADIA COMERCIO 2 GEN01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654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11381" calcext:value-type="float">
            <text:p>6211381</text:p>
          </table:table-cell>
          <table:table-cell table:style-name="ce1" office:value-type="float" office:value="-75594709" calcext:value-type="float">
            <text:p>-7559470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6T11:52:29" calcext:value-type="date">
            <text:p>26/06/26 11:5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IMENTO S.A.S</text:p>
          </table:table-cell>
          <table:table-cell table:style-name="ce1" office:value-type="string" calcext:value-type="string">
            <text:p>CC ARKADIA COMERCIO 2 GEN02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655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11381" calcext:value-type="float">
            <text:p>6211381</text:p>
          </table:table-cell>
          <table:table-cell table:style-name="ce1" office:value-type="float" office:value="-75594709" calcext:value-type="float">
            <text:p>-7559470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IMENTO S.A.S</text:p>
          </table:table-cell>
          <table:table-cell table:style-name="ce1" office:value-type="string" calcext:value-type="string">
            <text:p>CC ARKADIA SERVICIOS COMUNES GEN01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652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11381" calcext:value-type="float">
            <text:p>6211381</text:p>
          </table:table-cell>
          <table:table-cell table:style-name="ce1" office:value-type="float" office:value="-75594709" calcext:value-type="float">
            <text:p>-7559470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IMENTO S.A.S</text:p>
          </table:table-cell>
          <table:table-cell table:style-name="ce1" office:value-type="string" calcext:value-type="string">
            <text:p>CC ARKADIA SERVICIOS COMUNES GEN02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653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11381" calcext:value-type="float">
            <text:p>6211381</text:p>
          </table:table-cell>
          <table:table-cell table:style-name="ce1" office:value-type="float" office:value="-75594709" calcext:value-type="float">
            <text:p>-7559470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8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LINICA DE LA COSTA</text:p>
          </table:table-cell>
          <table:table-cell table:style-name="ce1" office:value-type="string" calcext:value-type="string">
            <text:p>CLINICA DE LA COSTA GEN01 400kW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125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02408" calcext:value-type="float">
            <text:p>11002408</text:p>
          </table:table-cell>
          <table:table-cell table:style-name="ce1" office:value-type="float" office:value="-748146" calcext:value-type="float">
            <text:p>-74814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LINICA DE LA COSTA</text:p>
          </table:table-cell>
          <table:table-cell table:style-name="ce1" office:value-type="string" calcext:value-type="string">
            <text:p>CLINICA DE LA COSTA GEN02 600kW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126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02408" calcext:value-type="float">
            <text:p>11002408</text:p>
          </table:table-cell>
          <table:table-cell table:style-name="ce1" office:value-type="float" office:value="-748146" calcext:value-type="float">
            <text:p>-74814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4-14T18:23:35" calcext:value-type="date">
            <text:p>14/04/23 18:2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LINICA DE LA COSTA</text:p>
          </table:table-cell>
          <table:table-cell table:style-name="ce1" office:value-type="string" calcext:value-type="string">
            <text:p>CLINICA DE LA COSTA GEN03 500kW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127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19066" calcext:value-type="float">
            <text:p>1119066</text:p>
          </table:table-cell>
          <table:table-cell table:style-name="ce1" office:value-type="float" office:value="-7420895" calcext:value-type="float">
            <text:p>-742089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14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LINICA DE MARLY S A</text:p>
          </table:table-cell>
          <table:table-cell table:style-name="ce1" office:value-type="string" calcext:value-type="string">
            <text:p>CLINICA MARLY GEN 01</text:p>
          </table:table-cell>
          <table:table-cell table:style-name="ce1" office:value-type="string" calcext:value-type="string">
            <text:p>SEDE MOSQUER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617</text:p>
          </table:table-cell>
          <table:table-cell table:style-name="ce1" office:value-type="float" office:value="5710110130945" calcext:value-type="float">
            <text:p>5710110130945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36865" calcext:value-type="float">
            <text:p>4636865</text:p>
          </table:table-cell>
          <table:table-cell table:style-name="ce1" office:value-type="float" office:value="-74064109" calcext:value-type="float">
            <text:p>-7406410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LINICA MARLY CHIA</text:p>
          </table:table-cell>
          <table:table-cell table:style-name="ce1" office:value-type="string" calcext:value-type="string">
            <text:p>CLINICA MARLY CHIA JORGE CAVELIER GAVIRIA GEN 01</text:p>
          </table:table-cell>
          <table:table-cell table:style-name="ce1" office:value-type="string" calcext:value-type="string">
            <text:p>SEDE MOSQUERA; RAFAEL TRIANA; Camkit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mkit-1|ClinicaMarlyGEN-01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BOG1848</text:p>
          </table:table-cell>
          <table:table-cell/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4.8755</text:p>
          </table:table-cell>
          <table:table-cell table:style-name="ce1" office:value-type="float" office:value="-74037204" calcext:value-type="float">
            <text:p>-7403720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1:01" calcext:value-type="date">
            <text:p>14/07/26 15:11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LINICA MARLY CHIA</text:p>
          </table:table-cell>
          <table:table-cell table:style-name="ce1" office:value-type="string" calcext:value-type="string">
            <text:p>CLINICA MARLY CHIA JORGE CAVELIER GAVIRIA GEN 02</text:p>
          </table:table-cell>
          <table:table-cell table:style-name="ce1" office:value-type="string" calcext:value-type="string">
            <text:p>SEDE MOSQUERA; RAFAEL TRIANA; Camkit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mkit-1|ClinicaMarlyGEN-02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BOG1849</text:p>
          </table:table-cell>
          <table:table-cell/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4.8755</text:p>
          </table:table-cell>
          <table:table-cell table:style-name="ce1" office:value-type="float" office:value="-74037204" calcext:value-type="float">
            <text:p>-7403720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1:01" calcext:value-type="date">
            <text:p>14/07/26 15:11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CLINICA OFTALMOLOGICA SAN DIEGO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199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280558738984" calcext:value-type="float">
            <text:p>62280558738984</text:p>
          </table:table-cell>
          <table:table-cell table:style-name="ce1" office:value-type="float" office:value="-75570659634416" calcext:value-type="float">
            <text:p>-7557065963441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CLINICA VIDA PLENA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71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11.1939</text:p>
          </table:table-cell>
          <table:table-cell table:style-name="ce1" office:value-type="float" office:value="-74817" calcext:value-type="float">
            <text:p>-7481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1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LLIERS INTERNATIONAL COLOMBIA SA</text:p>
          </table:table-cell>
          <table:table-cell table:style-name="ce1" office:value-type="string" calcext:value-type="string">
            <text:p>EDIFICIO FIC92 11 - CUMMINS KTA38G14 KW 1000 SN 24435461</text:p>
          </table:table-cell>
          <table:table-cell table:style-name="ce1" office:value-type="string" calcext:value-type="string">
            <text:p>SEDE MOSQUERA; NELSON ROMERO; CAMKIT; KTA3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mkit-1|Análogo</text:p>
          </table:table-cell>
          <table:table-cell table:style-name="ce1" office:value-type="string" calcext:value-type="string">
            <text:p>Camkit1 Analogo</text:p>
          </table:table-cell>
          <table:table-cell table:style-name="ce1" office:value-type="string" calcext:value-type="string">
            <text:p>BOG1901 / M2M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72238087393330" calcext:value-type="float">
            <text:p>4672238087393330</text:p>
          </table:table-cell>
          <table:table-cell table:style-name="ce1" office:value-type="float" office:value="-740484970592002" calcext:value-type="float">
            <text:p>-74048497059200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1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LLIERS INTERNATIONAL COLOMBIA SA</text:p>
          </table:table-cell>
          <table:table-cell table:style-name="ce1" office:value-type="string" calcext:value-type="string">
            <text:p>EDIFICIO FIC92 11 - CUMMINS QSX15G9 KW 500 SN 80075596</text:p>
          </table:table-cell>
          <table:table-cell table:style-name="ce1" office:value-type="string" calcext:value-type="string">
            <text:p>SEDE MOSQUERA; NELSON ROMERO; CAMKIT; QSX15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mkit-1|Análogo</text:p>
          </table:table-cell>
          <table:table-cell table:style-name="ce1" office:value-type="string" calcext:value-type="string">
            <text:p>Camkit1 Analogo</text:p>
          </table:table-cell>
          <table:table-cell table:style-name="ce1" office:value-type="string" calcext:value-type="string">
            <text:p>BOG1900 / M2M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72238087393330" calcext:value-type="float">
            <text:p>4672238087393330</text:p>
          </table:table-cell>
          <table:table-cell table:style-name="ce1" office:value-type="float" office:value="-740484970592002" calcext:value-type="float">
            <text:p>-74048497059200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08" calcext:value-type="date">
            <text:p>14/07/26 15:09</text:p>
          </table:table-cell>
          <table:table-cell/>
        </table:table-row>
        <table:table-row table:style-name="ro6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MERCIAL ALLAN S A S</text:p>
          </table:table-cell>
          <table:table-cell table:style-name="ce1" office:value-type="string" calcext:value-type="string">
            <text:p>HELADOS POPSY 900 KW</text:p>
          </table:table-cell>
          <table:table-cell table:style-name="ce1" office:value-type="string" calcext:value-type="string">
            <text:p>SEDE MOSQUERA; RAFAEL TRIANA; NELSON ROMERO; CAMKIT2; HELADOS POPSY 900KW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CC2.X-3.X|Trifasico|24VDC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BOG2232</text:p>
          </table:table-cell>
          <table:table-cell table:style-name="ce1" office:value-type="float" office:value="8.93407650000415E+018" calcext:value-type="float">
            <text:p>8,93407650000415E+018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3075487" calcext:value-type="float">
            <text:p>63075487</text:p>
          </table:table-cell>
          <table:table-cell table:style-name="ce1" office:value-type="float" office:value="-754597279" calcext:value-type="float">
            <text:p>-75459727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5-10-04T01:20:33" calcext:value-type="date">
            <text:p>04/10/25 01:2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MFENALCO CARTAGENA</text:p>
          </table:table-cell>
          <table:table-cell table:style-name="ce1" office:value-type="string" calcext:value-type="string">
            <text:p>TECNOLOGICO COMFENALCO CARTAGENA GEN01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370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05262" calcext:value-type="float">
            <text:p>10405262</text:p>
          </table:table-cell>
          <table:table-cell table:style-name="ce1" office:value-type="float" office:value="-7550509" calcext:value-type="float">
            <text:p>-755050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MPAÑIA DE PUERTOS ASOCIADOS</text:p>
          </table:table-cell>
          <table:table-cell table:style-name="ce1" office:value-type="string" calcext:value-type="string">
            <text:p>COMPAS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139</text:p>
          </table:table-cell>
          <table:table-cell table:style-name="ce1" office:value-type="float" office:value="5.71011013127792E+016" calcext:value-type="float">
            <text:p>5,71011013127792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26309" calcext:value-type="float">
            <text:p>11026309</text:p>
          </table:table-cell>
          <table:table-cell table:style-name="ce1" office:value-type="float" office:value="-74803867" calcext:value-type="float">
            <text:p>-7480386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1-28T03:10:35" calcext:value-type="date">
            <text:p>28/01/23 03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MPAÑIA HOTELERA CARTAGENA DE INDIAS S.A.</text:p>
          </table:table-cell>
          <table:table-cell table:style-name="ce1" office:value-type="string" calcext:value-type="string">
            <text:p>HOTEL HILTON GEN01 1000kW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141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394242" calcext:value-type="float">
            <text:p>10394242</text:p>
          </table:table-cell>
          <table:table-cell table:style-name="ce1" office:value-type="float" office:value="-7556002" calcext:value-type="float">
            <text:p>-755600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MPAÑIA HOTELERA CARTAGENA DE INDIAS S.A.</text:p>
          </table:table-cell>
          <table:table-cell table:style-name="ce1" office:value-type="string" calcext:value-type="string">
            <text:p>HOTEL HILTON GEN02 800kW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142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394242" calcext:value-type="float">
            <text:p>10394242</text:p>
          </table:table-cell>
          <table:table-cell table:style-name="ce1" office:value-type="float" office:value="-7556002" calcext:value-type="float">
            <text:p>-755600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3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COMPLEJO COMERCIAL PIAZZA BELLA ACEIS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5030877E+016" calcext:value-type="float">
            <text:p>5,71017025030877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3194" calcext:value-type="float">
            <text:p>6203194</text:p>
          </table:table-cell>
          <table:table-cell table:style-name="ce1" office:value-type="float" office:value="-75559466" calcext:value-type="float">
            <text:p>-7555946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1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MPLEJO COMERCIAL ZONA 2</text:p>
          </table:table-cell>
          <table:table-cell table:style-name="ce1" office:value-type="string" calcext:value-type="string">
            <text:p>COMPLEJO COMERCIAL ZONA 2 SUR PH ACEIS</text:p>
          </table:table-cell>
          <table:table-cell table:style-name="ce1" office:value-type="string" calcext:value-type="string">
            <text:p>SEDE MEDELLIN; ZONA2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211</text:p>
          </table:table-cell>
          <table:table-cell table:style-name="ce1" office:value-type="float" office:value="8.93407720000166E+018" calcext:value-type="float">
            <text:p>8,93407720000166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98221" calcext:value-type="float">
            <text:p>6198221</text:p>
          </table:table-cell>
          <table:table-cell table:style-name="ce1" office:value-type="float" office:value="-75565494" calcext:value-type="float">
            <text:p>-7556549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4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MPLEJO PORTO AZUL</text:p>
          </table:table-cell>
          <table:table-cell table:style-name="ce1" office:value-type="string" calcext:value-type="string">
            <text:p>COMPLEJO PORTO AZUL TORRE SABBAG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143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15942" calcext:value-type="float">
            <text:p>11015942</text:p>
          </table:table-cell>
          <table:table-cell table:style-name="ce1" office:value-type="float" office:value="-74846167" calcext:value-type="float">
            <text:p>-7484616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03-16T10:29:23" calcext:value-type="date">
            <text:p>16/03/24 10:2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MPLEJO PORTO AZUL</text:p>
          </table:table-cell>
          <table:table-cell table:style-name="ce1" office:value-type="string" calcext:value-type="string">
            <text:p>COMPLEJO PORTO AZUL UNIDAD MEDICA</text:p>
          </table:table-cell>
          <table:table-cell table:style-name="ce1" office:value-type="string" calcext:value-type="string">
            <text:p>SEDE BARRANQUILLA; UNIDAD MEDIC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144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14494" calcext:value-type="float">
            <text:p>11014494</text:p>
          </table:table-cell>
          <table:table-cell table:style-name="ce1" office:value-type="float" office:value="-7484509" calcext:value-type="float">
            <text:p>-748450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7-28T14:09:48" calcext:value-type="date">
            <text:p>28/07/23 14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MWARE S A</text:p>
          </table:table-cell>
          <table:table-cell table:style-name="ce1" office:value-type="string" calcext:value-type="string">
            <text:p>COMWARE 97</text:p>
          </table:table-cell>
          <table:table-cell table:style-name="ce1" office:value-type="string" calcext:value-type="string">
            <text:p>SEDE MOSQUERA; NOTIFICACIÓ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675</text:p>
          </table:table-cell>
          <table:table-cell table:style-name="ce1" office:value-type="float" office:value="8.93407610014978E+018" calcext:value-type="float">
            <text:p>8,93407610014978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16041849625" calcext:value-type="float">
            <text:p>46816041849625</text:p>
          </table:table-cell>
          <table:table-cell table:style-name="ce1" office:value-type="float" office:value="-74046784043312" calcext:value-type="float">
            <text:p>-7404678404331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NJUNTO CONTINENTAL BOGOTA</text:p>
          </table:table-cell>
          <table:table-cell table:style-name="ce1" office:value-type="string" calcext:value-type="string">
            <text:p>CONJUNTO CONTINENTAL BOGOTA PH 135kW</text:p>
          </table:table-cell>
          <table:table-cell table:style-name="ce1" office:value-type="string" calcext:value-type="string">
            <text:p>SEDE MOSQUER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715</text:p>
          </table:table-cell>
          <table:table-cell table:style-name="ce1" office:value-type="float" office:value="5.71015019120933E+016" calcext:value-type="float">
            <text:p>5,71015019120933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00859" calcext:value-type="float">
            <text:p>4600859</text:p>
          </table:table-cell>
          <table:table-cell table:style-name="ce1" office:value-type="float" office:value="-74070404" calcext:value-type="float">
            <text:p>-7407040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4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NJUNTO CONTINENTAL BOGOTA</text:p>
          </table:table-cell>
          <table:table-cell table:style-name="ce1" office:value-type="string" calcext:value-type="string">
            <text:p>CUMMINS NTA855-G6 KW 275 SN: 36073020</text:p>
          </table:table-cell>
          <table:table-cell table:style-name="ce1" office:value-type="string" calcext:value-type="string">
            <text:p>SEDE MOSQUERA; NELSON ROMERO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BOG0682</text:p>
          </table:table-cell>
          <table:table-cell/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01087" calcext:value-type="float">
            <text:p>4601087</text:p>
          </table:table-cell>
          <table:table-cell table:style-name="ce1" office:value-type="float" office:value="-74070764" calcext:value-type="float">
            <text:p>-7407076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0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NJUNTO INMOBILIARIO SAOPAULO</text:p>
          </table:table-cell>
          <table:table-cell table:style-name="ce1" office:value-type="string" calcext:value-type="string">
            <text:p>CONJUNTO INMOBILIARIO SAO PAULO PLAZA TORRE 2 ACEIS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228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26746" calcext:value-type="float">
            <text:p>6226746</text:p>
          </table:table-cell>
          <table:table-cell table:style-name="ce1" office:value-type="float" office:value="-75568518" calcext:value-type="float">
            <text:p>-7556851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NJUNTO RESIDENCIAL CASTELO APARTAMENTOS PH</text:p>
          </table:table-cell>
          <table:table-cell table:style-name="ce1" office:value-type="string" calcext:value-type="string">
            <text:p>CONJUNTO RESIDENCIAL CASTELO GEN01</text:p>
          </table:table-cell>
          <table:table-cell table:style-name="ce1" office:value-type="string" calcext:value-type="string">
            <text:p>SEDE MOSQUERA; RAFAEL TRIANA; Camkit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ModbusGenset PCC 1301/1.x/0500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BOG1866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492269" calcext:value-type="float">
            <text:p>46492269</text:p>
          </table:table-cell>
          <table:table-cell table:style-name="ce1" office:value-type="float" office:value="-741434971" calcext:value-type="float">
            <text:p>-74143497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16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CONJUNTO RESIDENCIAL CATALEJO ALFA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239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27" calcext:value-type="float">
            <text:p>6227</text:p>
          </table:table-cell>
          <table:table-cell table:style-name="ce1" office:value-type="float" office:value="-75601" calcext:value-type="float">
            <text:p>-7560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5T08:51:19" calcext:value-type="date">
            <text:p>25/06/26 08:51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CONJUNTO RESIDENCIAL LOS ROBLES</text:p>
          </table:table-cell>
          <table:table-cell table:style-name="ce1" office:value-type="string" calcext:value-type="string">
            <text:p>SEDE BARRANQUILLA; ROBLE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146</text:p>
          </table:table-cell>
          <table:table-cell table:style-name="ce1" office:value-type="float" office:value="5.71015018046169E+016" calcext:value-type="float">
            <text:p>5,71015018046169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24" calcext:value-type="float">
            <text:p>11024</text:p>
          </table:table-cell>
          <table:table-cell table:style-name="ce1" office:value-type="float" office:value="-74859" calcext:value-type="float">
            <text:p>-7485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09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CONJUNTO RESIDENCIAL LUCCA PH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243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73314" calcext:value-type="float">
            <text:p>6173314</text:p>
          </table:table-cell>
          <table:table-cell table:style-name="ce1" office:value-type="float" office:value="-75577679" calcext:value-type="float">
            <text:p>-7557767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4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NSORCIO ELLISDON - ARPRO</text:p>
          </table:table-cell>
          <table:table-cell table:style-name="ce1" office:value-type="string" calcext:value-type="string">
            <text:p>ATRIO GEN01</text:p>
          </table:table-cell>
          <table:table-cell table:style-name="ce1" office:value-type="string" calcext:value-type="string">
            <text:p>SEDE MOSQUERA; RAFAEL TRIANA; Edificio Atrio</text:p>
          </table:table-cell>
          <table:table-cell table:style-name="ce1" office:value-type="string" calcext:value-type="string">
            <text:p>Exemys</text:p>
          </table:table-cell>
          <table:table-cell table:style-name="ce1" office:value-type="string" calcext:value-type="string">
            <text:p>ExemysDigital</text:p>
          </table:table-cell>
          <table:table-cell table:style-name="ce1" office:value-type="string" calcext:value-type="string">
            <text:p>Digital</text:p>
          </table:table-cell>
          <table:table-cell table:style-name="ce1" office:value-type="string" calcext:value-type="string">
            <text:p>BOG1891</text:p>
          </table:table-cell>
          <table:table-cell/>
          <table:table-cell table:style-name="ce1" office:value-type="string" calcext:value-type="string">
            <text:p>Exemys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14966" calcext:value-type="float">
            <text:p>4614966</text:p>
          </table:table-cell>
          <table:table-cell table:style-name="ce1" office:value-type="float" office:value="-74072914" calcext:value-type="float">
            <text:p>-7407291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0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NSORCIO ELLISDON - ARPRO</text:p>
          </table:table-cell>
          <table:table-cell table:style-name="ce1" office:value-type="string" calcext:value-type="string">
            <text:p>ATRIO GEN02</text:p>
          </table:table-cell>
          <table:table-cell table:style-name="ce1" office:value-type="string" calcext:value-type="string">
            <text:p>SEDE MOSQUERA; RAFAEL TRIANA; Edificio Atrio</text:p>
          </table:table-cell>
          <table:table-cell table:style-name="ce1" office:value-type="string" calcext:value-type="string">
            <text:p>Exemys</text:p>
          </table:table-cell>
          <table:table-cell table:style-name="ce1" office:value-type="string" calcext:value-type="string">
            <text:p>ExemysDigital</text:p>
          </table:table-cell>
          <table:table-cell table:style-name="ce1" office:value-type="string" calcext:value-type="string">
            <text:p>Digital</text:p>
          </table:table-cell>
          <table:table-cell table:style-name="ce1" office:value-type="string" calcext:value-type="string">
            <text:p>BOG1892</text:p>
          </table:table-cell>
          <table:table-cell/>
          <table:table-cell table:style-name="ce1" office:value-type="string" calcext:value-type="string">
            <text:p>Exemys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14968" calcext:value-type="float">
            <text:p>4614968</text:p>
          </table:table-cell>
          <table:table-cell table:style-name="ce1" office:value-type="float" office:value="-74072916" calcext:value-type="float">
            <text:p>-7407291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7:00" calcext:value-type="date">
            <text:p>14/07/26 15:07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NSORCIO VIAL ANDINO</text:p>
          </table:table-cell>
          <table:table-cell table:style-name="ce1" office:value-type="string" calcext:value-type="string">
            <text:p>UF1 - GENERADOR SUBESTACIÓN DE GALERIA 2 TÚNEL 1</text:p>
          </table:table-cell>
          <table:table-cell table:style-name="ce1" office:value-type="string" calcext:value-type="string">
            <text:p>SEDE MOSQUERA; RAFAEL TRIANA; TERCER TERC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VVC1327</text:p>
          </table:table-cell>
          <table:table-cell table:style-name="ce1" office:value-type="float" office:value="8.95202001929E+018" calcext:value-type="float">
            <text:p>8,95202001929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165511" calcext:value-type="float">
            <text:p>4165511</text:p>
          </table:table-cell>
          <table:table-cell table:style-name="ce1" office:value-type="float" office:value="-73706068" calcext:value-type="float">
            <text:p>-73706068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6-23T11:24:26" calcext:value-type="date">
            <text:p>23/06/26 11:24</text:p>
          </table:table-cell>
          <table:table-cell table:style-name="ce4" office:value-type="date" office:date-value="2026-07-14T15:10:24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NSORCIO VIAL ANDINO</text:p>
          </table:table-cell>
          <table:table-cell table:style-name="ce1" office:value-type="string" calcext:value-type="string">
            <text:p>UF1 - GENERADOR SUBESTACIÓN DE SALIDA TÚNEL 1</text:p>
          </table:table-cell>
          <table:table-cell table:style-name="ce1" office:value-type="string" calcext:value-type="string">
            <text:p>SEDE MOSQUERA; RAFAEL TRIANA; TERCER TERC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VVC1326</text:p>
          </table:table-cell>
          <table:table-cell table:style-name="ce1" office:value-type="float" office:value="8.95202001929E+018" calcext:value-type="float">
            <text:p>8,95202001929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165521" calcext:value-type="float">
            <text:p>4165521</text:p>
          </table:table-cell>
          <table:table-cell table:style-name="ce1" office:value-type="float" office:value="-73706078" calcext:value-type="float">
            <text:p>-7370607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5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NSORCIO VIAL ANDINO</text:p>
          </table:table-cell>
          <table:table-cell table:style-name="ce1" office:value-type="string" calcext:value-type="string">
            <text:p>UF4 - GENERADOR SUBESTACIÓN PEAJE PIPIRAL</text:p>
          </table:table-cell>
          <table:table-cell table:style-name="ce1" office:value-type="string" calcext:value-type="string">
            <text:p>SEDE MOSQUERA; DUVAN ROCHA; TERCER TERC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VVC1331</text:p>
          </table:table-cell>
          <table:table-cell table:style-name="ce1" office:value-type="float" office:value="8.95202001929E+018" calcext:value-type="float">
            <text:p>8,95202001929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200161" calcext:value-type="float">
            <text:p>4200161</text:p>
          </table:table-cell>
          <table:table-cell table:style-name="ce1" office:value-type="float" office:value="-73721344" calcext:value-type="float">
            <text:p>-7372134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NTENTO BPS SA</text:p>
          </table:table-cell>
          <table:table-cell table:style-name="ce1" office:value-type="string" calcext:value-type="string">
            <text:p>CONTENTO BPS 800kW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794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704485" calcext:value-type="float">
            <text:p>61704485</text:p>
          </table:table-cell>
          <table:table-cell table:style-name="ce1" office:value-type="float" office:value="-756041227" calcext:value-type="float">
            <text:p>-756041227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5-12T07:51:15" calcext:value-type="date">
            <text:p>12/05/26 07:51</text:p>
          </table:table-cell>
          <table:table-cell table:style-name="ce4" office:value-type="date" office:date-value="2026-07-14T15:09:59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PROPIEDAD ZONA FRANCA PERMANENTE PARQUE CENTRAL PH</text:p>
          </table:table-cell>
          <table:table-cell table:style-name="ce1" office:value-type="string" calcext:value-type="string">
            <text:p>ZONA FRANCA PARQUE CENTRAL GEN01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156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343703" calcext:value-type="float">
            <text:p>10343703</text:p>
          </table:table-cell>
          <table:table-cell table:style-name="ce1" office:value-type="float" office:value="-75413362" calcext:value-type="float">
            <text:p>-7541336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12-12T06:13:33" calcext:value-type="date">
            <text:p>12/12/23 06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RPORACION SALUD UN</text:p>
          </table:table-cell>
          <table:table-cell table:style-name="ce1" office:value-type="string" calcext:value-type="string">
            <text:p>HOSPITAL UNIVERSITARIO NACIONAL GEN 1</text:p>
          </table:table-cell>
          <table:table-cell table:style-name="ce1" office:value-type="string" calcext:value-type="string">
            <text:p>SEDE MOSQUER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384</text:p>
          </table:table-cell>
          <table:table-cell table:style-name="ce1" office:value-type="float" office:value="8.93407720000165E+018" calcext:value-type="float">
            <text:p>8,9340772000016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48865" calcext:value-type="float">
            <text:p>4648865</text:p>
          </table:table-cell>
          <table:table-cell table:style-name="ce1" office:value-type="float" office:value="-74095967" calcext:value-type="float">
            <text:p>-7409596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4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RPORACION SALUD UN</text:p>
          </table:table-cell>
          <table:table-cell table:style-name="ce1" office:value-type="string" calcext:value-type="string">
            <text:p>HOSPITAL UNIVERSITARIO NACIONAL GEN 2</text:p>
          </table:table-cell>
          <table:table-cell table:style-name="ce1" office:value-type="string" calcext:value-type="string">
            <text:p>SEDE MOSQUER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385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486421119761" calcext:value-type="float">
            <text:p>46486421119761</text:p>
          </table:table-cell>
          <table:table-cell table:style-name="ce1" office:value-type="float" office:value="-740956056118011" calcext:value-type="float">
            <text:p>-74095605611801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2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RPORACION SALUD UN</text:p>
          </table:table-cell>
          <table:table-cell table:style-name="ce1" office:value-type="string" calcext:value-type="string">
            <text:p>HOSPITAL UNIVERSITARIO NACIONAL GEN 3</text:p>
          </table:table-cell>
          <table:table-cell table:style-name="ce1" office:value-type="string" calcext:value-type="string">
            <text:p>SEDE MOSQUER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386</text:p>
          </table:table-cell>
          <table:table-cell table:style-name="ce1" office:value-type="float" office:value="8.93407720000166E+018" calcext:value-type="float">
            <text:p>8,93407720000166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48740358894" calcext:value-type="float">
            <text:p>4648740358894</text:p>
          </table:table-cell>
          <table:table-cell table:style-name="ce1" office:value-type="float" office:value="-740954768657684" calcext:value-type="float">
            <text:p>-74095476865768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2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VIANDINA TERCER TERCIO</text:p>
          </table:table-cell>
          <table:table-cell table:style-name="ce1" office:value-type="string" calcext:value-type="string">
            <text:p>UF2 - GENERADOR SEBESTACION ENTRADA TÚNEL 2</text:p>
          </table:table-cell>
          <table:table-cell table:style-name="ce1" office:value-type="string" calcext:value-type="string">
            <text:p>SEDE MOSQUERA; DUVAN ROCHA; TERCER TERC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number-columns-repeated="2"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1647168" calcext:value-type="float">
            <text:p>41647168</text:p>
          </table:table-cell>
          <table:table-cell table:style-name="ce1" office:value-type="float" office:value="-737066428" calcext:value-type="float">
            <text:p>-73706642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VIANDINA TERCER TERCIO</text:p>
          </table:table-cell>
          <table:table-cell table:style-name="ce1" office:value-type="string" calcext:value-type="string">
            <text:p>UF3 - GENERADOR SUBESTACIÓN DE ENTRADA DE TÚNEL 3 GEN 1</text:p>
          </table:table-cell>
          <table:table-cell table:style-name="ce1" office:value-type="string" calcext:value-type="string">
            <text:p>SEDE MOSQUERA; DUVAN ROCHA; TERCER TERC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number-columns-repeated="2"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1647168" calcext:value-type="float">
            <text:p>41647168</text:p>
          </table:table-cell>
          <table:table-cell table:style-name="ce1" office:value-type="float" office:value="-737066428" calcext:value-type="float">
            <text:p>-73706642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VIANDINA TERCER TERCIO</text:p>
          </table:table-cell>
          <table:table-cell table:style-name="ce1" office:value-type="string" calcext:value-type="string">
            <text:p>UF3 - GENERADOR SUBESTACIÓN DE ENTRADA DE TÚNEL 3 GEN 2</text:p>
          </table:table-cell>
          <table:table-cell table:style-name="ce1" office:value-type="string" calcext:value-type="string">
            <text:p>SEDE MOSQUERA; DUVAN ROCHA; TERCER TERC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number-columns-repeated="2"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1647168" calcext:value-type="float">
            <text:p>41647168</text:p>
          </table:table-cell>
          <table:table-cell table:style-name="ce1" office:value-type="float" office:value="-737066428" calcext:value-type="float">
            <text:p>-73706642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1T13:43:29" calcext:value-type="date">
            <text:p>11/07/26 13:4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VIANDINA TERCER TERCIO</text:p>
          </table:table-cell>
          <table:table-cell table:style-name="ce1" office:value-type="string" calcext:value-type="string">
            <text:p>UF3 - GENERADOR SUBESTACIÓN DE ENTRADA DE TÚNEL 5 GEN 1</text:p>
          </table:table-cell>
          <table:table-cell table:style-name="ce1" office:value-type="string" calcext:value-type="string">
            <text:p>SEDE MOSQUERA; DUVAN ROCHA; TERCER TERC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number-columns-repeated="2"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1647168" calcext:value-type="float">
            <text:p>41647168</text:p>
          </table:table-cell>
          <table:table-cell table:style-name="ce1" office:value-type="float" office:value="-737066428" calcext:value-type="float">
            <text:p>-73706642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VIANDINA TERCER TERCIO</text:p>
          </table:table-cell>
          <table:table-cell table:style-name="ce1" office:value-type="string" calcext:value-type="string">
            <text:p>UF3 - GENERADOR SUBESTACIÓN DE ENTRADA DE TÚNEL 5 GEN 2</text:p>
          </table:table-cell>
          <table:table-cell table:style-name="ce1" office:value-type="string" calcext:value-type="string">
            <text:p>SEDE MOSQUERA; DUVAN ROCHA; TERCER TERC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number-columns-repeated="2"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1647168" calcext:value-type="float">
            <text:p>41647168</text:p>
          </table:table-cell>
          <table:table-cell table:style-name="ce1" office:value-type="float" office:value="-737066428" calcext:value-type="float">
            <text:p>-73706642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VIANDINA TERCER TERCIO</text:p>
          </table:table-cell>
          <table:table-cell table:style-name="ce1" office:value-type="string" calcext:value-type="string">
            <text:p>UF3 - GENERADOR SUBESTACIÓN DE SALIDA DE TÚNEL 5 GEN 1</text:p>
          </table:table-cell>
          <table:table-cell table:style-name="ce1" office:value-type="string" calcext:value-type="string">
            <text:p>SEDE MOSQUERA; DUVAN ROCHA; TERCER TERC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number-columns-repeated="2"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1647168" calcext:value-type="float">
            <text:p>41647168</text:p>
          </table:table-cell>
          <table:table-cell table:style-name="ce1" office:value-type="float" office:value="-737066428" calcext:value-type="float">
            <text:p>-73706642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0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VIANDINA TERCER TERCIO</text:p>
          </table:table-cell>
          <table:table-cell table:style-name="ce1" office:value-type="string" calcext:value-type="string">
            <text:p>UF3 - GENERADOR SUBESTACIÓN DE SALIDA DE TÚNEL 5 GEN 2</text:p>
          </table:table-cell>
          <table:table-cell table:style-name="ce1" office:value-type="string" calcext:value-type="string">
            <text:p>SEDE MOSQUERA; DUVAN ROCHA; TERCER TERC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number-columns-repeated="2"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1647168" calcext:value-type="float">
            <text:p>41647168</text:p>
          </table:table-cell>
          <table:table-cell table:style-name="ce1" office:value-type="float" office:value="-737066428" calcext:value-type="float">
            <text:p>-73706642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VIANDINA TERCER TERCIO</text:p>
          </table:table-cell>
          <table:table-cell table:style-name="ce1" office:value-type="string" calcext:value-type="string">
            <text:p>UF6 - GENERADOR SUBESTACIÓN DE ENTRADA TÚNEL 7 GEN 1</text:p>
          </table:table-cell>
          <table:table-cell table:style-name="ce1" office:value-type="string" calcext:value-type="string">
            <text:p>SEDE MOSQUERA; DUVAN ROCHA; BUENAVIST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number-columns-repeated="2"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1647168" calcext:value-type="float">
            <text:p>41647168</text:p>
          </table:table-cell>
          <table:table-cell table:style-name="ce1" office:value-type="float" office:value="-737066428" calcext:value-type="float">
            <text:p>-73706642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6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VIANDINA TERCER TERCIO</text:p>
          </table:table-cell>
          <table:table-cell table:style-name="ce1" office:value-type="string" calcext:value-type="string">
            <text:p>UF6 - GENERADOR SUBESTACIÓN DE ENTRADA TÚNEL 7 GEN 2</text:p>
          </table:table-cell>
          <table:table-cell table:style-name="ce1" office:value-type="string" calcext:value-type="string">
            <text:p>SEDE MOSQUERA; DUVAN ROCHA; BUENAVIST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number-columns-repeated="2"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1647168" calcext:value-type="float">
            <text:p>41647168</text:p>
          </table:table-cell>
          <table:table-cell table:style-name="ce1" office:value-type="float" office:value="-737066428" calcext:value-type="float">
            <text:p>-73706642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8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VIANDINA TERCER TERCIO</text:p>
          </table:table-cell>
          <table:table-cell table:style-name="ce1" office:value-type="string" calcext:value-type="string">
            <text:p>UF6 - GENERADOR SUBESTACIÓN DE SALIDA TÚNEL 7 GEN 1</text:p>
          </table:table-cell>
          <table:table-cell table:style-name="ce1" office:value-type="string" calcext:value-type="string">
            <text:p>SEDE MOSQUERA; DUVAN ROCHA; BUENAVIST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number-columns-repeated="2"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1647168" calcext:value-type="float">
            <text:p>41647168</text:p>
          </table:table-cell>
          <table:table-cell table:style-name="ce1" office:value-type="float" office:value="-737066428" calcext:value-type="float">
            <text:p>-73706642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COVIANDINA TERCER TERCIO</text:p>
          </table:table-cell>
          <table:table-cell table:style-name="ce1" office:value-type="string" calcext:value-type="string">
            <text:p>UF6 - GENERADOR SUBESTACIÓN DE SALIDA TÚNEL 7 GEN 2</text:p>
          </table:table-cell>
          <table:table-cell table:style-name="ce1" office:value-type="string" calcext:value-type="string">
            <text:p>SEDE MOSQUERA; DUVAN ROCHA; BUENAVIST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number-columns-repeated="2"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1647168" calcext:value-type="float">
            <text:p>41647168</text:p>
          </table:table-cell>
          <table:table-cell table:style-name="ce1" office:value-type="float" office:value="-737066428" calcext:value-type="float">
            <text:p>-737066428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7-06T11:44:29" calcext:value-type="date">
            <text:p>06/07/26 11:44</text:p>
          </table:table-cell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CREMHELADO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312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945423" calcext:value-type="float">
            <text:p>10945423</text:p>
          </table:table-cell>
          <table:table-cell table:style-name="ce1" office:value-type="float" office:value="-74836355" calcext:value-type="float">
            <text:p>-7483635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14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1 SAS</text:p>
          </table:table-cell>
          <table:table-cell table:style-name="ce1" office:value-type="string" calcext:value-type="string">
            <text:p>D1 ZOL FUNZA</text:p>
          </table:table-cell>
          <table:table-cell table:style-name="ce1" office:value-type="string" calcext:value-type="string">
            <text:p>SEDE MOSQUER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AMF-5|Trifasico</text:p>
          </table:table-cell>
          <table:table-cell table:style-name="ce1" office:value-type="string" calcext:value-type="string">
            <text:p>AMF5</text:p>
          </table:table-cell>
          <table:table-cell table:style-name="ce1" office:value-type="string" calcext:value-type="string">
            <text:p>MOVISTAR M2M</text:p>
          </table:table-cell>
          <table:table-cell table:style-name="ce1" office:value-type="float" office:value="8.93407610014978E+018" calcext:value-type="float">
            <text:p>8,93407610014978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378471" calcext:value-type="float">
            <text:p>47378471</text:p>
          </table:table-cell>
          <table:table-cell table:style-name="ce1" office:value-type="float" office:value="-741632117" calcext:value-type="float">
            <text:p>-741632117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2-02T15:31:07" calcext:value-type="date">
            <text:p>02/02/26 15:31</text:p>
          </table:table-cell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ATACENTER ZETTA</text:p>
          </table:table-cell>
          <table:table-cell table:style-name="ce1" office:value-type="string" calcext:value-type="string">
            <text:p>DATACENTER ZETTA GEN 01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968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713838" calcext:value-type="float">
            <text:p>46713838</text:p>
          </table:table-cell>
          <table:table-cell table:style-name="ce1" office:value-type="float" office:value="-741560259" calcext:value-type="float">
            <text:p>-74156025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ATACENTER ZETTA</text:p>
          </table:table-cell>
          <table:table-cell table:style-name="ce1" office:value-type="string" calcext:value-type="string">
            <text:p>DATACENTER ZETTA GEN 02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969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713838" calcext:value-type="float">
            <text:p>46713838</text:p>
          </table:table-cell>
          <table:table-cell table:style-name="ce1" office:value-type="float" office:value="-741560259" calcext:value-type="float">
            <text:p>-74156025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ATACENTER ZETTA</text:p>
          </table:table-cell>
          <table:table-cell table:style-name="ce1" office:value-type="string" calcext:value-type="string">
            <text:p>DATACENTER ZETTA GEN 03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2166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713838" calcext:value-type="float">
            <text:p>46713838</text:p>
          </table:table-cell>
          <table:table-cell table:style-name="ce1" office:value-type="float" office:value="-741560259" calcext:value-type="float">
            <text:p>-74156025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ELIPAVO LTDA</text:p>
          </table:table-cell>
          <table:table-cell table:style-name="ce1" office:value-type="string" calcext:value-type="string">
            <text:p>DELIPAVO</text:p>
          </table:table-cell>
          <table:table-cell table:style-name="ce1" office:value-type="string" calcext:value-type="string">
            <text:p>SEDE MOSQUERA; DELIPAVO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763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91311" calcext:value-type="float">
            <text:p>4791311</text:p>
          </table:table-cell>
          <table:table-cell table:style-name="ce1" office:value-type="float" office:value="-74191875" calcext:value-type="float">
            <text:p>-7419187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ESARROLLADORA CC FONTANAR S.A.S</text:p>
          </table:table-cell>
          <table:table-cell table:style-name="ce1" office:value-type="string" calcext:value-type="string">
            <text:p>CENTRO COMERCIAL FONTANAR GEN01</text:p>
          </table:table-cell>
          <table:table-cell table:style-name="ce1" office:value-type="string" calcext:value-type="string">
            <text:p>SEDE MOSQUERA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764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84" calcext:value-type="float">
            <text:p>4884</text:p>
          </table:table-cell>
          <table:table-cell table:style-name="ce1" office:value-type="float" office:value="-74035" calcext:value-type="float">
            <text:p>-7403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ESARROLLADORA CC FONTANAR S.A.S</text:p>
          </table:table-cell>
          <table:table-cell table:style-name="ce1" office:value-type="string" calcext:value-type="string">
            <text:p>CENTRO COMERCIAL FONTANAR GEN02</text:p>
          </table:table-cell>
          <table:table-cell table:style-name="ce1" office:value-type="string" calcext:value-type="string">
            <text:p>SEDE MOSQUERA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765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84" calcext:value-type="float">
            <text:p>4884</text:p>
          </table:table-cell>
          <table:table-cell table:style-name="ce1" office:value-type="float" office:value="-74035" calcext:value-type="float">
            <text:p>-7403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ESARROLLADORA CC FONTANAR S.A.S</text:p>
          </table:table-cell>
          <table:table-cell table:style-name="ce1" office:value-type="string" calcext:value-type="string">
            <text:p>CENTRO COMERCIAL FONTANAR GEN03</text:p>
          </table:table-cell>
          <table:table-cell table:style-name="ce1" office:value-type="string" calcext:value-type="string">
            <text:p>SEDE MOSQUERA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766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84" calcext:value-type="float">
            <text:p>4884</text:p>
          </table:table-cell>
          <table:table-cell table:style-name="ce1" office:value-type="float" office:value="-74035" calcext:value-type="float">
            <text:p>-7403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ESARROLLADORA CC FONTANAR S.A.S</text:p>
          </table:table-cell>
          <table:table-cell table:style-name="ce1" office:value-type="string" calcext:value-type="string">
            <text:p>CENTRO COMERCIAL FONTANAR GEN04</text:p>
          </table:table-cell>
          <table:table-cell table:style-name="ce1" office:value-type="string" calcext:value-type="string">
            <text:p>SEDE MOSQUERA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767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84" calcext:value-type="float">
            <text:p>4884</text:p>
          </table:table-cell>
          <table:table-cell table:style-name="ce1" office:value-type="float" office:value="-74035" calcext:value-type="float">
            <text:p>-7403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ESARROLLADORA CC FONTANAR S.A.S</text:p>
          </table:table-cell>
          <table:table-cell table:style-name="ce1" office:value-type="string" calcext:value-type="string">
            <text:p>CENTRO COMERCIAL FONTANAR GEN05</text:p>
          </table:table-cell>
          <table:table-cell table:style-name="ce1" office:value-type="string" calcext:value-type="string">
            <text:p>SEDE MOSQUERA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768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84" calcext:value-type="float">
            <text:p>4884</text:p>
          </table:table-cell>
          <table:table-cell table:style-name="ce1" office:value-type="float" office:value="-74035" calcext:value-type="float">
            <text:p>-7403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14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ESARROLLADORA CC FONTANAR S.A.S</text:p>
          </table:table-cell>
          <table:table-cell table:style-name="ce1" office:value-type="string" calcext:value-type="string">
            <text:p>CENTRO COMERCIAL FONTANAR GEN06</text:p>
          </table:table-cell>
          <table:table-cell table:style-name="ce1" office:value-type="string" calcext:value-type="string">
            <text:p>SEDE MOSQUERA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769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84" calcext:value-type="float">
            <text:p>4884</text:p>
          </table:table-cell>
          <table:table-cell table:style-name="ce1" office:value-type="float" office:value="-74035" calcext:value-type="float">
            <text:p>-7403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IPLOMAT WYNDHAM BOGOTA</text:p>
          </table:table-cell>
          <table:table-cell table:style-name="ce1" office:value-type="string" calcext:value-type="string">
            <text:p>HOTEL DIPLOMAT GEN TRYP</text:p>
          </table:table-cell>
          <table:table-cell table:style-name="ce1" office:value-type="string" calcext:value-type="string">
            <text:p>SEDE MOSQUER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784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38862" calcext:value-type="float">
            <text:p>4638862</text:p>
          </table:table-cell>
          <table:table-cell table:style-name="ce1" office:value-type="float" office:value="-74098177" calcext:value-type="float">
            <text:p>-7409817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6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IPLOMAT WYNDHAM BOGOTA</text:p>
          </table:table-cell>
          <table:table-cell table:style-name="ce1" office:value-type="string" calcext:value-type="string">
            <text:p>HOTEL DIPLOMAT GEN WYNDHAM</text:p>
          </table:table-cell>
          <table:table-cell table:style-name="ce1" office:value-type="string" calcext:value-type="string">
            <text:p>SEDE MOSQUER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785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39172" calcext:value-type="float">
            <text:p>4639172</text:p>
          </table:table-cell>
          <table:table-cell table:style-name="ce1" office:value-type="float" office:value="-74097748" calcext:value-type="float">
            <text:p>-7409774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14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IRECCIÓN EJECUTIVA SECCIONAL DE ADMINISTRACIÓN JUDICIAL IBAGUÉ</text:p>
          </table:table-cell>
          <table:table-cell table:style-name="ce1" office:value-type="string" calcext:value-type="string">
            <text:p>PALACIO DE JUSTICIA DE IBAGUE</text:p>
          </table:table-cell>
          <table:table-cell table:style-name="ce1" office:value-type="string" calcext:value-type="string">
            <text:p>SEDE IBAGUE; JUAN RICARDO HINCAPI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IBG0158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444421" calcext:value-type="float">
            <text:p>4444421</text:p>
          </table:table-cell>
          <table:table-cell table:style-name="ce1" office:value-type="float" office:value="-75244078" calcext:value-type="float">
            <text:p>-7524407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ISICO S.A.</text:p>
          </table:table-cell>
          <table:table-cell table:style-name="ce1" office:value-type="string" calcext:value-type="string">
            <text:p>UF0 - GENERADOR BUNKER DE SALIDA TÚNEL 11 GEN 1</text:p>
          </table:table-cell>
          <table:table-cell table:style-name="ce1" office:value-type="string" calcext:value-type="string">
            <text:p>SEDE MOSQUERA; RAFAEL TRIANA; TERCIO MED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VVC0933</text:p>
          </table:table-cell>
          <table:table-cell table:style-name="ce1" office:value-type="float" office:value="5.71011014028869E+016" calcext:value-type="float">
            <text:p>5,71011014028869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228846" calcext:value-type="float">
            <text:p>4228846</text:p>
          </table:table-cell>
          <table:table-cell table:style-name="ce1" office:value-type="float" office:value="-73817579" calcext:value-type="float">
            <text:p>-7381757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ISICO S.A.</text:p>
          </table:table-cell>
          <table:table-cell table:style-name="ce1" office:value-type="string" calcext:value-type="string">
            <text:p>UF0 - GENERADOR BUNKER DE SALIDA TÚNEL 11 GEN 2</text:p>
          </table:table-cell>
          <table:table-cell table:style-name="ce1" office:value-type="string" calcext:value-type="string">
            <text:p>SEDE MOSQUERA; RAFAEL TRIANA; TERCIO MED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OVISTAR M2M</text:p>
          </table:table-cell>
          <table:table-cell table:style-name="ce1" office:value-type="float" office:value="8.93407610014978E+018" calcext:value-type="float">
            <text:p>8,93407610014978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220971" calcext:value-type="float">
            <text:p>4220971</text:p>
          </table:table-cell>
          <table:table-cell table:style-name="ce1" office:value-type="float" office:value="-73816892" calcext:value-type="float">
            <text:p>-7381689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ISICO S.A.</text:p>
          </table:table-cell>
          <table:table-cell table:style-name="ce1" office:value-type="string" calcext:value-type="string">
            <text:p>UF0 - GENERADOR BUNKER DE SALIDA TÚNEL 13</text:p>
          </table:table-cell>
          <table:table-cell table:style-name="ce1" office:value-type="string" calcext:value-type="string">
            <text:p>SEDE MOSQUERA; RAFAEL TRIANA; TERCIO MED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VVC0927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212575" calcext:value-type="float">
            <text:p>4212575</text:p>
          </table:table-cell>
          <table:table-cell table:style-name="ce1" office:value-type="float" office:value="-73811714" calcext:value-type="float">
            <text:p>-7381171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1-03-08T06:03:54" calcext:value-type="date">
            <text:p>08/03/21 06:0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ISICO S.A.</text:p>
          </table:table-cell>
          <table:table-cell table:style-name="ce1" office:value-type="string" calcext:value-type="string">
            <text:p>UF0 - GENERADOR SUBESTACIÓN 7 TUNEL BUENAVISTA - PL11</text:p>
          </table:table-cell>
          <table:table-cell table:style-name="ce1" office:value-type="string" calcext:value-type="string">
            <text:p>SEDE MOSQUERA; RAFAEL TRIANA; BUENAVISTA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VVC0923</text:p>
          </table:table-cell>
          <table:table-cell/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143182" calcext:value-type="float">
            <text:p>4143182</text:p>
          </table:table-cell>
          <table:table-cell table:style-name="ce1" office:value-type="float" office:value="-73662171" calcext:value-type="float">
            <text:p>-7366217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1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ISICO S.A.</text:p>
          </table:table-cell>
          <table:table-cell table:style-name="ce1" office:value-type="string" calcext:value-type="string">
            <text:p>UF0 - GENERADOR SUBESTACIÓN DE ENTRADA 2 TÚNEL 6A</text:p>
          </table:table-cell>
          <table:table-cell table:style-name="ce1" office:value-type="string" calcext:value-type="string">
            <text:p>SEDE MOSQUERA; RAFAEL TRIANA; TERCIO MED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VVC0926</text:p>
          </table:table-cell>
          <table:table-cell table:style-name="ce1" office:value-type="float" office:value="123110538427479" calcext:value-type="float">
            <text:p>123110538427479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27946" calcext:value-type="float">
            <text:p>427946</text:p>
          </table:table-cell>
          <table:table-cell table:style-name="ce1" office:value-type="float" office:value="-7383489" calcext:value-type="float">
            <text:p>-738348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ISICO S.A.</text:p>
          </table:table-cell>
          <table:table-cell table:style-name="ce1" office:value-type="string" calcext:value-type="string">
            <text:p>UF0 - GENERADOR SUBESTACIÓN DE ENTRADA TÚNEL 1</text:p>
          </table:table-cell>
          <table:table-cell table:style-name="ce1" office:value-type="string" calcext:value-type="string">
            <text:p>SEDE MOSQUERA; RAFAEL TRIANA; TERCIO MED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VVC0936</text:p>
          </table:table-cell>
          <table:table-cell table:style-name="ce1" office:value-type="string" calcext:value-type="string">
            <text:p>893407720000164 644-3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217234" calcext:value-type="float">
            <text:p>4217234</text:p>
          </table:table-cell>
          <table:table-cell table:style-name="ce1" office:value-type="float" office:value="-73815125" calcext:value-type="float">
            <text:p>-7381512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6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ISICO S.A.</text:p>
          </table:table-cell>
          <table:table-cell table:style-name="ce1" office:value-type="string" calcext:value-type="string">
            <text:p>UF0 - GENERADOR SUBESTACIÓN DE ENTRADA TÚNEL 16</text:p>
          </table:table-cell>
          <table:table-cell table:style-name="ce1" office:value-type="string" calcext:value-type="string">
            <text:p>SEDE MOSQUERA; RAFAEL TRIANA; TERCIO MED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VVC0937</text:p>
          </table:table-cell>
          <table:table-cell table:style-name="ce1" office:value-type="float" office:value="5.71014018017129E+016" calcext:value-type="float">
            <text:p>5,71014018017129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205537" calcext:value-type="float">
            <text:p>4205537</text:p>
          </table:table-cell>
          <table:table-cell table:style-name="ce1" office:value-type="float" office:value="-73795601" calcext:value-type="float">
            <text:p>-7379560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2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ISICO S.A.</text:p>
          </table:table-cell>
          <table:table-cell table:style-name="ce1" office:value-type="string" calcext:value-type="string">
            <text:p>UF0 - GENERADOR SUBESTACIÓN DE ENTRADA TÚNEL 3</text:p>
          </table:table-cell>
          <table:table-cell table:style-name="ce1" office:value-type="string" calcext:value-type="string">
            <text:p>SEDE MOSQUERA; RAFAEL TRIANA; TERCIO MED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VVC0939</text:p>
          </table:table-cell>
          <table:table-cell table:style-name="ce1" office:value-type="float" office:value="8.93407720000166E+018" calcext:value-type="float">
            <text:p>8,93407720000166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23916" calcext:value-type="float">
            <text:p>423916</text:p>
          </table:table-cell>
          <table:table-cell table:style-name="ce1" office:value-type="float" office:value="-73815125" calcext:value-type="float">
            <text:p>-7381512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0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ISICO S.A.</text:p>
          </table:table-cell>
          <table:table-cell table:style-name="ce1" office:value-type="string" calcext:value-type="string">
            <text:p>UF0 - GENERADOR SUBESTACIÓN DE ENTRADA TÚNEL 5</text:p>
          </table:table-cell>
          <table:table-cell table:style-name="ce1" office:value-type="string" calcext:value-type="string">
            <text:p>SEDE MOSQUERA; RAFAEL TRIANA; TERCIO MED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VVC0929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23916" calcext:value-type="float">
            <text:p>423916</text:p>
          </table:table-cell>
          <table:table-cell table:style-name="ce1" office:value-type="float" office:value="-73823619" calcext:value-type="float">
            <text:p>-7382361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4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ISICO S.A.</text:p>
          </table:table-cell>
          <table:table-cell table:style-name="ce1" office:value-type="string" calcext:value-type="string">
            <text:p>UF0 - GENERADOR SUBESTACIÓN DE ENTRADA TÚNEL 7</text:p>
          </table:table-cell>
          <table:table-cell table:style-name="ce1" office:value-type="string" calcext:value-type="string">
            <text:p>SEDE MOSQUERA; RAFAEL TRIANA; TERCIO MED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VVC0934</text:p>
          </table:table-cell>
          <table:table-cell table:style-name="ce1" office:value-type="float" office:value="123410514536743" calcext:value-type="float">
            <text:p>123410514536743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468236" calcext:value-type="float">
            <text:p>4468236</text:p>
          </table:table-cell>
          <table:table-cell table:style-name="ce1" office:value-type="float" office:value="-74088787" calcext:value-type="float">
            <text:p>-7408878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0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ISICO S.A.</text:p>
          </table:table-cell>
          <table:table-cell table:style-name="ce1" office:value-type="string" calcext:value-type="string">
            <text:p>UF0 - GENERADOR SUBESTACIÓN DE ENTRADA TÚNEL 8 GEN 1</text:p>
          </table:table-cell>
          <table:table-cell table:style-name="ce1" office:value-type="string" calcext:value-type="string">
            <text:p>SEDE MOSQUERA; RAFAEL TRIANA; TERCIO MED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VVC0935</text:p>
          </table:table-cell>
          <table:table-cell table:style-name="ce1" office:value-type="float" office:value="5.7101101402887E+016" calcext:value-type="float">
            <text:p>5,7101101402887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217234" calcext:value-type="float">
            <text:p>4217234</text:p>
          </table:table-cell>
          <table:table-cell table:style-name="ce1" office:value-type="float" office:value="-73815125" calcext:value-type="float">
            <text:p>-7381512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ISICO S.A.</text:p>
          </table:table-cell>
          <table:table-cell table:style-name="ce1" office:value-type="string" calcext:value-type="string">
            <text:p>UF0 - GENERADOR SUBESTACIÓN DE ENTRADA TÚNEL 8 GEN 2</text:p>
          </table:table-cell>
          <table:table-cell table:style-name="ce1" office:value-type="string" calcext:value-type="string">
            <text:p>SEDE MOSQUERA; RAFAEL TRIANA; TERCIO MED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VVC0932</text:p>
          </table:table-cell>
          <table:table-cell table:style-name="ce3" office:value-type="float" office:value="5.71011E+016" calcext:value-type="float">
            <text:p>5,71E+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217234" calcext:value-type="float">
            <text:p>4217234</text:p>
          </table:table-cell>
          <table:table-cell table:style-name="ce1" office:value-type="float" office:value="-73815125" calcext:value-type="float">
            <text:p>-7381512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11-16T13:37:37" calcext:value-type="date">
            <text:p>16/11/24 13:37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ISICO S.A.</text:p>
          </table:table-cell>
          <table:table-cell table:style-name="ce1" office:value-type="string" calcext:value-type="string">
            <text:p>UF0 - GENERADOR SUBESTACIÓN DE GALERIA DE TÚNEL 3A</text:p>
          </table:table-cell>
          <table:table-cell table:style-name="ce1" office:value-type="string" calcext:value-type="string">
            <text:p>SEDE MOSQUERA; RAFAEL TRIANA; TERCIO MED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VVC0940</text:p>
          </table:table-cell>
          <table:table-cell table:style-name="ce1" office:value-type="string" calcext:value-type="string">
            <text:p>893407720000164641-9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217234" calcext:value-type="float">
            <text:p>4217234</text:p>
          </table:table-cell>
          <table:table-cell table:style-name="ce1" office:value-type="float" office:value="-73815125" calcext:value-type="float">
            <text:p>-7381512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ISICO S.A.</text:p>
          </table:table-cell>
          <table:table-cell table:style-name="ce1" office:value-type="string" calcext:value-type="string">
            <text:p>UF0 - GENERADOR SUBESTACIÓN DE GALERIA DE TÚNEL 6A</text:p>
          </table:table-cell>
          <table:table-cell table:style-name="ce1" office:value-type="string" calcext:value-type="string">
            <text:p>SEDE MOSQUERA; RAFAEL TRIANA; TERCIO MED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VVC0925</text:p>
          </table:table-cell>
          <table:table-cell table:style-name="ce1" office:value-type="float" office:value="123110538427495" calcext:value-type="float">
            <text:p>123110538427495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458154" calcext:value-type="float">
            <text:p>46458154</text:p>
          </table:table-cell>
          <table:table-cell table:style-name="ce1" office:value-type="float" office:value="-741025123" calcext:value-type="float">
            <text:p>-74102512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ISICO S.A.</text:p>
          </table:table-cell>
          <table:table-cell table:style-name="ce1" office:value-type="string" calcext:value-type="string">
            <text:p>UF0 - GENERADOR SUBESTACIÓN DE SALIDA TÚNEL 16</text:p>
          </table:table-cell>
          <table:table-cell table:style-name="ce1" office:value-type="string" calcext:value-type="string">
            <text:p>SEDE MOSQUERA; RAFAEL TRIANA; TERCIO MED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VVC0938</text:p>
          </table:table-cell>
          <table:table-cell table:style-name="ce1" office:value-type="float" office:value="5.71014018017129E+016" calcext:value-type="float">
            <text:p>5,71014018017129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451" calcext:value-type="float">
            <text:p>4451</text:p>
          </table:table-cell>
          <table:table-cell table:style-name="ce1" office:value-type="float" office:value="-74078" calcext:value-type="float">
            <text:p>-7407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6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ISICO S.A.</text:p>
          </table:table-cell>
          <table:table-cell table:style-name="ce1" office:value-type="string" calcext:value-type="string">
            <text:p>UF0 - GENERADOR SUBESTACIÓN DE SALIDA TÚNEL 6</text:p>
          </table:table-cell>
          <table:table-cell table:style-name="ce1" office:value-type="string" calcext:value-type="string">
            <text:p>SEDE MOSQUERA; RAFAEL TRIANA; TERCIO MED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VVC0930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22341" calcext:value-type="float">
            <text:p>422341</text:p>
          </table:table-cell>
          <table:table-cell table:style-name="ce1" office:value-type="float" office:value="-73817439" calcext:value-type="float">
            <text:p>-7381743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ISICO S.A.</text:p>
          </table:table-cell>
          <table:table-cell table:style-name="ce1" office:value-type="string" calcext:value-type="string">
            <text:p>UF0 - GENERADOR SUBESTACIÓN PEAJE NARANJAL</text:p>
          </table:table-cell>
          <table:table-cell table:style-name="ce1" office:value-type="string" calcext:value-type="string">
            <text:p>SEDE MOSQUERA; RAFAEL TRIANA; TERCIO MED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VVC0928</text:p>
          </table:table-cell>
          <table:table-cell table:style-name="ce1" office:value-type="float" office:value="123110543519328" calcext:value-type="float">
            <text:p>12311054351932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278271" calcext:value-type="float">
            <text:p>4278271</text:p>
          </table:table-cell>
          <table:table-cell table:style-name="ce1" office:value-type="float" office:value="-73834869" calcext:value-type="float">
            <text:p>-7383486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ISPAPELES SAS</text:p>
          </table:table-cell>
          <table:table-cell table:style-name="ce1" office:value-type="string" calcext:value-type="string">
            <text:p>DISPAPELES CLL 100 CATERPILLAR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631</text:p>
          </table:table-cell>
          <table:table-cell table:style-name="ce1" office:value-type="string" calcext:value-type="string">
            <text:p>IB-LIT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93749" calcext:value-type="float">
            <text:p>4693749</text:p>
          </table:table-cell>
          <table:table-cell table:style-name="ce1" office:value-type="float" office:value="-74072075" calcext:value-type="float">
            <text:p>-7407207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2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ISPAPELES SAS</text:p>
          </table:table-cell>
          <table:table-cell table:style-name="ce1" office:value-type="string" calcext:value-type="string">
            <text:p>DISPAPELES CLL 100 KOHLER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633</text:p>
          </table:table-cell>
          <table:table-cell table:style-name="ce1" office:value-type="string" calcext:value-type="string">
            <text:p>IB-LIT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93749" calcext:value-type="float">
            <text:p>4693749</text:p>
          </table:table-cell>
          <table:table-cell table:style-name="ce1" office:value-type="float" office:value="-74072075" calcext:value-type="float">
            <text:p>-7407207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0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DUAL ASSET MANAGEMENT SAS</text:p>
          </table:table-cell>
          <table:table-cell table:style-name="ce1" office:value-type="string" calcext:value-type="string">
            <text:p>35 PALMS BUSINESS TOWER MTS</text:p>
          </table:table-cell>
          <table:table-cell table:style-name="ce1" office:value-type="string" calcext:value-type="string">
            <text:p>SEDE MEDELLIN; RODOLFO VELEZ; 35 PALM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637</text:p>
          </table:table-cell>
          <table:table-cell table:style-name="ce1" office:value-type="float" office:value="5.71015019120989E+016" calcext:value-type="float">
            <text:p>5,71015019120989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16929" calcext:value-type="float">
            <text:p>6216929</text:p>
          </table:table-cell>
          <table:table-cell table:style-name="ce1" office:value-type="float" office:value="-75564659" calcext:value-type="float">
            <text:p>-7556465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EDIFICIO ALTOS DE KARON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803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0513" calcext:value-type="float">
            <text:p>4650513</text:p>
          </table:table-cell>
          <table:table-cell table:style-name="ce1" office:value-type="float" office:value="-74049504" calcext:value-type="float">
            <text:p>-7404950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03-27T13:33:20" calcext:value-type="date">
            <text:p>27/03/24 13:3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ALTOS DEL REFUGIO PH</text:p>
          </table:table-cell>
          <table:table-cell table:style-name="ce1" office:value-type="string" calcext:value-type="string">
            <text:p>EDIFICIO ALTOS DEL REFUGIO</text:p>
          </table:table-cell>
          <table:table-cell table:style-name="ce1" office:value-type="string" calcext:value-type="string">
            <text:p>SEDE MOSQUER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807</text:p>
          </table:table-cell>
          <table:table-cell table:style-name="ce1" office:value-type="float" office:value="8.93407510025574E+018" calcext:value-type="float">
            <text:p>8,934075100255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65777" calcext:value-type="float">
            <text:p>4665777</text:p>
          </table:table-cell>
          <table:table-cell table:style-name="ce1" office:value-type="float" office:value="-74045017" calcext:value-type="float">
            <text:p>-7404501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AVANT GARDE PH</text:p>
          </table:table-cell>
          <table:table-cell table:style-name="ce1" office:value-type="string" calcext:value-type="string">
            <text:p>EDIFICIO AVANT GARDE ACEIS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4084094E+016" calcext:value-type="float">
            <text:p>5,71017024084094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6011" calcext:value-type="float">
            <text:p>6206011</text:p>
          </table:table-cell>
          <table:table-cell table:style-name="ce1" office:value-type="float" office:value="-75568785" calcext:value-type="float">
            <text:p>-7556878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AVIANCA PROPIEDAD HORIZONTAL</text:p>
          </table:table-cell>
          <table:table-cell table:style-name="ce1" office:value-type="string" calcext:value-type="string">
            <text:p>AVIANCA</text:p>
          </table:table-cell>
          <table:table-cell table:style-name="ce1" office:value-type="string" calcext:value-type="string">
            <text:p>SEDE MOSQUERA; RAFAEL TRIANA; CRA7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809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2826" calcext:value-type="float">
            <text:p>4652826</text:p>
          </table:table-cell>
          <table:table-cell table:style-name="ce1" office:value-type="float" office:value="-7405641" calcext:value-type="float">
            <text:p>-740564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8:57" calcext:value-type="date">
            <text:p>14/07/26 15:08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BANCO DE OCCIDENTE</text:p>
          </table:table-cell>
          <table:table-cell table:style-name="ce1" office:value-type="string" calcext:value-type="string">
            <text:p>EDIFICIO BANCO DE OCCIDENTE POBLADO ACEIS</text:p>
          </table:table-cell>
          <table:table-cell table:style-name="ce1" office:value-type="string" calcext:value-type="string">
            <text:p>SEDE MEDELLIN; POBLAD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277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0663" calcext:value-type="float">
            <text:p>6200663</text:p>
          </table:table-cell>
          <table:table-cell table:style-name="ce1" office:value-type="float" office:value="-755723" calcext:value-type="float">
            <text:p>-75572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0T18:58:03" calcext:value-type="date">
            <text:p>10/07/26 18:58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BANCOLOMBIA LA PLAYA</text:p>
          </table:table-cell>
          <table:table-cell table:style-name="ce1" office:value-type="string" calcext:value-type="string">
            <text:p>EDIFICIO BANCOLOMBIA LA PLAYA P.H. ACEIS</text:p>
          </table:table-cell>
          <table:table-cell table:style-name="ce1" office:value-type="string" calcext:value-type="string">
            <text:p>SEDE MEDELLIN; LAPLAY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278</text:p>
          </table:table-cell>
          <table:table-cell table:style-name="ce1" office:value-type="float" office:value="5.71011014028875E+016" calcext:value-type="float">
            <text:p>5,71011014028875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47" calcext:value-type="float">
            <text:p>6247</text:p>
          </table:table-cell>
          <table:table-cell table:style-name="ce1" office:value-type="float" office:value="-75559" calcext:value-type="float">
            <text:p>-7555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4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BBVA</text:p>
          </table:table-cell>
          <table:table-cell table:style-name="ce1" office:value-type="string" calcext:value-type="string">
            <text:p>EDIFICIO BBVA EL POBLADO ACEIS</text:p>
          </table:table-cell>
          <table:table-cell table:style-name="ce1" office:value-type="string" calcext:value-type="string">
            <text:p>SEDE MEDELLIN; ELPOBLAD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279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2815" calcext:value-type="float">
            <text:p>6202815</text:p>
          </table:table-cell>
          <table:table-cell table:style-name="ce1" office:value-type="float" office:value="-75571789" calcext:value-type="float">
            <text:p>-7557178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BLUE TOWER KPMG PEAT MARWICK PH</text:p>
          </table:table-cell>
          <table:table-cell table:style-name="ce1" office:value-type="string" calcext:value-type="string">
            <text:p>EDIFICIO BLUE TOWER KPMG</text:p>
          </table:table-cell>
          <table:table-cell table:style-name="ce1" office:value-type="string" calcext:value-type="string">
            <text:p>SEDE MOSQUERA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817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76" calcext:value-type="float">
            <text:p>4676</text:p>
          </table:table-cell>
          <table:table-cell table:style-name="ce1" office:value-type="float" office:value="-74056" calcext:value-type="float">
            <text:p>-7405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6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BOGOTA CORPORATE CENTER - UNE - MARSH</text:p>
          </table:table-cell>
          <table:table-cell table:style-name="ce1" office:value-type="string" calcext:value-type="string">
            <text:p>BOGOTA CORPORATE CENTER GEN01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AMF-9|Trifasico</text:p>
          </table:table-cell>
          <table:table-cell table:style-name="ce1" office:value-type="string" calcext:value-type="string">
            <text:p>AMF9</text:p>
          </table:table-cell>
          <table:table-cell table:style-name="ce1" office:value-type="string" calcext:value-type="string">
            <text:p>MOVISTAR M2M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93281" calcext:value-type="float">
            <text:p>46593281</text:p>
          </table:table-cell>
          <table:table-cell table:style-name="ce1" office:value-type="float" office:value="-741085356" calcext:value-type="float">
            <text:p>-74108535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BOGOTA CORPORATE CENTER - UNE - MARSH</text:p>
          </table:table-cell>
          <table:table-cell table:style-name="ce1" office:value-type="string" calcext:value-type="string">
            <text:p>BOGOTA CORPORATE CENTER GEN02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AMF-9|Trifasico</text:p>
          </table:table-cell>
          <table:table-cell table:style-name="ce1" office:value-type="string" calcext:value-type="string">
            <text:p>RTMBOX003</text:p>
          </table:table-cell>
          <table:table-cell table:number-columns-repeated="2"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93281" calcext:value-type="float">
            <text:p>46593281</text:p>
          </table:table-cell>
          <table:table-cell table:style-name="ce1" office:value-type="float" office:value="-741085356" calcext:value-type="float">
            <text:p>-74108535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8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BOGOTA CORPORATE CENTER - UNE - MARSH</text:p>
          </table:table-cell>
          <table:table-cell table:style-name="ce1" office:value-type="string" calcext:value-type="string">
            <text:p>BOGOTA CORPORATE CENTER GEN03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AMF-9|Trifasico</text:p>
          </table:table-cell>
          <table:table-cell table:style-name="ce1" office:value-type="string" calcext:value-type="string">
            <text:p>RTMBOX003</text:p>
          </table:table-cell>
          <table:table-cell table:number-columns-repeated="2"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93281" calcext:value-type="float">
            <text:p>46593281</text:p>
          </table:table-cell>
          <table:table-cell table:style-name="ce1" office:value-type="float" office:value="-741085356" calcext:value-type="float">
            <text:p>-74108535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8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C75-PROPIEDAD HORIZONTAL</text:p>
          </table:table-cell>
          <table:table-cell table:style-name="ce1" office:value-type="string" calcext:value-type="string">
            <text:p>EDIFICIO C75</text:p>
          </table:table-cell>
          <table:table-cell table:style-name="ce1" office:value-type="string" calcext:value-type="string">
            <text:p>SEDE MOSQUER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818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8554" calcext:value-type="float">
            <text:p>4658554</text:p>
          </table:table-cell>
          <table:table-cell table:style-name="ce1" office:value-type="float" office:value="-74053034" calcext:value-type="float">
            <text:p>-7405303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CALLE 120 - PROPIEDAD HORIZONTAL</text:p>
          </table:table-cell>
          <table:table-cell table:style-name="ce1" office:value-type="string" calcext:value-type="string">
            <text:p>EDIFICIO 120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OVISTAR M2M</text:p>
          </table:table-cell>
          <table:table-cell table:style-name="ce1" office:value-type="float" office:value="8.93407610014978E+018" calcext:value-type="float">
            <text:p>8,93407610014978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7575368112382" calcext:value-type="float">
            <text:p>17575368112382</text:p>
          </table:table-cell>
          <table:table-cell table:style-name="ce1" office:value-type="float" office:value="-74179687497038" calcext:value-type="float">
            <text:p>-7417968749703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09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CASA DEL BOQUETILLO</text:p>
          </table:table-cell>
          <table:table-cell table:style-name="ce1" office:value-type="string" calcext:value-type="string">
            <text:p>CASA BOQUETILLO GEN01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BQL-0172</text:p>
          </table:table-cell>
          <table:table-cell/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28332" calcext:value-type="float">
            <text:p>10428332</text:p>
          </table:table-cell>
          <table:table-cell table:style-name="ce1" office:value-type="float" office:value="-75548955" calcext:value-type="float">
            <text:p>-7554895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5-29T16:25:35" calcext:value-type="date">
            <text:p>29/05/23 16:25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CENTRO COMERCIAL Y DE NEGOCIOS TORRE CENTRAL</text:p>
          </table:table-cell>
          <table:table-cell table:style-name="ce1" office:value-type="string" calcext:value-type="string">
            <text:p>TORRE CENTRAL GEN 1 MTS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783</text:p>
          </table:table-cell>
          <table:table-cell table:style-name="ce1" office:value-type="float" office:value="5.71015019120933E+016" calcext:value-type="float">
            <text:p>5,71015019120933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6393" calcext:value-type="float">
            <text:p>4656393</text:p>
          </table:table-cell>
          <table:table-cell table:style-name="ce1" office:value-type="float" office:value="-74107205" calcext:value-type="float">
            <text:p>-7410720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CENTRO COMERCIAL Y DE NEGOCIOS TORRE CENTRAL</text:p>
          </table:table-cell>
          <table:table-cell table:style-name="ce1" office:value-type="string" calcext:value-type="string">
            <text:p>TORRE CENTRAL GEN 2 MTS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784</text:p>
          </table:table-cell>
          <table:table-cell table:style-name="ce1" office:value-type="float" office:value="5.71015019120933E+016" calcext:value-type="float">
            <text:p>5,71015019120933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6395" calcext:value-type="float">
            <text:p>4656395</text:p>
          </table:table-cell>
          <table:table-cell table:style-name="ce1" office:value-type="float" office:value="-74107207" calcext:value-type="float">
            <text:p>-7410720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CENTRO COMERCIAL Y DE NEGOCIOS TORRE CENTRAL</text:p>
          </table:table-cell>
          <table:table-cell table:style-name="ce1" office:value-type="string" calcext:value-type="string">
            <text:p>TORRE CENTRAL GEN 3 MTS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785</text:p>
          </table:table-cell>
          <table:table-cell table:style-name="ce1" office:value-type="float" office:value="5.71015019120933E+016" calcext:value-type="float">
            <text:p>5,71015019120933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6397" calcext:value-type="float">
            <text:p>4656397</text:p>
          </table:table-cell>
          <table:table-cell table:style-name="ce1" office:value-type="float" office:value="-74107209" calcext:value-type="float">
            <text:p>-7410720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CENTRO COMERCIAL Y DE NEGOCIOS TORRE CENTRAL</text:p>
          </table:table-cell>
          <table:table-cell table:style-name="ce1" office:value-type="string" calcext:value-type="string">
            <text:p>TORRE CENTRAL GEN 4 MTS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785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6391" calcext:value-type="float">
            <text:p>4656391</text:p>
          </table:table-cell>
          <table:table-cell table:style-name="ce1" office:value-type="float" office:value="-74107203" calcext:value-type="float">
            <text:p>-7410720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CENTRO EMPRESARIAL PARALELO 26 PH</text:p>
          </table:table-cell>
          <table:table-cell table:style-name="ce1" office:value-type="string" calcext:value-type="string">
            <text:p>MTS PARALELO 26 GEN 1 900 KW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821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89352" calcext:value-type="float">
            <text:p>46589352</text:p>
          </table:table-cell>
          <table:table-cell table:style-name="ce1" office:value-type="float" office:value="-741069148" calcext:value-type="float">
            <text:p>-74106914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CENTRO EMPRESARIAL PARALELO 26 PH</text:p>
          </table:table-cell>
          <table:table-cell table:style-name="ce1" office:value-type="string" calcext:value-type="string">
            <text:p>MTS PARALELO 26 GEN 2 750 KW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822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89352" calcext:value-type="float">
            <text:p>46589352</text:p>
          </table:table-cell>
          <table:table-cell table:style-name="ce1" office:value-type="float" office:value="-741069148" calcext:value-type="float">
            <text:p>-74106914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CENTRO EMPRESARIAL PARALELO 26 PH</text:p>
          </table:table-cell>
          <table:table-cell table:style-name="ce1" office:value-type="string" calcext:value-type="string">
            <text:p>MTS PARALELO 26 GEN 3 500 KW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823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89352" calcext:value-type="float">
            <text:p>46589352</text:p>
          </table:table-cell>
          <table:table-cell table:style-name="ce1" office:value-type="float" office:value="-741069148" calcext:value-type="float">
            <text:p>-74106914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CITY BUSINESS PRIMERA ETAPA PH</text:p>
          </table:table-cell>
          <table:table-cell table:style-name="ce1" office:value-type="string" calcext:value-type="string">
            <text:p>BOCACOLINA 100 GEN01</text:p>
          </table:table-cell>
          <table:table-cell table:style-name="ce1" office:value-type="string" calcext:value-type="string">
            <text:p>SEDE MOSQUERA; NELSON ROMERO; BOCACOLINA 100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mkit-1|Análogo</text:p>
          </table:table-cell>
          <table:table-cell table:style-name="ce1" office:value-type="string" calcext:value-type="string">
            <text:p>Camkit1 Analogo</text:p>
          </table:table-cell>
          <table:table-cell table:style-name="ce1" office:value-type="string" calcext:value-type="string">
            <text:p>BOG0828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5348" calcext:value-type="float">
            <text:p>4685348</text:p>
          </table:table-cell>
          <table:table-cell table:style-name="ce1" office:value-type="float" office:value="-74056283" calcext:value-type="float">
            <text:p>-7405628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38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CITY BUSINESS PRIMERA ETAPA PH</text:p>
          </table:table-cell>
          <table:table-cell table:style-name="ce1" office:value-type="string" calcext:value-type="string">
            <text:p>BOCACOLINA 100 GEN02</text:p>
          </table:table-cell>
          <table:table-cell table:style-name="ce1" office:value-type="string" calcext:value-type="string">
            <text:p>SEDE MOSQUERA; NELSON ROMERO; BOCACOLINA 100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mkit-1|Análogo</text:p>
          </table:table-cell>
          <table:table-cell table:style-name="ce1" office:value-type="string" calcext:value-type="string">
            <text:p>Camkit1 Analogo</text:p>
          </table:table-cell>
          <table:table-cell table:style-name="ce1" office:value-type="string" calcext:value-type="string">
            <text:p>BOG0829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4853" calcext:value-type="float">
            <text:p>4684853</text:p>
          </table:table-cell>
          <table:table-cell table:style-name="ce1" office:value-type="float" office:value="-7405641" calcext:value-type="float">
            <text:p>-740564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40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CITY BUSINESS PRIMERA ETAPA PH</text:p>
          </table:table-cell>
          <table:table-cell table:style-name="ce1" office:value-type="string" calcext:value-type="string">
            <text:p>BOCACOLINA 100 GEN03</text:p>
          </table:table-cell>
          <table:table-cell table:style-name="ce1" office:value-type="string" calcext:value-type="string">
            <text:p>SEDE MOSQUERA; NELSON ROMERO; BOCACOLINA 100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mkit-1|Análogo</text:p>
          </table:table-cell>
          <table:table-cell table:style-name="ce1" office:value-type="string" calcext:value-type="string">
            <text:p>Camkit1 Analogo</text:p>
          </table:table-cell>
          <table:table-cell table:style-name="ce1" office:value-type="string" calcext:value-type="string">
            <text:p>BOG0830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4906" calcext:value-type="float">
            <text:p>4684906</text:p>
          </table:table-cell>
          <table:table-cell table:style-name="ce1" office:value-type="float" office:value="-7405626" calcext:value-type="float">
            <text:p>-740562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40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CITY MÉDICA - PROPIEDAD HORIZONTAL</text:p>
          </table:table-cell>
          <table:table-cell table:style-name="ce1" office:value-type="string" calcext:value-type="string">
            <text:p>CITY MEDICA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604</text:p>
          </table:table-cell>
          <table:table-cell table:style-name="ce1" office:value-type="float" office:value="5.71017025030877E+016" calcext:value-type="float">
            <text:p>5,71017025030877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40138" calcext:value-type="float">
            <text:p>6140138</text:p>
          </table:table-cell>
          <table:table-cell table:style-name="ce1" office:value-type="float" office:value="-7537861" calcext:value-type="float">
            <text:p>-753786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CLINICA COA CONSULTORIOS DEL SUR PH</text:p>
          </table:table-cell>
          <table:table-cell table:style-name="ce1" office:value-type="string" calcext:value-type="string">
            <text:p>EDIFICIO CLINICA COA ACEIS</text:p>
          </table:table-cell>
          <table:table-cell table:style-name="ce1" office:value-type="string" calcext:value-type="string">
            <text:p>SEDE MEDELLIN; CLINICA COA; ACEI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601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65873" calcext:value-type="float">
            <text:p>6165873</text:p>
          </table:table-cell>
          <table:table-cell table:style-name="ce1" office:value-type="float" office:value="-75600226" calcext:value-type="float">
            <text:p>-75600226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6-22T10:56:47" calcext:value-type="date">
            <text:p>22/06/26 10:56</text:p>
          </table:table-cell>
          <table:table-cell table:style-name="ce4" office:value-type="date" office:date-value="2026-07-14T15:10:1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CLINICA MEDELLIN EL POBLADO PH ACEIS</text:p>
          </table:table-cell>
          <table:table-cell table:style-name="ce1" office:value-type="string" calcext:value-type="string">
            <text:p>CLINICA MEDELLIN EL POBLADO PH GEN CLINICA ACEIS</text:p>
          </table:table-cell>
          <table:table-cell table:style-name="ce1" office:value-type="string" calcext:value-type="string">
            <text:p>SEDE MEDELLIN; CLINIC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296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6208" calcext:value-type="float">
            <text:p>6206208</text:p>
          </table:table-cell>
          <table:table-cell table:style-name="ce1" office:value-type="float" office:value="-75570794" calcext:value-type="float">
            <text:p>-7557079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CLINICA MEDELLIN EL POBLADO PH ACEIS</text:p>
          </table:table-cell>
          <table:table-cell table:style-name="ce1" office:value-type="string" calcext:value-type="string">
            <text:p>CLINICA MEDELLIN EL POBLADO PH GEN EDIFICIO ACEIS</text:p>
          </table:table-cell>
          <table:table-cell table:style-name="ce1" office:value-type="string" calcext:value-type="string">
            <text:p>SEDE MEDELLIN; EDIFIC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295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6319" calcext:value-type="float">
            <text:p>6206319</text:p>
          </table:table-cell>
          <table:table-cell table:style-name="ce1" office:value-type="float" office:value="-75570627" calcext:value-type="float">
            <text:p>-7557062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CORFINSURA</text:p>
          </table:table-cell>
          <table:table-cell table:style-name="ce1" office:value-type="string" calcext:value-type="string">
            <text:p>EDIFICIO CORFINSURA ZONAS COMUNES ACEIS</text:p>
          </table:table-cell>
          <table:table-cell table:style-name="ce1" office:value-type="string" calcext:value-type="string">
            <text:p>SEDE MEDELLIN; ZONASCOMUNE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302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4491" calcext:value-type="float">
            <text:p>6204491</text:p>
          </table:table-cell>
          <table:table-cell table:style-name="ce1" office:value-type="float" office:value="-75571223" calcext:value-type="float">
            <text:p>-7557122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CORFINSURA</text:p>
          </table:table-cell>
          <table:table-cell table:style-name="ce1" office:value-type="string" calcext:value-type="string">
            <text:p>EDIFICIO CORFINSURA ZONAS PRIVADAS ACEIS</text:p>
          </table:table-cell>
          <table:table-cell table:style-name="ce1" office:value-type="string" calcext:value-type="string">
            <text:p>SEDE MEDELLIN; ZONASPRIVADAS; RODOLFO VELEZ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301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4488" calcext:value-type="float">
            <text:p>6204488</text:p>
          </table:table-cell>
          <table:table-cell table:style-name="ce1" office:value-type="float" office:value="-75571289" calcext:value-type="float">
            <text:p>-7557128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9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ECOTOWER 93 PROPIEDAD HORIZONTAL</text:p>
          </table:table-cell>
          <table:table-cell table:style-name="ce1" office:value-type="string" calcext:value-type="string">
            <text:p>EDIFICIO ECOTOWER MTS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082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77" calcext:value-type="float">
            <text:p>4677</text:p>
          </table:table-cell>
          <table:table-cell table:style-name="ce1" office:value-type="float" office:value="-74053" calcext:value-type="float">
            <text:p>-7405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6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FUTURA-PROPIEDAD HORIZONTAL</text:p>
          </table:table-cell>
          <table:table-cell table:style-name="ce1" office:value-type="string" calcext:value-type="string">
            <text:p>EDIFICIO FUTURA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843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77476" calcext:value-type="float">
            <text:p>4677476</text:p>
          </table:table-cell>
          <table:table-cell table:style-name="ce1" office:value-type="float" office:value="-7404888" calcext:value-type="float">
            <text:p>-740488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9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GRANAHORRAR</text:p>
          </table:table-cell>
          <table:table-cell table:style-name="ce1" office:value-type="string" calcext:value-type="string">
            <text:p>EDIFICIO CENTRO GRANAHORRAR ACEIS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290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629" calcext:value-type="float">
            <text:p>620629</text:p>
          </table:table-cell>
          <table:table-cell table:style-name="ce1" office:value-type="float" office:value="-75571395" calcext:value-type="float">
            <text:p>-7557139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GREEN OFFICE CORPORATIVO PIJAO PH</text:p>
          </table:table-cell>
          <table:table-cell table:style-name="ce1" office:value-type="string" calcext:value-type="string">
            <text:p>EDIFICIO GREEN OFFICE TORRE A MTS</text:p>
          </table:table-cell>
          <table:table-cell table:style-name="ce1" office:value-type="string" calcext:value-type="string">
            <text:p>SEDE MOSQUERA; RAFAEL TRIANA; GREEN OFFICE; MT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781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1242" calcext:value-type="float">
            <text:p>4681242</text:p>
          </table:table-cell>
          <table:table-cell table:style-name="ce1" office:value-type="float" office:value="-74044357" calcext:value-type="float">
            <text:p>-7404435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GREEN OFFICE CORPORATIVO PIJAO PH</text:p>
          </table:table-cell>
          <table:table-cell table:style-name="ce1" office:value-type="string" calcext:value-type="string">
            <text:p>EDIFICIO GREEN OFFICE TORRE B MTS</text:p>
          </table:table-cell>
          <table:table-cell table:style-name="ce1" office:value-type="string" calcext:value-type="string">
            <text:p>SEDE MOSQUERA; RAFAEL TRIANA; GREEN OFFICE; MT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780 / IP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1244" calcext:value-type="float">
            <text:p>4681244</text:p>
          </table:table-cell>
          <table:table-cell table:style-name="ce1" office:value-type="float" office:value="-74044355" calcext:value-type="float">
            <text:p>-7404435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GREEN OFFICE CORPORATIVO PIJAO PH</text:p>
          </table:table-cell>
          <table:table-cell table:style-name="ce1" office:value-type="string" calcext:value-type="string">
            <text:p>EDIFICIO GREEN OFFICE ZONAS COMUNES MTS</text:p>
          </table:table-cell>
          <table:table-cell table:style-name="ce1" office:value-type="string" calcext:value-type="string">
            <text:p>SEDE MOSQUERA; RAFAEL TRIANA; GREEN OFFICE; MT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782 / IP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1246" calcext:value-type="float">
            <text:p>4681246</text:p>
          </table:table-cell>
          <table:table-cell table:style-name="ce1" office:value-type="float" office:value="-74044356" calcext:value-type="float">
            <text:p>-7404435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6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GREEN OFFICE CORPORATIVO PIJAO PH</text:p>
          </table:table-cell>
          <table:table-cell table:style-name="ce1" office:value-type="string" calcext:value-type="string">
            <text:p>MTS ASOBANCARIA 500KW (TEST)</text:p>
          </table:table-cell>
          <table:table-cell table:style-name="ce1" office:value-type="string" calcext:value-type="string">
            <text:p>SEDE MOSQUERA; RAFAEL TRIANA; GREEN OFFICE; MTS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mkit-1|Deepsea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BOG1870</text:p>
          </table:table-cell>
          <table:table-cell/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11331" calcext:value-type="float">
            <text:p>46811331</text:p>
          </table:table-cell>
          <table:table-cell table:style-name="ce1" office:value-type="float" office:value="-740465907" calcext:value-type="float">
            <text:p>-74046590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09T15:53:00" calcext:value-type="date">
            <text:p>09/07/26 15:5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EDIFICIO LAS VILLAS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4084094E+016" calcext:value-type="float">
            <text:p>5,71017024084094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6.2098</text:p>
          </table:table-cell>
          <table:table-cell table:style-name="ce1" office:value-type="float" office:value="-75571072" calcext:value-type="float">
            <text:p>-7557107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4:55:59" calcext:value-type="date">
            <text:p>14/07/26 14:55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EDIFICIO MARA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181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254383" calcext:value-type="float">
            <text:p>11254383</text:p>
          </table:table-cell>
          <table:table-cell table:style-name="ce1" office:value-type="float" office:value="-74203212" calcext:value-type="float">
            <text:p>-7420321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MIXTO MEDICAL PH</text:p>
          </table:table-cell>
          <table:table-cell table:style-name="ce1" office:value-type="string" calcext:value-type="string">
            <text:p>EDIFICIO MIXTO MEDICAL ACEIS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4033077E+016" calcext:value-type="float">
            <text:p>5,71017024033077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6589" calcext:value-type="float">
            <text:p>6206589</text:p>
          </table:table-cell>
          <table:table-cell table:style-name="ce1" office:value-type="float" office:value="-75568999" calcext:value-type="float">
            <text:p>-7556899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08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MORROS</text:p>
          </table:table-cell>
          <table:table-cell table:style-name="ce1" office:value-type="string" calcext:value-type="string">
            <text:p>EDIFICIO MORROS 3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405</text:p>
          </table:table-cell>
          <table:table-cell table:style-name="ce1" office:value-type="float" office:value="5.71015018046169E+016" calcext:value-type="float">
            <text:p>5,71015018046169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75436" calcext:value-type="float">
            <text:p>10475436</text:p>
          </table:table-cell>
          <table:table-cell table:style-name="ce1" office:value-type="float" office:value="-75494374" calcext:value-type="float">
            <text:p>-7549437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MORROS EPIC</text:p>
          </table:table-cell>
          <table:table-cell table:style-name="ce1" office:value-type="string" calcext:value-type="string">
            <text:p>EDIFICIO MORROS EPIC GEN 01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189</text:p>
          </table:table-cell>
          <table:table-cell table:style-name="ce1" office:value-type="float" office:value="5.71014017033664E+016" calcext:value-type="float">
            <text:p>5,71014017033664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65438" calcext:value-type="float">
            <text:p>10465438</text:p>
          </table:table-cell>
          <table:table-cell table:style-name="ce1" office:value-type="float" office:value="-75501074" calcext:value-type="float">
            <text:p>-7550107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0-12-08T15:00:15" calcext:value-type="date">
            <text:p>08/12/20 15:0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NEXSO PROPIEDAD HORIZONTAL</text:p>
          </table:table-cell>
          <table:table-cell table:style-name="ce1" office:value-type="string" calcext:value-type="string">
            <text:p>EDIFICIO NEXSO</text:p>
          </table:table-cell>
          <table:table-cell table:style-name="ce1" office:value-type="string" calcext:value-type="string">
            <text:p>SEDE MOSQUER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852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90908" calcext:value-type="float">
            <text:p>4690908</text:p>
          </table:table-cell>
          <table:table-cell table:style-name="ce1" office:value-type="float" office:value="-74054157" calcext:value-type="float">
            <text:p>-7405415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PALMA REAL PROPIEDAD HORIZONTAL</text:p>
          </table:table-cell>
          <table:table-cell table:style-name="ce1" office:value-type="string" calcext:value-type="string">
            <text:p>EDIFICIO PALMA REAL</text:p>
          </table:table-cell>
          <table:table-cell table:style-name="ce1" office:value-type="string" calcext:value-type="string">
            <text:p>SEDE MOSQUERA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860</text:p>
          </table:table-cell>
          <table:table-cell table:style-name="ce1" office:value-type="float" office:value="8.93407720000166E+018" calcext:value-type="float">
            <text:p>8,93407720000166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15" calcext:value-type="float">
            <text:p>4615</text:p>
          </table:table-cell>
          <table:table-cell table:style-name="ce1" office:value-type="float" office:value="-74069" calcext:value-type="float">
            <text:p>-7406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14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PORTA 100 PH</text:p>
          </table:table-cell>
          <table:table-cell table:style-name="ce1" office:value-type="string" calcext:value-type="string">
            <text:p>EDIFICIO PORTA 100 MTS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775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6187" calcext:value-type="float">
            <text:p>4686187</text:p>
          </table:table-cell>
          <table:table-cell table:style-name="ce1" office:value-type="float" office:value="-74055289" calcext:value-type="float">
            <text:p>-7405528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PORTO 100 - PROPIEDAD HORIZONTAL</text:p>
          </table:table-cell>
          <table:table-cell table:style-name="ce1" office:value-type="string" calcext:value-type="string">
            <text:p>EDIFICIO PORTO 100 GEN1</text:p>
          </table:table-cell>
          <table:table-cell table:style-name="ce1" office:value-type="string" calcext:value-type="string">
            <text:p>SEDE MOSQUERA; EDIFICIO PORTO 100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864</text:p>
          </table:table-cell>
          <table:table-cell table:style-name="ce1" office:value-type="float" office:value="5.71015018077101E+016" calcext:value-type="float">
            <text:p>5,71015018077101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70960423414" calcext:value-type="float">
            <text:p>46870960423414</text:p>
          </table:table-cell>
          <table:table-cell table:style-name="ce1" office:value-type="float" office:value="-740547233819961" calcext:value-type="float">
            <text:p>-74054723381996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PORTO 100 - PROPIEDAD HORIZONTAL</text:p>
          </table:table-cell>
          <table:table-cell table:style-name="ce1" office:value-type="string" calcext:value-type="string">
            <text:p>EDIFICIO PORTO 100 GEN2</text:p>
          </table:table-cell>
          <table:table-cell table:style-name="ce1" office:value-type="string" calcext:value-type="string">
            <text:p>SEDE MOSQUERA; EDIFICIO PORTO 100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865</text:p>
          </table:table-cell>
          <table:table-cell table:style-name="ce1" office:value-type="float" office:value="5.71014016128791E+016" calcext:value-type="float">
            <text:p>5,71014016128791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69292990256" calcext:value-type="float">
            <text:p>46869292990256</text:p>
          </table:table-cell>
          <table:table-cell table:style-name="ce1" office:value-type="float" office:value="-740545946359634" calcext:value-type="float">
            <text:p>-74054594635963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EDIFICIO PORVENIR ACEIS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325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1" calcext:value-type="float">
            <text:p>6201</text:p>
          </table:table-cell>
          <table:table-cell table:style-name="ce1" office:value-type="float" office:value="-75572" calcext:value-type="float">
            <text:p>-7557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1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EDIFICIO PROYECTO PARQUE 86</text:p>
          </table:table-cell>
          <table:table-cell table:style-name="ce1" office:value-type="string" calcext:value-type="string">
            <text:p>SEDE MOSQUER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867</text:p>
          </table:table-cell>
          <table:table-cell table:style-name="ce1" office:value-type="float" office:value="8.93407510026199E+018" calcext:value-type="float">
            <text:p>8,93407510026199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69" calcext:value-type="float">
            <text:p>4669</text:p>
          </table:table-cell>
          <table:table-cell table:style-name="ce1" office:value-type="float" office:value="-74052" calcext:value-type="float">
            <text:p>-7405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1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QBO PH</text:p>
          </table:table-cell>
          <table:table-cell table:style-name="ce1" office:value-type="string" calcext:value-type="string">
            <text:p>EDIFICIO QBO MTS</text:p>
          </table:table-cell>
          <table:table-cell table:style-name="ce1" office:value-type="string" calcext:value-type="string">
            <text:p>SEDE MOSQUERA; RAFAEL TRIANA; QB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779</text:p>
          </table:table-cell>
          <table:table-cell table:style-name="ce1" office:value-type="string" calcext:value-type="string">
            <text:p>IP 172.20.28.5 NetMask 255.255.255.0 GateIP 172.20.28.1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77072" calcext:value-type="float">
            <text:p>4677072</text:p>
          </table:table-cell>
          <table:table-cell table:style-name="ce1" office:value-type="float" office:value="-7404943" calcext:value-type="float">
            <text:p>-740494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8:56" calcext:value-type="date">
            <text:p>14/07/26 15:08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TELEPORT BUSINESS PARK PH</text:p>
          </table:table-cell>
          <table:table-cell table:style-name="ce1" office:value-type="string" calcext:value-type="string">
            <text:p>TELEPORT TORRE A GEN 208 MTS</text:p>
          </table:table-cell>
          <table:table-cell table:style-name="ce1" office:value-type="string" calcext:value-type="string">
            <text:p>SEDE MOSQUERA; RAFAEL TRIANA; TELEPORT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787</text:p>
          </table:table-cell>
          <table:table-cell table:style-name="ce1" office:value-type="float" office:value="8.95202001929001E+018" calcext:value-type="float">
            <text:p>8,95202001929001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4.6915</text:p>
          </table:table-cell>
          <table:table-cell table:style-name="ce1" office:value-type="float" office:value="-74034817" calcext:value-type="float">
            <text:p>-7403481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4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TELEPORT BUSINESS PARK PH</text:p>
          </table:table-cell>
          <table:table-cell table:style-name="ce1" office:value-type="string" calcext:value-type="string">
            <text:p>TELEPORT TORRE A GEN 440 MTS</text:p>
          </table:table-cell>
          <table:table-cell table:style-name="ce1" office:value-type="string" calcext:value-type="string">
            <text:p>SEDE MOSQUERA; RAFAEL TRIANA; TELEPORT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788</text:p>
          </table:table-cell>
          <table:table-cell table:style-name="ce1" office:value-type="float" office:value="8.95202001929001E+018" calcext:value-type="float">
            <text:p>8,95202001929001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4.6915</text:p>
          </table:table-cell>
          <table:table-cell table:style-name="ce1" office:value-type="float" office:value="-74034817" calcext:value-type="float">
            <text:p>-7403481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0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TELEPORT BUSINESS PARK PH</text:p>
          </table:table-cell>
          <table:table-cell table:style-name="ce1" office:value-type="string" calcext:value-type="string">
            <text:p>TELEPORT TORRE B GEN 208 MTS</text:p>
          </table:table-cell>
          <table:table-cell table:style-name="ce1" office:value-type="string" calcext:value-type="string">
            <text:p>SEDE MOSQUERA; RAFAEL TRIANA; TELEPORT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789</text:p>
          </table:table-cell>
          <table:table-cell table:style-name="ce1" office:value-type="float" office:value="8.95202001929001E+018" calcext:value-type="float">
            <text:p>8,95202001929001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4.6915</text:p>
          </table:table-cell>
          <table:table-cell table:style-name="ce1" office:value-type="float" office:value="-74034817" calcext:value-type="float">
            <text:p>-7403481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6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TERPEL PROPIEDAD HORIZONTAL</text:p>
          </table:table-cell>
          <table:table-cell table:style-name="ce1" office:value-type="string" calcext:value-type="string">
            <text:p>EDIFICIO TERPEL</text:p>
          </table:table-cell>
          <table:table-cell table:style-name="ce1" office:value-type="string" calcext:value-type="string">
            <text:p>SEDE MOSQUERA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877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8384" calcext:value-type="float">
            <text:p>4658384</text:p>
          </table:table-cell>
          <table:table-cell table:style-name="ce1" office:value-type="float" office:value="-7405308" calcext:value-type="float">
            <text:p>-740530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TORRE ALMAGRAN</text:p>
          </table:table-cell>
          <table:table-cell table:style-name="ce1" office:value-type="string" calcext:value-type="string">
            <text:p>EDIFICIO TORRE ALMAGRAN ACEIS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1014028875E+016" calcext:value-type="float">
            <text:p>5,71011014028875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8638" calcext:value-type="float">
            <text:p>6208638</text:p>
          </table:table-cell>
          <table:table-cell table:style-name="ce1" office:value-type="float" office:value="-75572427" calcext:value-type="float">
            <text:p>-7557242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TORRE CONCASA PH</text:p>
          </table:table-cell>
          <table:table-cell table:style-name="ce1" office:value-type="string" calcext:value-type="string">
            <text:p>EDIFICIO TORRE CONCASA PH ACEIS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344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5" calcext:value-type="float">
            <text:p>6205</text:p>
          </table:table-cell>
          <table:table-cell table:style-name="ce1" office:value-type="float" office:value="-75571" calcext:value-type="float">
            <text:p>-7557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EDIFICIO TORRE INTERMEDICA ACEIS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273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6245" calcext:value-type="float">
            <text:p>6206245</text:p>
          </table:table-cell>
          <table:table-cell table:style-name="ce1" office:value-type="float" office:value="-75570739" calcext:value-type="float">
            <text:p>-7557073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09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WORLD BUSINESS CENTER PH</text:p>
          </table:table-cell>
          <table:table-cell table:style-name="ce1" office:value-type="string" calcext:value-type="string">
            <text:p>EDIFICIO WBC GEN01 MTS</text:p>
          </table:table-cell>
          <table:table-cell table:style-name="ce1" office:value-type="string" calcext:value-type="string">
            <text:p>SEDE MOSQUERA; RAFAEL TRIANA; WBC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889</text:p>
          </table:table-cell>
          <table:table-cell table:style-name="ce1" office:value-type="string" calcext:value-type="string">
            <text:p>ip 192.168.0.119 NetMask 255.255.255.0 GateIP 192.168.0.1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0949" calcext:value-type="float">
            <text:p>4680949</text:p>
          </table:table-cell>
          <table:table-cell table:style-name="ce1" office:value-type="float" office:value="-74117262" calcext:value-type="float">
            <text:p>-7411726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DIFICIO WORLD BUSINESS CENTER PH</text:p>
          </table:table-cell>
          <table:table-cell table:style-name="ce1" office:value-type="string" calcext:value-type="string">
            <text:p>EDIFICIO WBC GEN02 MTS</text:p>
          </table:table-cell>
          <table:table-cell table:style-name="ce1" office:value-type="string" calcext:value-type="string">
            <text:p>SEDE MOSQUERA; RAFAEL TRIANA; WBC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890</text:p>
          </table:table-cell>
          <table:table-cell table:style-name="ce1" office:value-type="string" calcext:value-type="string">
            <text:p>IP 192.168.0.120 NetMask 255.255.255.0 GateIP 192.168.0.1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0947" calcext:value-type="float">
            <text:p>4680947</text:p>
          </table:table-cell>
          <table:table-cell table:style-name="ce1" office:value-type="float" office:value="-7411726" calcext:value-type="float">
            <text:p>-741172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MPRESA DE ENERGIA DEL PACIFICO S.A. ESP</text:p>
          </table:table-cell>
          <table:table-cell table:style-name="ce1" office:value-type="string" calcext:value-type="string">
            <text:p>HOTEL SANTA CLARA (test)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CC2.X-3.X|Trifasico|24VDC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BQL-0924</text:p>
          </table:table-cell>
          <table:table-cell table:style-name="ce1" office:value-type="float" office:value="8.93407650000414E+018" calcext:value-type="float">
            <text:p>8,93407650000414E+018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287211" calcext:value-type="float">
            <text:p>104287211</text:p>
          </table:table-cell>
          <table:table-cell table:style-name="ce1" office:value-type="float" office:value="-755477392" calcext:value-type="float">
            <text:p>-755477392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3-05T00:27:53" calcext:value-type="date">
            <text:p>05/03/26 00:27</text:p>
          </table:table-cell>
          <table:table-cell table:style-name="ce4" office:value-type="date" office:date-value="2026-07-14T15:09:39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EMPRESA DE ENERGIA DEL PACIFICO S.A. ESP</text:p>
          </table:table-cell>
          <table:table-cell table:style-name="ce1" office:value-type="string" calcext:value-type="string">
            <text:p>SERENA DEL MAR- DISTRITO TÉRMICO GEN 750 KW</text:p>
          </table:table-cell>
          <table:table-cell table:style-name="ce1" office:value-type="string" calcext:value-type="string">
            <text:p>SEDE BARRANQUILLA; SERENA DEL MAR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559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5052926" calcext:value-type="float">
            <text:p>105052926</text:p>
          </table:table-cell>
          <table:table-cell table:style-name="ce1" office:value-type="float" office:value="-754678437" calcext:value-type="float">
            <text:p>-75467843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03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ALABELLA DE COLOMBIA S A</text:p>
          </table:table-cell>
          <table:table-cell table:style-name="ce1" office:value-type="string" calcext:value-type="string">
            <text:p>FALABELLA CARTAGENA MALL PLAZA</text:p>
          </table:table-cell>
          <table:table-cell table:style-name="ce1" office:value-type="string" calcext:value-type="string">
            <text:p>SEDE BARRANQUILLA; MALL PLAZ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432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24973" calcext:value-type="float">
            <text:p>10424973</text:p>
          </table:table-cell>
          <table:table-cell table:style-name="ce1" office:value-type="float" office:value="-75540753" calcext:value-type="float">
            <text:p>-7554075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2-08-30T17:57:04" calcext:value-type="date">
            <text:p>30/08/22 17:57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ALABELLA DE COLOMBIA S A</text:p>
          </table:table-cell>
          <table:table-cell table:style-name="ce1" office:value-type="string" calcext:value-type="string">
            <text:p>FALABELLA CENTRO MAYOR</text:p>
          </table:table-cell>
          <table:table-cell table:style-name="ce1" office:value-type="string" calcext:value-type="string">
            <text:p>SEDE MOSQUERA; FALABELLA CENTRO MAYOR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913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5916111494331" calcext:value-type="float">
            <text:p>45916111494331</text:p>
          </table:table-cell>
          <table:table-cell table:style-name="ce1" office:value-type="float" office:value="-74123983380213" calcext:value-type="float">
            <text:p>-7412398338021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ALABELLA DE COLOMBIA S A</text:p>
          </table:table-cell>
          <table:table-cell table:style-name="ce1" office:value-type="string" calcext:value-type="string">
            <text:p>FALABELLA IBAGUE</text:p>
          </table:table-cell>
          <table:table-cell table:style-name="ce1" office:value-type="string" calcext:value-type="string">
            <text:p>SEDE IBAGUE; JUAN RICARDO HINCAPIE; FALABELLA IBAGU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IBG0186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4409434" calcext:value-type="float">
            <text:p>44409434</text:p>
          </table:table-cell>
          <table:table-cell table:style-name="ce1" office:value-type="float" office:value="-752065758" calcext:value-type="float">
            <text:p>-75206575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10-23T02:27:06" calcext:value-type="date">
            <text:p>23/10/23 02:27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ALABELLA DE COLOMBIA S A</text:p>
          </table:table-cell>
          <table:table-cell table:style-name="ce1" office:value-type="string" calcext:value-type="string">
            <text:p>FALABELLA JARDÍN PLAZA</text:p>
          </table:table-cell>
          <table:table-cell table:style-name="ce1" office:value-type="string" calcext:value-type="string">
            <text:p>SEDE CALI; FERNANDO MUÑOZ; JARDIN PLAZA; Alejandro Reye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AL0124</text:p>
          </table:table-cell>
          <table:table-cell table:style-name="ce1" office:value-type="float" office:value="8.93407510025853E+018" calcext:value-type="float">
            <text:p>8,93407510025853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3692357" calcext:value-type="float">
            <text:p>33692357</text:p>
          </table:table-cell>
          <table:table-cell table:style-name="ce1" office:value-type="float" office:value="-765297074" calcext:value-type="float">
            <text:p>-76529707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6-05T13:12:31" calcext:value-type="date">
            <text:p>05/06/23 13:1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ALABELLA DE COLOMBIA S A</text:p>
          </table:table-cell>
          <table:table-cell table:style-name="ce1" office:value-type="string" calcext:value-type="string">
            <text:p>FALABELLA MANIZALES</text:p>
          </table:table-cell>
          <table:table-cell table:style-name="ce1" office:value-type="string" calcext:value-type="string">
            <text:p>SEDE PEREIRA; MANIZALES; DANIEL OCAMPO; LA CARO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IBG0187 / Telcel</text:p>
          </table:table-cell>
          <table:table-cell table:style-name="ce1" office:value-type="float" office:value="8.95202001929001E+018" calcext:value-type="float">
            <text:p>8,95202001929001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066637" calcext:value-type="float">
            <text:p>5066637</text:p>
          </table:table-cell>
          <table:table-cell table:style-name="ce1" office:value-type="float" office:value="-75491106" calcext:value-type="float">
            <text:p>-75491106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6-22T12:24:46" calcext:value-type="date">
            <text:p>22/06/26 12:24</text:p>
          </table:table-cell>
          <table:table-cell table:style-name="ce4" office:value-type="date" office:date-value="2026-06-24T09:13:12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ALABELLA DE COLOMBIA S A</text:p>
          </table:table-cell>
          <table:table-cell table:style-name="ce1" office:value-type="string" calcext:value-type="string">
            <text:p>FALABELLA PARQUE ARBOLEDA</text:p>
          </table:table-cell>
          <table:table-cell table:style-name="ce1" office:value-type="string" calcext:value-type="string">
            <text:p>SEDE PEREIRA; DANIEL OCAMPO; PARQUE ARBOLED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IBG0188</text:p>
          </table:table-cell>
          <table:table-cell table:style-name="ce1" office:value-type="float" office:value="8.93407610014965E+018" calcext:value-type="float">
            <text:p>8,9340761001496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069969" calcext:value-type="float">
            <text:p>48069969</text:p>
          </table:table-cell>
          <table:table-cell table:style-name="ce1" office:value-type="float" office:value="-756838293" calcext:value-type="float">
            <text:p>-75683829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ALABELLA DE COLOMBIA S A</text:p>
          </table:table-cell>
          <table:table-cell table:style-name="ce1" office:value-type="string" calcext:value-type="string">
            <text:p>FALABELLA SAN DIEGO</text:p>
          </table:table-cell>
          <table:table-cell table:style-name="ce1" office:value-type="string" calcext:value-type="string">
            <text:p>SEDE MEDELLIN; SAN DIEG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361 / MOVISTAR M2M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35967" calcext:value-type="float">
            <text:p>6235967</text:p>
          </table:table-cell>
          <table:table-cell table:style-name="ce1" office:value-type="float" office:value="-75569455" calcext:value-type="float">
            <text:p>-7556945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ALABELLA DE COLOMBIA S A</text:p>
          </table:table-cell>
          <table:table-cell table:style-name="ce1" office:value-type="string" calcext:value-type="string">
            <text:p>FALABELLA TITAN PLAZA</text:p>
          </table:table-cell>
          <table:table-cell table:style-name="ce1" office:value-type="string" calcext:value-type="string">
            <text:p>SEDE MOSQUERA; FALABELLA TITAN PLAZ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917 / MOVISTAR</text:p>
          </table:table-cell>
          <table:table-cell table:style-name="ce1" office:value-type="float" office:value="8.93407610014407E+018" calcext:value-type="float">
            <text:p>8,93407610014407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946121479155" calcext:value-type="float">
            <text:p>46946121479155</text:p>
          </table:table-cell>
          <table:table-cell table:style-name="ce1" office:value-type="float" office:value="-74086196426824" calcext:value-type="float">
            <text:p>-74086196426824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7-07T10:31:03" calcext:value-type="date">
            <text:p>07/07/26 10:31</text:p>
          </table:table-cell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ALABELLA DE COLOMBIA S A</text:p>
          </table:table-cell>
          <table:table-cell table:style-name="ce1" office:value-type="string" calcext:value-type="string">
            <text:p>FALABELLA VILLAVICENCIO</text:p>
          </table:table-cell>
          <table:table-cell table:style-name="ce1" office:value-type="string" calcext:value-type="string">
            <text:p>SEDE MOSQUERA; RAFAEL TRIANA; FALABELLA VILLAVICENC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VVC0918 / CLARO</text:p>
          </table:table-cell>
          <table:table-cell table:style-name="ce1" office:value-type="string" calcext:value-type="string">
            <text:p>571014-01703296270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134715" calcext:value-type="float">
            <text:p>4134715</text:p>
          </table:table-cell>
          <table:table-cell table:style-name="ce1" office:value-type="float" office:value="-73640574" calcext:value-type="float">
            <text:p>-7364057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ONDO DE INVERSION COLECTIVA INMOBILIARIO INMOVAL</text:p>
          </table:table-cell>
          <table:table-cell table:style-name="ce1" office:value-type="string" calcext:value-type="string">
            <text:p>INMOVAL</text:p>
          </table:table-cell>
          <table:table-cell table:style-name="ce1" office:value-type="string" calcext:value-type="string">
            <text:p>SEDE MOSQUERA; RAFAEL TRIANA; INMOVAL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697</text:p>
          </table:table-cell>
          <table:table-cell table:style-name="ce1" office:value-type="float" office:value="5.71015019120967E+016" calcext:value-type="float">
            <text:p>5,71015019120967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77149" calcext:value-type="float">
            <text:p>4677149</text:p>
          </table:table-cell>
          <table:table-cell table:style-name="ce1" office:value-type="float" office:value="-740577" calcext:value-type="float">
            <text:p>-74057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8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RIGORIFICO METROPOLITANO SAS</text:p>
          </table:table-cell>
          <table:table-cell table:style-name="ce1" office:value-type="string" calcext:value-type="string">
            <text:p>FRIGORIFICO METROPOLITANO S.A.S BOGOTA</text:p>
          </table:table-cell>
          <table:table-cell table:style-name="ce1" office:value-type="string" calcext:value-type="string">
            <text:p>SEDE MOSQUERA; BOGOT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943</text:p>
          </table:table-cell>
          <table:table-cell table:style-name="ce1" office:value-type="float" office:value="8.93407520000019E+018" calcext:value-type="float">
            <text:p>8,93407520000019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63065" calcext:value-type="float">
            <text:p>4763065</text:p>
          </table:table-cell>
          <table:table-cell table:style-name="ce1" office:value-type="float" office:value="-74184548" calcext:value-type="float">
            <text:p>-7418454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FUNDACION CLINICA DEL NORTE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378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342926" calcext:value-type="float">
            <text:p>6342926</text:p>
          </table:table-cell>
          <table:table-cell table:style-name="ce1" office:value-type="float" office:value="-75546105" calcext:value-type="float">
            <text:p>-7554610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UNDACION HOSPITAL INFANTIL NAPOLEON FRANCO</text:p>
          </table:table-cell>
          <table:table-cell table:style-name="ce1" office:value-type="string" calcext:value-type="string">
            <text:p>HOSPITAL INFANTIL NAPOLEON FRANCO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492</text:p>
          </table:table-cell>
          <table:table-cell table:style-name="ce1" office:value-type="float" office:value="8952020016" calcext:value-type="float">
            <text:p>8952020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07406" calcext:value-type="float">
            <text:p>10407406</text:p>
          </table:table-cell>
          <table:table-cell table:style-name="ce1" office:value-type="float" office:value="-75517371" calcext:value-type="float">
            <text:p>-7551737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12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UNDACION HOSPITAL INFANTIL UNIVERSITARIO DE SAN JOSE</text:p>
          </table:table-cell>
          <table:table-cell table:style-name="ce1" office:value-type="string" calcext:value-type="string">
            <text:p>HOSPITAL INFANTIL SAN JOSE GEN01</text:p>
          </table:table-cell>
          <table:table-cell table:style-name="ce1" office:value-type="string" calcext:value-type="string">
            <text:p>SEDE MOSQUERA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947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65352" calcext:value-type="float">
            <text:p>4665352</text:p>
          </table:table-cell>
          <table:table-cell table:style-name="ce1" office:value-type="float" office:value="-74078756" calcext:value-type="float">
            <text:p>-7407875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UNDACION HOSPITAL INFANTIL UNIVERSITARIO DE SAN JOSE</text:p>
          </table:table-cell>
          <table:table-cell table:style-name="ce1" office:value-type="string" calcext:value-type="string">
            <text:p>HOSPITAL INFANTIL SAN JOSE GEN02</text:p>
          </table:table-cell>
          <table:table-cell table:style-name="ce1" office:value-type="string" calcext:value-type="string">
            <text:p>SEDE MOSQUERA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948</text:p>
          </table:table-cell>
          <table:table-cell table:style-name="ce1" office:value-type="float" office:value="5.71011013050946E+016" calcext:value-type="float">
            <text:p>5,71011013050946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65352" calcext:value-type="float">
            <text:p>4665352</text:p>
          </table:table-cell>
          <table:table-cell table:style-name="ce1" office:value-type="float" office:value="-74078756" calcext:value-type="float">
            <text:p>-7407875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FUNDACION POLICLINICA DE CIENAGA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ModbusGenset PCC 1301/1.x/0500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BQL-0810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114658" calcext:value-type="float">
            <text:p>110114658</text:p>
          </table:table-cell>
          <table:table-cell table:style-name="ce1" office:value-type="float" office:value="-742504912" calcext:value-type="float">
            <text:p>-74250491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29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UNDACION SANTA FE DE BOGOTA</text:p>
          </table:table-cell>
          <table:table-cell table:style-name="ce1" office:value-type="string" calcext:value-type="string">
            <text:p>FUNDACION SANTA FE - EDI AMBULATORIO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AMF25 Electrónico</text:p>
          </table:table-cell>
          <table:table-cell table:style-name="ce1" office:value-type="string" calcext:value-type="string">
            <text:p>AMF25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4084094E+016" calcext:value-type="float">
            <text:p>5,71017024084094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964081" calcext:value-type="float">
            <text:p>46964081</text:p>
          </table:table-cell>
          <table:table-cell table:style-name="ce1" office:value-type="float" office:value="-740378695" calcext:value-type="float">
            <text:p>-74037869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8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UNDACION SANTA FE DE BOGOTA</text:p>
          </table:table-cell>
          <table:table-cell table:style-name="ce1" office:value-type="string" calcext:value-type="string">
            <text:p>FUNDACION SANTA FE - EDI JARDIN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AMF25 Electrónico</text:p>
          </table:table-cell>
          <table:table-cell table:style-name="ce1" office:value-type="string" calcext:value-type="string">
            <text:p>AMF25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4084094E+016" calcext:value-type="float">
            <text:p>5,71017024084094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964081" calcext:value-type="float">
            <text:p>46964081</text:p>
          </table:table-cell>
          <table:table-cell table:style-name="ce1" office:value-type="float" office:value="-740378695" calcext:value-type="float">
            <text:p>-74037869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UNDACION SANTA FE DE BOGOTA</text:p>
          </table:table-cell>
          <table:table-cell table:style-name="ce1" office:value-type="string" calcext:value-type="string">
            <text:p>FUNDACION SANTA FE ADMINISTRACION</text:p>
          </table:table-cell>
          <table:table-cell table:style-name="ce1" office:value-type="string" calcext:value-type="string">
            <text:p>SEDE MOSQUERA; RAFAEL TRIANA; ADMIN; Fundación Santafé.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951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95753" calcext:value-type="float">
            <text:p>4695753</text:p>
          </table:table-cell>
          <table:table-cell table:style-name="ce1" office:value-type="float" office:value="-74032966" calcext:value-type="float">
            <text:p>-7403296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4" calcext:value-type="date">
            <text:p>14/07/26 15:10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UNDACION SANTA FE DE BOGOTA</text:p>
          </table:table-cell>
          <table:table-cell table:style-name="ce1" office:value-type="string" calcext:value-type="string">
            <text:p>FUNDACION SANTA FE CATERPILLAR</text:p>
          </table:table-cell>
          <table:table-cell table:style-name="ce1" office:value-type="string" calcext:value-type="string">
            <text:p>SEDE MOSQUERA; RAFAEL TRIANA; CATERPILLAR; CATERPILLAR; Fundación Santafé.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949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9533" calcext:value-type="float">
            <text:p>469533</text:p>
          </table:table-cell>
          <table:table-cell table:style-name="ce1" office:value-type="float" office:value="-7403323" calcext:value-type="float">
            <text:p>-740332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34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UNDACION SANTA FE DE BOGOTA</text:p>
          </table:table-cell>
          <table:table-cell table:style-name="ce1" office:value-type="string" calcext:value-type="string">
            <text:p>FUNDACION SANTA FE COSME &amp; DAMIAN (Test)</text:p>
          </table:table-cell>
          <table:table-cell table:style-name="ce1" office:value-type="string" calcext:value-type="string">
            <text:p>SEDE MOSQUERA; RAFAEL TRIANA; Fundación Santafé.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s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978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95903667460970" calcext:value-type="float">
            <text:p>4695903667460970</text:p>
          </table:table-cell>
          <table:table-cell table:style-name="ce1" office:value-type="float" office:value="-7403312891349190" calcext:value-type="float">
            <text:p>-7403312891349190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0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UNDACION SANTA FE DE BOGOTA</text:p>
          </table:table-cell>
          <table:table-cell table:style-name="ce1" office:value-type="string" calcext:value-type="string">
            <text:p>FUNDACION SANTA FE EXPANSION</text:p>
          </table:table-cell>
          <table:table-cell table:style-name="ce1" office:value-type="string" calcext:value-type="string">
            <text:p>SEDE MOSQUERA; RAFAEL TRIANA; EXPANSION; Fundación Santafé.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955</text:p>
          </table:table-cell>
          <table:table-cell table:style-name="ce3" office:value-type="float" office:value="5.71017E+016" calcext:value-type="float">
            <text:p>5,71E+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94933" calcext:value-type="float">
            <text:p>4694933</text:p>
          </table:table-cell>
          <table:table-cell table:style-name="ce1" office:value-type="float" office:value="-74033193" calcext:value-type="float">
            <text:p>-74033193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6-19T15:04:07" calcext:value-type="date">
            <text:p>19/06/26 15:04</text:p>
          </table:table-cell>
          <table:table-cell table:style-name="ce4" office:value-type="date" office:date-value="2026-07-14T15:10:05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UNDACION SANTA FE DE BOGOTA</text:p>
          </table:table-cell>
          <table:table-cell table:style-name="ce1" office:value-type="string" calcext:value-type="string">
            <text:p>FUNDACION SANTA FE ICAL</text:p>
          </table:table-cell>
          <table:table-cell table:style-name="ce1" office:value-type="string" calcext:value-type="string">
            <text:p>SEDE MOSQUERA; RAFAEL TRIANA; ICAL; Fundación Santafé.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818</text:p>
          </table:table-cell>
          <table:table-cell table:style-name="ce1" office:value-type="float" office:value="8.93407610014978E+018" calcext:value-type="float">
            <text:p>8,93407610014978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95753" calcext:value-type="float">
            <text:p>4695753</text:p>
          </table:table-cell>
          <table:table-cell table:style-name="ce1" office:value-type="float" office:value="-74032966" calcext:value-type="float">
            <text:p>-7403296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1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UNDACION SANTA FE DE BOGOTA</text:p>
          </table:table-cell>
          <table:table-cell table:style-name="ce1" office:value-type="string" calcext:value-type="string">
            <text:p>FUNDACION SANTA FE MATERNO FETAL</text:p>
          </table:table-cell>
          <table:table-cell table:style-name="ce1" office:value-type="string" calcext:value-type="string">
            <text:p>SEDE MOSQUERA; RAFAEL TRIANA; MATERNO; Fundación Santafé.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956</text:p>
          </table:table-cell>
          <table:table-cell table:style-name="ce1" office:value-type="float" office:value="8.93407610014978E+018" calcext:value-type="float">
            <text:p>8,93407610014978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95174" calcext:value-type="float">
            <text:p>4695174</text:p>
          </table:table-cell>
          <table:table-cell table:style-name="ce1" office:value-type="float" office:value="-74033406" calcext:value-type="float">
            <text:p>-7403340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4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UNDACION SANTA FE DE BOGOTA</text:p>
          </table:table-cell>
          <table:table-cell table:style-name="ce1" office:value-type="string" calcext:value-type="string">
            <text:p>FUNDACION SANTA FE UNIDAD RENAL</text:p>
          </table:table-cell>
          <table:table-cell table:style-name="ce1" office:value-type="string" calcext:value-type="string">
            <text:p>SEDE MOSQUERA; RAFAEL TRIANA; UNIDADRENAL; Fundación Santafé.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957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95365" calcext:value-type="float">
            <text:p>4695365</text:p>
          </table:table-cell>
          <table:table-cell table:style-name="ce1" office:value-type="float" office:value="-74033265" calcext:value-type="float">
            <text:p>-7403326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UNDACION SANTA FE DE BOGOTA</text:p>
          </table:table-cell>
          <table:table-cell table:style-name="ce1" office:value-type="string" calcext:value-type="string">
            <text:p>FUNDACION SANTA FE VERDE</text:p>
          </table:table-cell>
          <table:table-cell table:style-name="ce1" office:value-type="string" calcext:value-type="string">
            <text:p>SEDE MOSQUERA; RAFAEL TRIANA; VERDE; Fundación Santafé.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950</text:p>
          </table:table-cell>
          <table:table-cell table:style-name="ce1" office:value-type="float" office:value="8.93407520000019E+018" calcext:value-type="float">
            <text:p>8,93407520000019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95382" calcext:value-type="float">
            <text:p>4695382</text:p>
          </table:table-cell>
          <table:table-cell table:style-name="ce1" office:value-type="float" office:value="-7403328" calcext:value-type="float">
            <text:p>-740332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5-04T13:23:30" calcext:value-type="date">
            <text:p>04/05/23 13:2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UNDACION SANTA FE DE BOGOTA</text:p>
          </table:table-cell>
          <table:table-cell table:style-name="ce1" office:value-type="string" calcext:value-type="string">
            <text:p>FUNDACION SANTAFE RADIOLOGIA NUEVA</text:p>
          </table:table-cell>
          <table:table-cell table:style-name="ce1" office:value-type="string" calcext:value-type="string">
            <text:p>SEDE MOSQUERA; RAFAEL TRIANA; Fundación Santafé.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952</text:p>
          </table:table-cell>
          <table:table-cell table:style-name="ce1" office:value-type="float" office:value="12896005752552" calcext:value-type="float">
            <text:p>12896005752552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939638" calcext:value-type="float">
            <text:p>46939638</text:p>
          </table:table-cell>
          <table:table-cell table:style-name="ce1" office:value-type="float" office:value="-740335792" calcext:value-type="float">
            <text:p>-740335792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6-19T15:06:03" calcext:value-type="date">
            <text:p>19/06/26 15:06</text:p>
          </table:table-cell>
          <table:table-cell table:style-name="ce4" office:value-type="date" office:date-value="2026-06-24T09:13:08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UNDACION SANTA FE DE BOGOTA</text:p>
          </table:table-cell>
          <table:table-cell table:style-name="ce1" office:value-type="string" calcext:value-type="string">
            <text:p>FUNDACION SANTAFE VERDE NUEVA</text:p>
          </table:table-cell>
          <table:table-cell table:style-name="ce1" office:value-type="string" calcext:value-type="string">
            <text:p>SEDE MOSQUERA; RAFAEL TRIANA; Fundación Santafé.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950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944821" calcext:value-type="float">
            <text:p>46944821</text:p>
          </table:table-cell>
          <table:table-cell table:style-name="ce1" office:value-type="float" office:value="-74032781" calcext:value-type="float">
            <text:p>-7403278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8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UNDACION SANTA FE DE BOGOTA</text:p>
          </table:table-cell>
          <table:table-cell table:style-name="ce1" office:value-type="string" calcext:value-type="string">
            <text:p>RCI EDIF-AMBULATORIO</text:p>
          </table:table-cell>
          <table:table-cell table:style-name="ce1" office:value-type="string" calcext:value-type="string">
            <text:p>SEDE MOSQUER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Sistema RCI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4084094E+016" calcext:value-type="float">
            <text:p>5,71017024084094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965051" calcext:value-type="float">
            <text:p>46965051</text:p>
          </table:table-cell>
          <table:table-cell table:style-name="ce1" office:value-type="float" office:value="-740355" calcext:value-type="float">
            <text:p>-74035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08T08:43:41" calcext:value-type="date">
            <text:p>08/07/26 08:4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FUNDACION WWB COLOMBIA</text:p>
          </table:table-cell>
          <table:table-cell table:style-name="ce1" office:value-type="string" calcext:value-type="string">
            <text:p>FUNDACION WWB COLOMBIA GEN01</text:p>
          </table:table-cell>
          <table:table-cell table:style-name="ce1" office:value-type="string" calcext:value-type="string">
            <text:p>SEDE CALI; FERNANDO MUÑOZ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AL0369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4012587" calcext:value-type="float">
            <text:p>34012587</text:p>
          </table:table-cell>
          <table:table-cell table:style-name="ce1" office:value-type="float" office:value="-765481173" calcext:value-type="float">
            <text:p>-76548117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7-05T14:26:47" calcext:value-type="date">
            <text:p>05/07/23 14:26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GASEOSAS LUX S.A.S</text:p>
          </table:table-cell>
          <table:table-cell table:style-name="ce1" office:value-type="string" calcext:value-type="string">
            <text:p>GASEOSAS LUX S.A.S. CEDI ADN VILLAVICENCIO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CC1302-PCC1.1|Trifasico|12VDC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MOVISTAR M2M</text:p>
          </table:table-cell>
          <table:table-cell table:style-name="ce1" office:value-type="float" office:value="8.93407250000616E+018" calcext:value-type="float">
            <text:p>8,93407250000616E+018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1605742" calcext:value-type="float">
            <text:p>41605742</text:p>
          </table:table-cell>
          <table:table-cell table:style-name="ce1" office:value-type="float" office:value="-737033491" calcext:value-type="float">
            <text:p>-73703349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10-12T18:55:47" calcext:value-type="date">
            <text:p>12/10/24 18:55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GENCELL PHARMA</text:p>
          </table:table-cell>
          <table:table-cell table:style-name="ce1" office:value-type="string" calcext:value-type="string">
            <text:p>GENCELL PHARMA GEN 01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Solo gestión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5831" calcext:value-type="float">
            <text:p>4685831</text:p>
          </table:table-cell>
          <table:table-cell table:style-name="ce1" office:value-type="float" office:value="-741217533" calcext:value-type="float">
            <text:p>-74121753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5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GENCELL PHARMA</text:p>
          </table:table-cell>
          <table:table-cell table:style-name="ce1" office:value-type="string" calcext:value-type="string">
            <text:p>GENCELL PHARMA GEN 02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Solo gestión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5831" calcext:value-type="float">
            <text:p>4685831</text:p>
          </table:table-cell>
          <table:table-cell table:style-name="ce1" office:value-type="float" office:value="-741217533" calcext:value-type="float">
            <text:p>-74121753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GESTION DE ACTIVOS TECNI S.A.S.</text:p>
          </table:table-cell>
          <table:table-cell table:style-name="ce1" office:value-type="string" calcext:value-type="string">
            <text:p>ECOTOWER 100 MTS</text:p>
          </table:table-cell>
          <table:table-cell table:style-name="ce1" office:value-type="string" calcext:value-type="string">
            <text:p>SEDE MOSQUERA; RAFAEL TRIANA; 100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674</text:p>
          </table:table-cell>
          <table:table-cell table:style-name="ce1" office:value-type="float" office:value="8.93407610014978E+018" calcext:value-type="float">
            <text:p>8,93407610014978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6305" calcext:value-type="float">
            <text:p>4686305</text:p>
          </table:table-cell>
          <table:table-cell table:style-name="ce1" office:value-type="float" office:value="-74052707" calcext:value-type="float">
            <text:p>-7405270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GESTION DE ACTIVOS TECNI S.A.S.</text:p>
          </table:table-cell>
          <table:table-cell table:style-name="ce1" office:value-type="string" calcext:value-type="string">
            <text:p>EDIFICIO ECOTOWER CHICO CLL100 MTS</text:p>
          </table:table-cell>
          <table:table-cell table:style-name="ce1" office:value-type="string" calcext:value-type="string">
            <text:p>SEDE MOSQUERA; RAFAEL TRIANA; ECOTOWER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811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7194" calcext:value-type="float">
            <text:p>4687194</text:p>
          </table:table-cell>
          <table:table-cell table:style-name="ce1" office:value-type="float" office:value="-74056099" calcext:value-type="float">
            <text:p>-74056099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7-11T08:23:37" calcext:value-type="date">
            <text:p>11/07/26 08:23</text:p>
          </table:table-cell>
          <table:table-cell table:style-name="ce4" office:value-type="date" office:date-value="2026-07-09T17:49:20" calcext:value-type="date">
            <text:p>09/07/26 17:4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GESTION DE ACTIVOS TECNI S.A.S.</text:p>
          </table:table-cell>
          <table:table-cell table:style-name="ce1" office:value-type="string" calcext:value-type="string">
            <text:p>MTS PRIME TOWER GENERADOR OFICINAS</text:p>
          </table:table-cell>
          <table:table-cell table:style-name="ce1" office:value-type="string" calcext:value-type="string">
            <text:p>SEDE MOSQUERA; RAFAEL TRIANA; GEN1OFICINA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004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6" calcext:value-type="float">
            <text:p>4686</text:p>
          </table:table-cell>
          <table:table-cell table:style-name="ce1" office:value-type="float" office:value="-74052" calcext:value-type="float">
            <text:p>-7405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GIROS Y FINANZAS</text:p>
          </table:table-cell>
          <table:table-cell table:style-name="ce1" office:value-type="string" calcext:value-type="string">
            <text:p>GIROS Y FINANZAS GEN01</text:p>
          </table:table-cell>
          <table:table-cell table:style-name="ce1" office:value-type="string" calcext:value-type="string">
            <text:p>SEDE CALI; FERNANDO MUÑOZ; GIROS Y FINANZAS GEN01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AL0435</text:p>
          </table:table-cell>
          <table:table-cell table:style-name="ce1" office:value-type="float" office:value="8.93407510025853E+018" calcext:value-type="float">
            <text:p>8,93407510025853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4348578" calcext:value-type="float">
            <text:p>34348578</text:p>
          </table:table-cell>
          <table:table-cell table:style-name="ce1" office:value-type="float" office:value="-765434777" calcext:value-type="float">
            <text:p>-76543477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7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GRUPO AEROPORTUARIO DEL CARIBE</text:p>
          </table:table-cell>
          <table:table-cell table:style-name="ce1" office:value-type="string" calcext:value-type="string">
            <text:p>AEROPUERTO DE BARRANQUILLA GEN01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331</text:p>
          </table:table-cell>
          <table:table-cell table:style-name="ce1" office:value-type="float" office:value="5.71014016087467E+016" calcext:value-type="float">
            <text:p>5,71014016087467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888018" calcext:value-type="float">
            <text:p>10888018</text:p>
          </table:table-cell>
          <table:table-cell table:style-name="ce1" office:value-type="float" office:value="-74778247" calcext:value-type="float">
            <text:p>-7477824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GRUPO AEROPORTUARIO DEL CARIBE</text:p>
          </table:table-cell>
          <table:table-cell table:style-name="ce1" office:value-type="string" calcext:value-type="string">
            <text:p>AEROPUERTO DE BARRANQUILLA GEN02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332</text:p>
          </table:table-cell>
          <table:table-cell table:style-name="ce1" office:value-type="float" office:value="5.71014016087467E+016" calcext:value-type="float">
            <text:p>5,71014016087467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8887346" calcext:value-type="float">
            <text:p>108887346</text:p>
          </table:table-cell>
          <table:table-cell table:style-name="ce1" office:value-type="float" office:value="-747799437" calcext:value-type="float">
            <text:p>-74779943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1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ENKEL COLOMBIANA S.A.S</text:p>
          </table:table-cell>
          <table:table-cell table:style-name="ce1" office:value-type="string" calcext:value-type="string">
            <text:p>HENKEL GEN01</text:p>
          </table:table-cell>
          <table:table-cell table:style-name="ce1" office:value-type="string" calcext:value-type="string">
            <text:p>SEDE MOSQUERA; HENKEL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INTELILITE 4 MRS 16</text:p>
          </table:table-cell>
          <table:table-cell table:style-name="ce1" office:value-type="string" calcext:value-type="string">
            <text:p>MOVISTAR M2M</text:p>
          </table:table-cell>
          <table:table-cell table:style-name="ce1" office:value-type="float" office:value="8.93407550000437E+018" calcext:value-type="float">
            <text:p>8,93407550000437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42423" calcext:value-type="float">
            <text:p>4642423</text:p>
          </table:table-cell>
          <table:table-cell table:style-name="ce1" office:value-type="float" office:value="-74119592" calcext:value-type="float">
            <text:p>-7411959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8T13:26:45" calcext:value-type="date">
            <text:p>28/06/26 13:26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ENKEL COLOMBIANA S.A.S</text:p>
          </table:table-cell>
          <table:table-cell table:style-name="ce1" office:value-type="string" calcext:value-type="string">
            <text:p>HENKEL GEN02</text:p>
          </table:table-cell>
          <table:table-cell table:style-name="ce1" office:value-type="string" calcext:value-type="string">
            <text:p>SEDE MOSQUERA; HENKEL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INTELILITE 4 MRS 16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1014028871E+016" calcext:value-type="float">
            <text:p>5,71011014028871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4234" calcext:value-type="float">
            <text:p>464234</text:p>
          </table:table-cell>
          <table:table-cell table:style-name="ce1" office:value-type="float" office:value="-74119539" calcext:value-type="float">
            <text:p>-7411953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8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SPITAL CARDIOVASCULAR DEL NINO DE CUNDINAMARCA</text:p>
          </table:table-cell>
          <table:table-cell table:style-name="ce1" office:value-type="string" calcext:value-type="string">
            <text:p>HOSPITAL CARDIOVASCULAR GEN01</text:p>
          </table:table-cell>
          <table:table-cell table:style-name="ce1" office:value-type="string" calcext:value-type="string">
            <text:p>SEDE MOSQUERA; NELSON ROMERO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BOG1154</text:p>
          </table:table-cell>
          <table:table-cell/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581769" calcext:value-type="float">
            <text:p>4581769</text:p>
          </table:table-cell>
          <table:table-cell table:style-name="ce1" office:value-type="float" office:value="-7420069" calcext:value-type="float">
            <text:p>-742006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42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SPITAL UNIVERSIDAD DEL NORTE</text:p>
          </table:table-cell>
          <table:table-cell table:style-name="ce1" office:value-type="string" calcext:value-type="string">
            <text:p>HOSPITAL UNIVERSIDAD DEL NORTE GEN01</text:p>
          </table:table-cell>
          <table:table-cell table:style-name="ce1" office:value-type="string" calcext:value-type="string">
            <text:p>SEDE BARRANQUILLA HOSPITAL UNIVERSIDAD DEL NORT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13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92991" calcext:value-type="float">
            <text:p>1092991</text:p>
          </table:table-cell>
          <table:table-cell table:style-name="ce1" office:value-type="float" office:value="-74781013" calcext:value-type="float">
            <text:p>-7478101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09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SPITAL UNIVERSIDAD DEL NORTE</text:p>
          </table:table-cell>
          <table:table-cell table:style-name="ce1" office:value-type="string" calcext:value-type="string">
            <text:p>HOSPITAL UNIVERSIDAD DEL NORTE GEN02</text:p>
          </table:table-cell>
          <table:table-cell table:style-name="ce1" office:value-type="string" calcext:value-type="string">
            <text:p>SEDE BARRANQUILLA HOSPITAL UNIVERSIDAD DEL NORT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14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92991" calcext:value-type="float">
            <text:p>1092991</text:p>
          </table:table-cell>
          <table:table-cell table:style-name="ce1" office:value-type="float" office:value="-74781013" calcext:value-type="float">
            <text:p>-7478101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SPITAL UNIVERSIDAD DEL NORTE</text:p>
          </table:table-cell>
          <table:table-cell table:style-name="ce1" office:value-type="string" calcext:value-type="string">
            <text:p>HOSPITAL UNIVERSIDAD DEL NORTE GEN03</text:p>
          </table:table-cell>
          <table:table-cell table:style-name="ce1" office:value-type="string" calcext:value-type="string">
            <text:p>SEDE BARRANQUILLA; SEDE BARRANQUILLA HOSPITAL UNIVERSIDAD DEL NORT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15</text:p>
          </table:table-cell>
          <table:table-cell table:style-name="ce1" office:value-type="float" office:value="8.93407110030027E+018" calcext:value-type="float">
            <text:p>8,93407110030027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930511" calcext:value-type="float">
            <text:p>10930511</text:p>
          </table:table-cell>
          <table:table-cell table:style-name="ce1" office:value-type="float" office:value="-74780327" calcext:value-type="float">
            <text:p>-7478032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SPITAL UNIVERSITARIO CLINICA</text:p>
          </table:table-cell>
          <table:table-cell table:style-name="ce1" office:value-type="string" calcext:value-type="string">
            <text:p>SAN RAFAEL NTA 855-G2</text:p>
          </table:table-cell>
          <table:table-cell table:style-name="ce1" office:value-type="string" calcext:value-type="string">
            <text:p>SEDE MOSQUER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AMF-5|Trifasico</text:p>
          </table:table-cell>
          <table:table-cell table:style-name="ce1" office:value-type="string" calcext:value-type="string">
            <text:p>AMF5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5030877E+016" calcext:value-type="float">
            <text:p>5,71017025030877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5767107" calcext:value-type="float">
            <text:p>45767107</text:p>
          </table:table-cell>
          <table:table-cell table:style-name="ce1" office:value-type="float" office:value="-740937814" calcext:value-type="float">
            <text:p>-740937814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4-08T08:52:28" calcext:value-type="date">
            <text:p>08/04/26 08:52</text:p>
          </table:table-cell>
          <table:table-cell table:style-name="ce4" office:value-type="date" office:date-value="2026-06-24T09:02:1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SPITAL UNIVERSITARIO CLINICA</text:p>
          </table:table-cell>
          <table:table-cell table:style-name="ce1" office:value-type="string" calcext:value-type="string">
            <text:p>SAN RAFAEL QSX15 CALDERA</text:p>
          </table:table-cell>
          <table:table-cell table:style-name="ce1" office:value-type="string" calcext:value-type="string">
            <text:p>SEDE MOSQUER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AMF-5|Trifasico</text:p>
          </table:table-cell>
          <table:table-cell table:style-name="ce1" office:value-type="string" calcext:value-type="string">
            <text:p>AMF5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5030876E+016" calcext:value-type="float">
            <text:p>5,71017025030876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5767107" calcext:value-type="float">
            <text:p>45767107</text:p>
          </table:table-cell>
          <table:table-cell table:style-name="ce1" office:value-type="float" office:value="-740937814" calcext:value-type="float">
            <text:p>-740937814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4-08T09:07:43" calcext:value-type="date">
            <text:p>08/04/26 09:07</text:p>
          </table:table-cell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HOTEL ALOFT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893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293" calcext:value-type="float">
            <text:p>468293</text:p>
          </table:table-cell>
          <table:table-cell table:style-name="ce1" office:value-type="float" office:value="-74119649" calcext:value-type="float">
            <text:p>-7411964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HOTEL ANANDA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69</text:p>
          </table:table-cell>
          <table:table-cell table:style-name="ce1" office:value-type="float" office:value="5.71014016128791E+016" calcext:value-type="float">
            <text:p>5,71014016128791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256073" calcext:value-type="float">
            <text:p>104256073</text:p>
          </table:table-cell>
          <table:table-cell table:style-name="ce1" office:value-type="float" office:value="-755507245" calcext:value-type="float">
            <text:p>-75550724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14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HOTEL CHARLEE</text:p>
          </table:table-cell>
          <table:table-cell table:style-name="ce1" office:value-type="string" calcext:value-type="string">
            <text:p>SEDE MEDELLIN; RODOLFO VELEZ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388</text:p>
          </table:table-cell>
          <table:table-cell table:style-name="ce1" office:value-type="float" office:value="8.9340721002695E+018" calcext:value-type="float">
            <text:p>8,934072100269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9098" calcext:value-type="float">
            <text:p>6209098</text:p>
          </table:table-cell>
          <table:table-cell table:style-name="ce1" office:value-type="float" office:value="-75567768" calcext:value-type="float">
            <text:p>-7556776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09-07T18:09:57" calcext:value-type="date">
            <text:p>07/09/24 18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HOTEL CHARLESTON SANTA TERESA</text:p>
          </table:table-cell>
          <table:table-cell table:style-name="ce1" office:value-type="string" calcext:value-type="string">
            <text:p>SEDE BARRANQUILLA; CHARLEST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00</text:p>
          </table:table-cell>
          <table:table-cell table:style-name="ce1" office:value-type="float" office:value="5710140612879144" calcext:value-type="float">
            <text:p>5710140612879144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22255" calcext:value-type="float">
            <text:p>10422255</text:p>
          </table:table-cell>
          <table:table-cell table:style-name="ce1" office:value-type="float" office:value="-7555258" calcext:value-type="float">
            <text:p>-755525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10-08T14:09:28" calcext:value-type="date">
            <text:p>08/10/23 14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 DANN CARLTON BOGOTA</text:p>
          </table:table-cell>
          <table:table-cell table:style-name="ce1" office:value-type="string" calcext:value-type="string">
            <text:p>HOTEL DANN CARLTON BOGOTA GEN01</text:p>
          </table:table-cell>
          <table:table-cell table:style-name="ce1" office:value-type="string" calcext:value-type="string">
            <text:p>SEDE MOSQUERA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157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0565" calcext:value-type="float">
            <text:p>4680565</text:p>
          </table:table-cell>
          <table:table-cell table:style-name="ce1" office:value-type="float" office:value="-74054169" calcext:value-type="float">
            <text:p>-7405416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5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 DANN CARLTON BOGOTA</text:p>
          </table:table-cell>
          <table:table-cell table:style-name="ce1" office:value-type="string" calcext:value-type="string">
            <text:p>HOTEL DANN CARLTON BOGOTA GEN02</text:p>
          </table:table-cell>
          <table:table-cell table:style-name="ce1" office:value-type="string" calcext:value-type="string">
            <text:p>SEDE MOSQUERA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158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0881" calcext:value-type="float">
            <text:p>4680881</text:p>
          </table:table-cell>
          <table:table-cell table:style-name="ce1" office:value-type="float" office:value="-74053998" calcext:value-type="float">
            <text:p>-7405399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9T04:14:52" calcext:value-type="date">
            <text:p>29/06/26 04:14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 HYATT</text:p>
          </table:table-cell>
          <table:table-cell table:style-name="ce1" office:value-type="string" calcext:value-type="string">
            <text:p>HOTEL HYATT GEN 1</text:p>
          </table:table-cell>
          <table:table-cell table:style-name="ce1" office:value-type="string" calcext:value-type="string">
            <text:p>SEDE BARRANQUILLA; HYATT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96 / CLARO</text:p>
          </table:table-cell>
          <table:table-cell table:style-name="ce1" office:value-type="float" office:value="5.71014017032963E+016" calcext:value-type="float">
            <text:p>5,71014017032963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10348" calcext:value-type="float">
            <text:p>10410348</text:p>
          </table:table-cell>
          <table:table-cell table:style-name="ce1" office:value-type="float" office:value="-75551451" calcext:value-type="float">
            <text:p>-7555145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08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 HYATT</text:p>
          </table:table-cell>
          <table:table-cell table:style-name="ce1" office:value-type="string" calcext:value-type="string">
            <text:p>HOTEL HYATT GEN 2</text:p>
          </table:table-cell>
          <table:table-cell table:style-name="ce1" office:value-type="string" calcext:value-type="string">
            <text:p>SEDE BARRANQUILLA; HYATT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97 / CLARO</text:p>
          </table:table-cell>
          <table:table-cell table:style-name="ce1" office:value-type="float" office:value="5.71014017032963E+016" calcext:value-type="float">
            <text:p>5,71014017032963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10433" calcext:value-type="float">
            <text:p>10410433</text:p>
          </table:table-cell>
          <table:table-cell table:style-name="ce1" office:value-type="float" office:value="-7555144" calcext:value-type="float">
            <text:p>-755514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6-12T14:39:06" calcext:value-type="date">
            <text:p>12/06/23 14:3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HOTEL SABANETA</text:p>
          </table:table-cell>
          <table:table-cell table:style-name="ce1" office:value-type="string" calcext:value-type="string">
            <text:p>SEDE MEDELLIN; RODOLFO VELEZ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mkit-1|Análogo</text:p>
          </table:table-cell>
          <table:table-cell table:style-name="ce1" office:value-type="string" calcext:value-type="string">
            <text:p>Camkit1 Analogo</text:p>
          </table:table-cell>
          <table:table-cell table:style-name="ce1" office:value-type="string" calcext:value-type="string">
            <text:p>MED801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57889" calcext:value-type="float">
            <text:p>6157889</text:p>
          </table:table-cell>
          <table:table-cell table:style-name="ce1" office:value-type="float" office:value="-75604412" calcext:value-type="float">
            <text:p>-7560441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14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 SOFITEL</text:p>
          </table:table-cell>
          <table:table-cell table:style-name="ce1" office:value-type="string" calcext:value-type="string">
            <text:p>HOTEL SOFITEL GEN01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174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68763" calcext:value-type="float">
            <text:p>4668763</text:p>
          </table:table-cell>
          <table:table-cell table:style-name="ce1" office:value-type="float" office:value="-74053776" calcext:value-type="float">
            <text:p>-7405377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 WASHINGTON PLAZA</text:p>
          </table:table-cell>
          <table:table-cell table:style-name="ce1" office:value-type="string" calcext:value-type="string">
            <text:p>HOTEL WASHINGTON PLAZA BARRANQUILLA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60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03" calcext:value-type="float">
            <text:p>11003</text:p>
          </table:table-cell>
          <table:table-cell table:style-name="ce1" office:value-type="float" office:value="-74806" calcext:value-type="float">
            <text:p>-7480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9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ES ESTELAR SA</text:p>
          </table:table-cell>
          <table:table-cell table:style-name="ce1" office:value-type="string" calcext:value-type="string">
            <text:p>CONJUNTO INMOBILIARIO 43 AVENIDA APARTAMENTOS</text:p>
          </table:table-cell>
          <table:table-cell table:style-name="ce1" office:value-type="string" calcext:value-type="string">
            <text:p>SEDE MEDELLIN; MILLA DE ORO; 43 AVENIDA; Jorge Arboleda; CONJUNTO INMOBILIARIO 43 AVENIDA APARTAMENTOS Y GEN OFICINA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216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93574" calcext:value-type="float">
            <text:p>6193574</text:p>
          </table:table-cell>
          <table:table-cell table:style-name="ce1" office:value-type="float" office:value="-75575879" calcext:value-type="float">
            <text:p>-7557587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5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ES ESTELAR SA</text:p>
          </table:table-cell>
          <table:table-cell table:style-name="ce1" office:value-type="string" calcext:value-type="string">
            <text:p>CONJUNTO INMOBILIARIO 43 AVENIDA GEN OFICINAS</text:p>
          </table:table-cell>
          <table:table-cell table:style-name="ce1" office:value-type="string" calcext:value-type="string">
            <text:p>SEDE MEDELLIN; 43 AVENIDA; Jorge Arboleda; CONJUNTO INMOBILIARIO 43 AVENIDA APARTAMENTOS Y GEN OFICINA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217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9788" calcext:value-type="float">
            <text:p>619788</text:p>
          </table:table-cell>
          <table:table-cell table:style-name="ce1" office:value-type="float" office:value="-75557822" calcext:value-type="float">
            <text:p>-7555782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ES ESTELAR SA</text:p>
          </table:table-cell>
          <table:table-cell table:style-name="ce1" office:value-type="string" calcext:value-type="string">
            <text:p>EDIFICIO ALTO PRADO GEN01</text:p>
          </table:table-cell>
          <table:table-cell table:style-name="ce1" office:value-type="string" calcext:value-type="string">
            <text:p>SEDE BARRANQUILLA; ALTO PRADO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165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05069" calcext:value-type="float">
            <text:p>11005069</text:p>
          </table:table-cell>
          <table:table-cell table:style-name="ce1" office:value-type="float" office:value="-74802917" calcext:value-type="float">
            <text:p>-7480291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6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ES ESTELAR SA</text:p>
          </table:table-cell>
          <table:table-cell table:style-name="ce1" office:value-type="string" calcext:value-type="string">
            <text:p>HOTEL ESTELAR ALTAMIRA (test)</text:p>
          </table:table-cell>
          <table:table-cell table:style-name="ce1" office:value-type="string" calcext:value-type="string">
            <text:p>SEDE IBAGUE; JUAN RICARDO HINCAPIE; ALTAMIRA; HOTEL ESTELAR ALTAMIRA (test)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IBG0198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4288931" calcext:value-type="float">
            <text:p>44288931</text:p>
          </table:table-cell>
          <table:table-cell table:style-name="ce1" office:value-type="float" office:value="-75209345" calcext:value-type="float">
            <text:p>-75209345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6-28T07:34:41" calcext:value-type="date">
            <text:p>28/06/26 07:34</text:p>
          </table:table-cell>
          <table:table-cell table:style-name="ce4" office:value-type="date" office:date-value="2024-11-12T12:42:53" calcext:value-type="date">
            <text:p>12/11/24 12:42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ES ESTELAR SA</text:p>
          </table:table-cell>
          <table:table-cell table:style-name="ce1" office:value-type="string" calcext:value-type="string">
            <text:p>HOTEL ESTELAR BLUE</text:p>
          </table:table-cell>
          <table:table-cell table:style-name="ce1" office:value-type="string" calcext:value-type="string">
            <text:p>SEDE MEDELLIN; BLUE; RODOLFO VELEZ; Jorge Arboleda; HOTEL ESTELAR BLU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389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2079" calcext:value-type="float">
            <text:p>6202079</text:p>
          </table:table-cell>
          <table:table-cell table:style-name="ce1" office:value-type="float" office:value="-7557084" calcext:value-type="float">
            <text:p>-755708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ES ESTELAR SA</text:p>
          </table:table-cell>
          <table:table-cell table:style-name="ce1" office:value-type="string" calcext:value-type="string">
            <text:p>HOTEL ESTELAR CALLE 100</text:p>
          </table:table-cell>
          <table:table-cell table:style-name="ce1" office:value-type="string" calcext:value-type="string">
            <text:p>SEDE MOSQUERA; CALLE 100; JUAN DAVID CALLE; HOTEL ESTELAR CALLE 100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005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4692" calcext:value-type="float">
            <text:p>4684692</text:p>
          </table:table-cell>
          <table:table-cell table:style-name="ce1" office:value-type="float" office:value="-74047084" calcext:value-type="float">
            <text:p>-7404708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9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ES ESTELAR SA</text:p>
          </table:table-cell>
          <table:table-cell table:style-name="ce1" office:value-type="string" calcext:value-type="string">
            <text:p>HOTEL ESTELAR CARTAGENA BOCAGRANDE GEN 1020 KW</text:p>
          </table:table-cell>
          <table:table-cell table:style-name="ce1" office:value-type="string" calcext:value-type="string">
            <text:p>SEDE BARRANQUILLA; CARTAGENA; BOCAGRANDE; HOTEL ESTELAR CARTAGENA BOCAGRANDE GEN 1020 KW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52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09874" calcext:value-type="float">
            <text:p>10409874</text:p>
          </table:table-cell>
          <table:table-cell table:style-name="ce1" office:value-type="float" office:value="-75551679" calcext:value-type="float">
            <text:p>-7555167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08T08:43:25" calcext:value-type="date">
            <text:p>08/07/26 08:43</text:p>
          </table:table-cell>
          <table:table-cell/>
        </table:table-row>
        <table:table-row table:style-name="ro9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ES ESTELAR SA</text:p>
          </table:table-cell>
          <table:table-cell table:style-name="ce1" office:value-type="string" calcext:value-type="string">
            <text:p>HOTEL ESTELAR CARTAGENA BOCAGRANDE GEN 136 KW</text:p>
          </table:table-cell>
          <table:table-cell table:style-name="ce1" office:value-type="string" calcext:value-type="string">
            <text:p>SEDE BARRANQUILLA; CARTAGENA; BOCAGRANDE; HOTEL ESTELAR CARTAGENA BOCAGRANDE GEN 136 KW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53 / IP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09874" calcext:value-type="float">
            <text:p>10409874</text:p>
          </table:table-cell>
          <table:table-cell table:style-name="ce1" office:value-type="float" office:value="-75551679" calcext:value-type="float">
            <text:p>-7555167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09-28T11:37:51" calcext:value-type="date">
            <text:p>28/09/24 11:37</text:p>
          </table:table-cell>
          <table:table-cell/>
        </table:table-row>
        <table:table-row table:style-name="ro9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ES ESTELAR SA</text:p>
          </table:table-cell>
          <table:table-cell table:style-name="ce1" office:value-type="string" calcext:value-type="string">
            <text:p>HOTEL ESTELAR CARTAGENA BOCAGRANDE GEN 800 KW</text:p>
          </table:table-cell>
          <table:table-cell table:style-name="ce1" office:value-type="string" calcext:value-type="string">
            <text:p>SEDE BARRANQUILLA; CARTAGENA; BOCAGRANDE; HOTEL ESTELAR CARTAGENA BOCAGRANDE GEN 800 KW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54 / IP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09874" calcext:value-type="float">
            <text:p>10409874</text:p>
          </table:table-cell>
          <table:table-cell table:style-name="ce1" office:value-type="float" office:value="-75551679" calcext:value-type="float">
            <text:p>-7555167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2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ES ESTELAR SA</text:p>
          </table:table-cell>
          <table:table-cell table:style-name="ce1" office:value-type="string" calcext:value-type="string">
            <text:p>HOTEL ESTELAR LA FONTANA</text:p>
          </table:table-cell>
          <table:table-cell table:style-name="ce1" office:value-type="string" calcext:value-type="string">
            <text:p>SEDE MOSQUERA; LA FONTANA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011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05" calcext:value-type="float">
            <text:p>4705</text:p>
          </table:table-cell>
          <table:table-cell table:style-name="ce1" office:value-type="float" office:value="-74042" calcext:value-type="float">
            <text:p>-7404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6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ES ESTELAR SA</text:p>
          </table:table-cell>
          <table:table-cell table:style-name="ce1" office:value-type="string" calcext:value-type="string">
            <text:p>HOTEL ESTELAR MANZANILLO</text:p>
          </table:table-cell>
          <table:table-cell table:style-name="ce1" office:value-type="string" calcext:value-type="string">
            <text:p>SEDE BARRANQUILLA; MANZANILLO; HOTEL ESTELAR MANZANILLO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55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524092" calcext:value-type="float">
            <text:p>10524092</text:p>
          </table:table-cell>
          <table:table-cell table:style-name="ce1" office:value-type="float" office:value="-75493097" calcext:value-type="float">
            <text:p>-7549309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1-28T03:10:35" calcext:value-type="date">
            <text:p>28/01/23 03:10</text:p>
          </table:table-cell>
          <table:table-cell/>
        </table:table-row>
        <table:table-row table:style-name="ro5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ES ESTELAR SA</text:p>
          </table:table-cell>
          <table:table-cell table:style-name="ce1" office:value-type="string" calcext:value-type="string">
            <text:p>HOTEL ESTELAR MILLA DE ORO GEN HOTEL</text:p>
          </table:table-cell>
          <table:table-cell table:style-name="ce1" office:value-type="string" calcext:value-type="string">
            <text:p>SEDE MEDELLIN; MILLA DE ORO; RODOLFO VELEZ; Jorge Arboleda; HOTEL ESTELAR MILLA DE ORO GEN HOTEL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number-columns-repeated="2"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7757" calcext:value-type="float">
            <text:p>6207757</text:p>
          </table:table-cell>
          <table:table-cell table:style-name="ce1" office:value-type="float" office:value="-75601089" calcext:value-type="float">
            <text:p>-7560108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ES ESTELAR SA</text:p>
          </table:table-cell>
          <table:table-cell table:style-name="ce1" office:value-type="string" calcext:value-type="string">
            <text:p>HOTEL ESTELAR PAIPA</text:p>
          </table:table-cell>
          <table:table-cell table:style-name="ce1" office:value-type="string" calcext:value-type="string">
            <text:p>SEDE MOSQUERA; PAIPA; HOTEL ESTELAR PAIPA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CC1302-PCC1.1|Trifasico|24VDC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MOVISTAR M2M</text:p>
          </table:table-cell>
          <table:table-cell table:style-name="ce1" office:value-type="float" office:value="8.93407250000616E+018" calcext:value-type="float">
            <text:p>8,93407250000616E+018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7587803" calcext:value-type="float">
            <text:p>57587803</text:p>
          </table:table-cell>
          <table:table-cell table:style-name="ce1" office:value-type="float" office:value="-731366501" calcext:value-type="float">
            <text:p>-73136650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04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ES ESTELAR SA</text:p>
          </table:table-cell>
          <table:table-cell table:style-name="ce1" office:value-type="string" calcext:value-type="string">
            <text:p>HOTEL ESTELAR PARQUE 93</text:p>
          </table:table-cell>
          <table:table-cell table:style-name="ce1" office:value-type="string" calcext:value-type="string">
            <text:p>SEDE MOSQUERA; PARQUE93; JUAN DAVID CALLE; HOTEL ESTELAR PARQUE 93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014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74642" calcext:value-type="float">
            <text:p>4674642</text:p>
          </table:table-cell>
          <table:table-cell table:style-name="ce1" office:value-type="float" office:value="-7404842" calcext:value-type="float">
            <text:p>-740484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4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ES ESTELAR SA</text:p>
          </table:table-cell>
          <table:table-cell table:style-name="ce1" office:value-type="string" calcext:value-type="string">
            <text:p>HOTEL ESTELAR SANTAMAR GEN 300kW</text:p>
          </table:table-cell>
          <table:table-cell table:style-name="ce1" office:value-type="string" calcext:value-type="string">
            <text:p>SEDE BARRANQUILLA; ESTELAR SANTAMAR; SANTAMAR; HOTEL ESTELAR SANTAMAR GEN 300kW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57 / IB-LITE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168251" calcext:value-type="float">
            <text:p>11168251</text:p>
          </table:table-cell>
          <table:table-cell table:style-name="ce1" office:value-type="float" office:value="-74230038" calcext:value-type="float">
            <text:p>-7423003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9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ES ESTELAR SA</text:p>
          </table:table-cell>
          <table:table-cell table:style-name="ce1" office:value-type="string" calcext:value-type="string">
            <text:p>HOTEL ESTELAR SANTAMAR GEN 500kW</text:p>
          </table:table-cell>
          <table:table-cell table:style-name="ce1" office:value-type="string" calcext:value-type="string">
            <text:p>ESTELAR SANTAMAR; SANTAMAR; HOTEL ESTELAR SANTAMAR GEN 500kW; SANTAMAR GEN 500kW; SEDE BARRANQUILLA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58 / IB-LITE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168251" calcext:value-type="float">
            <text:p>11168251</text:p>
          </table:table-cell>
          <table:table-cell table:style-name="ce1" office:value-type="float" office:value="-74230038" calcext:value-type="float">
            <text:p>-7423003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9T16:18:41" calcext:value-type="date">
            <text:p>29/06/26 16:18</text:p>
          </table:table-cell>
          <table:table-cell/>
        </table:table-row>
        <table:table-row table:style-name="ro6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ES ESTELAR SA</text:p>
          </table:table-cell>
          <table:table-cell table:style-name="ce1" office:value-type="string" calcext:value-type="string">
            <text:p>HOTEL ESTELAR SUITES JONES</text:p>
          </table:table-cell>
          <table:table-cell table:style-name="ce1" office:value-type="string" calcext:value-type="string">
            <text:p>SEDE MOSQUERA; SUITESJONES; JUAN DAVID CALLE; HOTEL ESTELAR SUITES JONE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015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46011" calcext:value-type="float">
            <text:p>4646011</text:p>
          </table:table-cell>
          <table:table-cell table:style-name="ce1" office:value-type="float" office:value="-74060188" calcext:value-type="float">
            <text:p>-7406018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6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ES ESTELAR SA</text:p>
          </table:table-cell>
          <table:table-cell table:style-name="ce1" office:value-type="string" calcext:value-type="string">
            <text:p>HOTEL ESTELAR TORRE OVIEDO APTOS</text:p>
          </table:table-cell>
          <table:table-cell table:style-name="ce1" office:value-type="string" calcext:value-type="string">
            <text:p>SEDE MEDELLIN; TORREOVIEDO; Jorge Arboleda; HOTEL ESTELAR TORRE OVIEDO APTO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505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99833" calcext:value-type="float">
            <text:p>6199833</text:p>
          </table:table-cell>
          <table:table-cell table:style-name="ce1" office:value-type="float" office:value="-75575714" calcext:value-type="float">
            <text:p>-7557571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5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ES ESTELAR SA</text:p>
          </table:table-cell>
          <table:table-cell table:style-name="ce1" office:value-type="string" calcext:value-type="string">
            <text:p>HOTEL ESTELAR VILLAVICENCIO</text:p>
          </table:table-cell>
          <table:table-cell table:style-name="ce1" office:value-type="string" calcext:value-type="string">
            <text:p>SEDE MOSQUERA; RAFAEL TRIANA; ESTELAR VILLAVICENCIO; VILLAVICENCIO; HOTEL ESTELAR VILLAVICENCI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VVC1007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131" calcext:value-type="float">
            <text:p>4131</text:p>
          </table:table-cell>
          <table:table-cell table:style-name="ce1" office:value-type="float" office:value="-73638" calcext:value-type="float">
            <text:p>-7363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14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ES ESTELAR SA</text:p>
          </table:table-cell>
          <table:table-cell table:style-name="ce1" office:value-type="string" calcext:value-type="string">
            <text:p>HOTEL ESTELAR YOPAL</text:p>
          </table:table-cell>
          <table:table-cell table:style-name="ce1" office:value-type="string" calcext:value-type="string">
            <text:p>SEDE MOSQUERA; RAFAEL TRIANA; YOPAL; HOTEL ESTELAR YOPAL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VVC1008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5.35</text:p>
          </table:table-cell>
          <table:table-cell table:style-name="ce1" office:value-type="string" calcext:value-type="string">
            <text:p>-72.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5-25T17:05:54" calcext:value-type="date">
            <text:p>25/05/23 17:05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ES ESTELAR SA</text:p>
          </table:table-cell>
          <table:table-cell table:style-name="ce1" office:value-type="string" calcext:value-type="string">
            <text:p>HOTEL MELIA KARMAIRI</text:p>
          </table:table-cell>
          <table:table-cell table:style-name="ce1" office:value-type="string" calcext:value-type="string">
            <text:p>SEDE BARRANQUILLA; MELIA; JULIAN ANDRES RINCO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921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5198259" calcext:value-type="float">
            <text:p>105198259</text:p>
          </table:table-cell>
          <table:table-cell table:style-name="ce1" office:value-type="float" office:value="-754841939" calcext:value-type="float">
            <text:p>-754841939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6-28T08:03:05" calcext:value-type="date">
            <text:p>28/06/26 08:03</text:p>
          </table:table-cell>
          <table:table-cell table:style-name="ce4" office:value-type="date" office:date-value="2024-02-18T12:17:09" calcext:value-type="date">
            <text:p>18/02/24 12:17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OTELES OXO</text:p>
          </table:table-cell>
          <table:table-cell table:style-name="ce1" office:value-type="string" calcext:value-type="string">
            <text:p>HOTEL OXO WAYA GUAJIRA</text:p>
          </table:table-cell>
          <table:table-cell table:style-name="ce1" office:value-type="string" calcext:value-type="string">
            <text:p>SEDE BARRANQUILLA; GUAJIR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325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171818" calcext:value-type="float">
            <text:p>11171818</text:p>
          </table:table-cell>
          <table:table-cell table:style-name="ce1" office:value-type="float" office:value="-72585554" calcext:value-type="float">
            <text:p>-7258555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HUNTSMAN COLOMBIA L.T.D.A.</text:p>
          </table:table-cell>
          <table:table-cell table:style-name="ce1" office:value-type="string" calcext:value-type="string">
            <text:p>ARCHROMA COLOMBIA S.A.S</text:p>
          </table:table-cell>
          <table:table-cell table:style-name="ce1" office:value-type="string" calcext:value-type="string">
            <text:p>SEDE MOSQUER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017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26228" calcext:value-type="float">
            <text:p>4626228</text:p>
          </table:table-cell>
          <table:table-cell table:style-name="ce1" office:value-type="float" office:value="-74100484" calcext:value-type="float">
            <text:p>-7410048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ICOLTRANS SAS - ENERGIA</text:p>
          </table:table-cell>
          <table:table-cell table:style-name="ce1" office:value-type="string" calcext:value-type="string">
            <text:p>ICOLTRANS BARRANQUILLA</text:p>
          </table:table-cell>
          <table:table-cell table:style-name="ce1" office:value-type="string" calcext:value-type="string">
            <text:p>SEDE BARRANQUILLA; ICOLTRANS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61 / CLARO</text:p>
          </table:table-cell>
          <table:table-cell table:style-name="ce1" office:value-type="float" office:value="5.71011012034187E+016" calcext:value-type="float">
            <text:p>5,71011012034187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947317" calcext:value-type="float">
            <text:p>10947317</text:p>
          </table:table-cell>
          <table:table-cell table:style-name="ce1" office:value-type="float" office:value="-74834108" calcext:value-type="float">
            <text:p>-7483410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02T16:53:57" calcext:value-type="date">
            <text:p>02/07/26 16:5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ICOLTRANS SAS - ENERGIA</text:p>
          </table:table-cell>
          <table:table-cell table:style-name="ce1" office:value-type="string" calcext:value-type="string">
            <text:p>ICOLTRANS COTA</text:p>
          </table:table-cell>
          <table:table-cell table:style-name="ce1" office:value-type="string" calcext:value-type="string">
            <text:p>SEDE MOSQUERA; ICOLTRANS COTA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018 / CLARO</text:p>
          </table:table-cell>
          <table:table-cell table:style-name="ce1" office:value-type="string" calcext:value-type="string">
            <text:p>57101101 402853400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40007" calcext:value-type="float">
            <text:p>4740007</text:p>
          </table:table-cell>
          <table:table-cell table:style-name="ce1" office:value-type="float" office:value="-74136323" calcext:value-type="float">
            <text:p>-7413632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ICOLTRANS SAS - ENERGIA</text:p>
          </table:table-cell>
          <table:table-cell table:style-name="ce1" office:value-type="string" calcext:value-type="string">
            <text:p>ICOLTRANS IBAGUE</text:p>
          </table:table-cell>
          <table:table-cell table:style-name="ce1" office:value-type="string" calcext:value-type="string">
            <text:p>SEDE IBAGUE; JUAN RICARDO HINCAPIE; ICOLTRANS IBAGU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IBG0200 / M2M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341368" calcext:value-type="float">
            <text:p>4341368</text:p>
          </table:table-cell>
          <table:table-cell table:style-name="ce1" office:value-type="float" office:value="-75093651" calcext:value-type="float">
            <text:p>-7509365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6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ICOLTRANS SAS - ENERGIA</text:p>
          </table:table-cell>
          <table:table-cell table:style-name="ce1" office:value-type="string" calcext:value-type="string">
            <text:p>ICOLTRANS MEDELLIN</text:p>
          </table:table-cell>
          <table:table-cell table:style-name="ce1" office:value-type="string" calcext:value-type="string">
            <text:p>SEDE MEDELLIN; RODOLFO VELEZ; ICOLTRANS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OVISTAR M2M</text:p>
          </table:table-cell>
          <table:table-cell table:style-name="ce1" office:value-type="float" office:value="8.93407610014978E+018" calcext:value-type="float">
            <text:p>8,93407610014978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78" calcext:value-type="float">
            <text:p>6178</text:p>
          </table:table-cell>
          <table:table-cell table:style-name="ce1" office:value-type="float" office:value="-75593" calcext:value-type="float">
            <text:p>-7559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IMAGE QUALITY OUTSOURCING S A S</text:p>
          </table:table-cell>
          <table:table-cell table:style-name="ce1" office:value-type="string" calcext:value-type="string">
            <text:p>IQ EDIFICIO PALMA REAL GEN01</text:p>
          </table:table-cell>
          <table:table-cell table:style-name="ce1" office:value-type="string" calcext:value-type="string">
            <text:p>SEDE MOSQUERA; BOGOTA; JUAN DAVID CALLE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mkit-1|Análogo</text:p>
          </table:table-cell>
          <table:table-cell table:style-name="ce1" office:value-type="string" calcext:value-type="string">
            <text:p>Camkit1 Analogo</text:p>
          </table:table-cell>
          <table:table-cell/>
          <table:table-cell table:style-name="ce1" office:value-type="float" office:value="8.93407540000737E+017" calcext:value-type="float">
            <text:p>8,93407540000737E+017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15755" calcext:value-type="float">
            <text:p>4615755</text:p>
          </table:table-cell>
          <table:table-cell table:style-name="ce1" office:value-type="float" office:value="-74070122" calcext:value-type="float">
            <text:p>-7407012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02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IMAGE QUALITY OUTSOURCING S A S</text:p>
          </table:table-cell>
          <table:table-cell table:style-name="ce1" office:value-type="string" calcext:value-type="string">
            <text:p>IQ OUTSOURCING MEDELLIN</text:p>
          </table:table-cell>
          <table:table-cell table:style-name="ce1" office:value-type="string" calcext:value-type="string">
            <text:p>SEDE MEDELLIN; RODOLFO VELEZ;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392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62" calcext:value-type="float">
            <text:p>6162</text:p>
          </table:table-cell>
          <table:table-cell table:style-name="ce1" office:value-type="float" office:value="-75603" calcext:value-type="float">
            <text:p>-7560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IMPLANTES Y SISTEMAS ORTOPEDICOS SA</text:p>
          </table:table-cell>
          <table:table-cell table:style-name="ce1" office:value-type="string" calcext:value-type="string">
            <text:p>EDIFICIO ISO</text:p>
          </table:table-cell>
          <table:table-cell table:style-name="ce1" office:value-type="string" calcext:value-type="string">
            <text:p>SEDE MOSQUERA; NELSON ROMERO; EDIFICIO IS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AMF25 Electrónico</text:p>
          </table:table-cell>
          <table:table-cell table:style-name="ce1" office:value-type="string" calcext:value-type="string">
            <text:p>AMF25</text:p>
          </table:table-cell>
          <table:table-cell table:style-name="ce1" office:value-type="string" calcext:value-type="string">
            <text:p>BOG1025</text:p>
          </table:table-cell>
          <table:table-cell table:style-name="ce1" office:value-type="float" office:value="8.9340711002998E+018" calcext:value-type="float">
            <text:p>8,9340711002998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96497" calcext:value-type="float">
            <text:p>4696497</text:p>
          </table:table-cell>
          <table:table-cell table:style-name="ce1" office:value-type="float" office:value="-74042793" calcext:value-type="float">
            <text:p>-7404279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04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INDUSTRIA COLOMBIANA DE CAFE SAS</text:p>
          </table:table-cell>
          <table:table-cell table:style-name="ce1" office:value-type="string" calcext:value-type="string">
            <text:p>COLCAFE BOGOTÁ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 1936</text:p>
          </table:table-cell>
          <table:table-cell table:style-name="ce1" office:value-type="float" office:value="8.93407510025853E+018" calcext:value-type="float">
            <text:p>8,93407510025853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435721" calcext:value-type="float">
            <text:p>46435721</text:p>
          </table:table-cell>
          <table:table-cell table:style-name="ce1" office:value-type="float" office:value="-741156725" calcext:value-type="float">
            <text:p>-74115672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4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INGRAM MICRO SAS</text:p>
          </table:table-cell>
          <table:table-cell table:style-name="ce1" office:value-type="string" calcext:value-type="string">
            <text:p>INGRAM MICRO</text:p>
          </table:table-cell>
          <table:table-cell table:style-name="ce1" office:value-type="string" calcext:value-type="string">
            <text:p>SEDE MOSQUER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026</text:p>
          </table:table-cell>
          <table:table-cell table:style-name="ce1" office:value-type="float" office:value="8.93407610014407E+018" calcext:value-type="float">
            <text:p>8,93407610014407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35587" calcext:value-type="float">
            <text:p>4735587</text:p>
          </table:table-cell>
          <table:table-cell table:style-name="ce1" office:value-type="float" office:value="-74134861" calcext:value-type="float">
            <text:p>-7413486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4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IPS SURGIFAST S.A</text:p>
          </table:table-cell>
          <table:table-cell table:style-name="ce1" office:value-type="string" calcext:value-type="string">
            <text:p>IPS SURGIFAST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OVISTAR M2M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238554" calcext:value-type="float">
            <text:p>11238554</text:p>
          </table:table-cell>
          <table:table-cell table:style-name="ce1" office:value-type="float" office:value="-74213517" calcext:value-type="float">
            <text:p>-7421351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LA RECETTA SOLUCIONES GASTRONOMICAS INTEGRADAS SA</text:p>
          </table:table-cell>
          <table:table-cell table:style-name="ce1" office:value-type="string" calcext:value-type="string">
            <text:p>LA RECETTA COTA</text:p>
          </table:table-cell>
          <table:table-cell table:style-name="ce1" office:value-type="string" calcext:value-type="string">
            <text:p>SEDE MOSQUERA; RAFAEL TRIANA; BOGOTA; COTA; LA RECETTA COT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044</text:p>
          </table:table-cell>
          <table:table-cell table:style-name="ce1" office:value-type="float" office:value="5.71011014028872E+016" calcext:value-type="float">
            <text:p>5,71011014028872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61412" calcext:value-type="float">
            <text:p>4761412</text:p>
          </table:table-cell>
          <table:table-cell table:style-name="ce1" office:value-type="float" office:value="-74139175" calcext:value-type="float">
            <text:p>-7413917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LABORATORIO BUSSIE S A</text:p>
          </table:table-cell>
          <table:table-cell table:style-name="ce1" office:value-type="string" calcext:value-type="string">
            <text:p>LABORATORIOS BUSSIE</text:p>
          </table:table-cell>
          <table:table-cell table:style-name="ce1" office:value-type="string" calcext:value-type="string">
            <text:p>SEDE MOSQUERA; RAFAEL TRIANA; BOGOT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047</text:p>
          </table:table-cell>
          <table:table-cell table:style-name="ce1" office:value-type="float" office:value="5.71015018089151E+016" calcext:value-type="float">
            <text:p>5,71015018089151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96" calcext:value-type="float">
            <text:p>4696</text:p>
          </table:table-cell>
          <table:table-cell table:style-name="ce1" office:value-type="float" office:value="-74058" calcext:value-type="float">
            <text:p>-7405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LABORATORIO CLINICO BERNARDO ESPINOSA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163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753749" calcext:value-type="float">
            <text:p>8753749</text:p>
          </table:table-cell>
          <table:table-cell table:style-name="ce1" office:value-type="float" office:value="-75887349" calcext:value-type="float">
            <text:p>-7588734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LABORATORIOS MEDIFARMA S.A.S</text:p>
          </table:table-cell>
          <table:table-cell table:style-name="ce1" office:value-type="string" calcext:value-type="string">
            <text:p>LABORATORIO Y CENTRO ADMIN CORPAUL GUARNE 50kW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262</text:p>
          </table:table-cell>
          <table:table-cell table:style-name="ce1" office:value-type="float" office:value="8.95202001929001E+018" calcext:value-type="float">
            <text:p>8,95202001929001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23371" calcext:value-type="float">
            <text:p>6223371</text:p>
          </table:table-cell>
          <table:table-cell table:style-name="ce1" office:value-type="float" office:value="-75392012" calcext:value-type="float">
            <text:p>-7539201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4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LAYCOM SAS</text:p>
          </table:table-cell>
          <table:table-cell table:style-name="ce1" office:value-type="string" calcext:value-type="string">
            <text:p>LAYCOM</text:p>
          </table:table-cell>
          <table:table-cell table:style-name="ce1" office:value-type="string" calcext:value-type="string">
            <text:p>NELSON ROMERO; SEDE MOSQUER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4084094E+016" calcext:value-type="float">
            <text:p>5,71017024084094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501828" calcext:value-type="float">
            <text:p>47501828</text:p>
          </table:table-cell>
          <table:table-cell table:style-name="ce1" office:value-type="float" office:value="-740448405" calcext:value-type="float">
            <text:p>-740448405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6-28T07:59:34" calcext:value-type="date">
            <text:p>28/06/26 07:59</text:p>
          </table:table-cell>
          <table:table-cell table:style-name="ce4" office:value-type="date" office:date-value="2026-07-14T15:09:52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LOCATEL</text:p>
          </table:table-cell>
          <table:table-cell table:style-name="ce1" office:value-type="string" calcext:value-type="string">
            <text:p>EDIFICIO LOCATEL PH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310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95537" calcext:value-type="float">
            <text:p>6195537</text:p>
          </table:table-cell>
          <table:table-cell table:style-name="ce1" office:value-type="float" office:value="-75574919" calcext:value-type="float">
            <text:p>-7557491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7:19" calcext:value-type="date">
            <text:p>14/07/26 15:07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AQUITE</text:p>
          </table:table-cell>
          <table:table-cell table:style-name="ce1" office:value-type="string" calcext:value-type="string">
            <text:p>CREPES &amp; WAFFLES - PALMETTO</text:p>
          </table:table-cell>
          <table:table-cell table:style-name="ce1" office:value-type="string" calcext:value-type="string">
            <text:p>SEDE CALI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AMF-25|Trifasico</text:p>
          </table:table-cell>
          <table:table-cell table:style-name="ce1" office:value-type="string" calcext:value-type="string">
            <text:p>AMF25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4083857E+016" calcext:value-type="float">
            <text:p>5,71017024083857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3886452" calcext:value-type="float">
            <text:p>33886452</text:p>
          </table:table-cell>
          <table:table-cell table:style-name="ce1" office:value-type="float" office:value="-765588702" calcext:value-type="float">
            <text:p>-765588702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3-11T14:14:06" calcext:value-type="date">
            <text:p>11/03/26 14:14</text:p>
          </table:table-cell>
          <table:table-cell table:style-name="ce4" office:value-type="date" office:date-value="2026-06-24T09:02:1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ESSER COLOMBIA S A</text:p>
          </table:table-cell>
          <table:table-cell table:style-name="ce1" office:value-type="string" calcext:value-type="string">
            <text:p>MESSER AGAFANO GEN01 SDMO</text:p>
          </table:table-cell>
          <table:table-cell table:style-name="ce1" office:value-type="string" calcext:value-type="string">
            <text:p>SEDE MOSQUERA; RAFAEL TRIANA; LINDE BOGOTA; SDM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075</text:p>
          </table:table-cell>
          <table:table-cell table:style-name="ce1" office:value-type="float" office:value="8.93407610014978E+018" calcext:value-type="float">
            <text:p>8,93407610014978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77084264288" calcext:value-type="float">
            <text:p>46877084264288</text:p>
          </table:table-cell>
          <table:table-cell table:style-name="ce1" office:value-type="float" office:value="-74058065418687" calcext:value-type="float">
            <text:p>-7405806541868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ESSER COLOMBIA S A</text:p>
          </table:table-cell>
          <table:table-cell table:style-name="ce1" office:value-type="string" calcext:value-type="string">
            <text:p>MESSER AGAFANO GEN02 CUMMINS</text:p>
          </table:table-cell>
          <table:table-cell table:style-name="ce1" office:value-type="string" calcext:value-type="string">
            <text:p>SEDE MOSQUERA; RAFAEL TRIANA; LINDE BOGOTA; CUMMIN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074</text:p>
          </table:table-cell>
          <table:table-cell table:style-name="ce1" office:value-type="float" office:value="8.93407610014407E+018" calcext:value-type="float">
            <text:p>8,93407610014407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27863" calcext:value-type="float">
            <text:p>4627863</text:p>
          </table:table-cell>
          <table:table-cell table:style-name="ce1" office:value-type="float" office:value="-74068241" calcext:value-type="float">
            <text:p>-7406824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0:06:10" calcext:value-type="date">
            <text:p>14/07/26 10:06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ESSER COLOMBIA S A</text:p>
          </table:table-cell>
          <table:table-cell table:style-name="ce1" office:value-type="string" calcext:value-type="string">
            <text:p>MESSER BARRANQUILLA GEN1</text:p>
          </table:table-cell>
          <table:table-cell table:style-name="ce1" office:value-type="string" calcext:value-type="string">
            <text:p>SEDE BARRANQUILLA; LIN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94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01518" calcext:value-type="float">
            <text:p>11001518</text:p>
          </table:table-cell>
          <table:table-cell table:style-name="ce1" office:value-type="float" office:value="-74814598" calcext:value-type="float">
            <text:p>-7481459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ESSER COLOMBIA S A</text:p>
          </table:table-cell>
          <table:table-cell table:style-name="ce1" office:value-type="string" calcext:value-type="string">
            <text:p>MESSER BARRANQUILLA GEN2</text:p>
          </table:table-cell>
          <table:table-cell table:style-name="ce1" office:value-type="string" calcext:value-type="string">
            <text:p>SEDE BARRANQUILLA; LIN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95</text:p>
          </table:table-cell>
          <table:table-cell table:style-name="ce1" office:value-type="float" office:value="5.71011014028875E+016" calcext:value-type="float">
            <text:p>5,71011014028875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01518" calcext:value-type="float">
            <text:p>11001518</text:p>
          </table:table-cell>
          <table:table-cell table:style-name="ce1" office:value-type="float" office:value="-74814598" calcext:value-type="float">
            <text:p>-7481459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ESSER COLOMBIA S A</text:p>
          </table:table-cell>
          <table:table-cell table:style-name="ce1" office:value-type="string" calcext:value-type="string">
            <text:p>MESSER BUCARAMANGA</text:p>
          </table:table-cell>
          <table:table-cell table:style-name="ce1" office:value-type="string" calcext:value-type="string">
            <text:p>SEDE MOSQUERA; RAFAEL TRIANA; LINDE BUCARAMANG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537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107619" calcext:value-type="float">
            <text:p>7107619</text:p>
          </table:table-cell>
          <table:table-cell table:style-name="ce1" office:value-type="float" office:value="-73112978" calcext:value-type="float">
            <text:p>-7311297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ESSER COLOMBIA S A</text:p>
          </table:table-cell>
          <table:table-cell table:style-name="ce1" office:value-type="string" calcext:value-type="string">
            <text:p>MESSER CALI</text:p>
          </table:table-cell>
          <table:table-cell table:style-name="ce1" office:value-type="string" calcext:value-type="string">
            <text:p>SEDE CALI; FERNANDO MUÑOZ; LINDE CALI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AL0132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423915" calcext:value-type="float">
            <text:p>3423915</text:p>
          </table:table-cell>
          <table:table-cell table:style-name="ce1" office:value-type="float" office:value="-76529077" calcext:value-type="float">
            <text:p>-7652907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ESSER COLOMBIA S A</text:p>
          </table:table-cell>
          <table:table-cell table:style-name="ce1" office:value-type="string" calcext:value-type="string">
            <text:p>MESSER CARTAGENA</text:p>
          </table:table-cell>
          <table:table-cell table:style-name="ce1" office:value-type="string" calcext:value-type="string">
            <text:p>SEDE BARRANQUILLA; LINDE CARTAGE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93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31358" calcext:value-type="float">
            <text:p>10431358</text:p>
          </table:table-cell>
          <table:table-cell table:style-name="ce1" office:value-type="float" office:value="-7554555" calcext:value-type="float">
            <text:p>-755455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1-02-27T12:43:22" calcext:value-type="date">
            <text:p>27/02/21 12:4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ESSER COLOMBIA S A</text:p>
          </table:table-cell>
          <table:table-cell table:style-name="ce1" office:value-type="string" calcext:value-type="string">
            <text:p>MESSER MEDELLIN</text:p>
          </table:table-cell>
          <table:table-cell table:style-name="ce1" office:value-type="string" calcext:value-type="string">
            <text:p>SEDE MEDELLIN; RODOLFO VELEZ; LIN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411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90138" calcext:value-type="float">
            <text:p>6190138</text:p>
          </table:table-cell>
          <table:table-cell table:style-name="ce1" office:value-type="float" office:value="-75560771" calcext:value-type="float">
            <text:p>-7556077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09" calcext:value-type="date">
            <text:p>14/07/26 15:10</text:p>
          </table:table-cell>
          <table:table-cell/>
        </table:table-row>
        <table:table-row table:style-name="ro6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ESSER COLOMBIA S A</text:p>
          </table:table-cell>
          <table:table-cell table:style-name="ce1" office:value-type="string" calcext:value-type="string">
            <text:p>MESSER REMEO TEUSAQUILLO</text:p>
          </table:table-cell>
          <table:table-cell table:style-name="ce1" office:value-type="string" calcext:value-type="string">
            <text:p>SEDE MOSQUERA; RAFAEL TRIANA; LISA TEUSAQUILLO; MESSER REMEO TEUSAQUILL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077</text:p>
          </table:table-cell>
          <table:table-cell table:style-name="ce1" office:value-type="string" calcext:value-type="string">
            <text:p>8952020020H6192400990F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27836" calcext:value-type="float">
            <text:p>4627836</text:p>
          </table:table-cell>
          <table:table-cell table:style-name="ce1" office:value-type="float" office:value="-74068197" calcext:value-type="float">
            <text:p>-7406819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03T10:25:20" calcext:value-type="date">
            <text:p>03/07/26 10:25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ILLENIUM CENTRO COMERCIAL Y RESIDENCIAL</text:p>
          </table:table-cell>
          <table:table-cell table:style-name="ce1" office:value-type="string" calcext:value-type="string">
            <text:p>CENTRO COMERCIAL MILLENIUM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531</text:p>
          </table:table-cell>
          <table:table-cell table:style-name="ce1" office:value-type="float" office:value="8.95202001929E+018" calcext:value-type="float">
            <text:p>8,95202001929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11504" calcext:value-type="float">
            <text:p>11011504</text:p>
          </table:table-cell>
          <table:table-cell table:style-name="ce1" office:value-type="float" office:value="-74828146" calcext:value-type="float">
            <text:p>-74828146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3-30T16:51:48" calcext:value-type="date">
            <text:p>30/03/26 16:51</text:p>
          </table:table-cell>
          <table:table-cell table:style-name="ce4" office:value-type="date" office:date-value="2026-06-24T09:13:02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TS ADMINISTRACION TOTAL SAS</text:p>
          </table:table-cell>
          <table:table-cell table:style-name="ce1" office:value-type="string" calcext:value-type="string">
            <text:p>EDIFICIO MTS ELEMENTO GEN01</text:p>
          </table:table-cell>
          <table:table-cell table:style-name="ce1" office:value-type="string" calcext:value-type="string">
            <text:p>SEDE MOSQUERA; RAFAEL TRIANA; ELEMENT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799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9349" calcext:value-type="float">
            <text:p>4659349</text:p>
          </table:table-cell>
          <table:table-cell table:style-name="ce1" office:value-type="float" office:value="-74106088" calcext:value-type="float">
            <text:p>-7410608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5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TS ADMINISTRACION TOTAL SAS</text:p>
          </table:table-cell>
          <table:table-cell table:style-name="ce1" office:value-type="string" calcext:value-type="string">
            <text:p>EDIFICIO MTS ELEMENTO GEN02</text:p>
          </table:table-cell>
          <table:table-cell table:style-name="ce1" office:value-type="string" calcext:value-type="string">
            <text:p>SEDE MOSQUERA; RAFAEL TRIANA; ELEMENT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800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9349" calcext:value-type="float">
            <text:p>4659349</text:p>
          </table:table-cell>
          <table:table-cell table:style-name="ce1" office:value-type="float" office:value="-74106088" calcext:value-type="float">
            <text:p>-7410608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TS ADMINISTRACION TOTAL SAS</text:p>
          </table:table-cell>
          <table:table-cell table:style-name="ce1" office:value-type="string" calcext:value-type="string">
            <text:p>EDIFICIO MTS ELEMENTO GEN03</text:p>
          </table:table-cell>
          <table:table-cell table:style-name="ce1" office:value-type="string" calcext:value-type="string">
            <text:p>SEDE MOSQUERA; RAFAEL TRIANA; ELEMENT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801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9349" calcext:value-type="float">
            <text:p>4659349</text:p>
          </table:table-cell>
          <table:table-cell table:style-name="ce1" office:value-type="float" office:value="-74106088" calcext:value-type="float">
            <text:p>-7410608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5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TS ADMINISTRACION TOTAL SAS</text:p>
          </table:table-cell>
          <table:table-cell table:style-name="ce1" office:value-type="string" calcext:value-type="string">
            <text:p>EDIFICIO MTS ELEMENTO GEN04</text:p>
          </table:table-cell>
          <table:table-cell table:style-name="ce1" office:value-type="string" calcext:value-type="string">
            <text:p>SEDE MOSQUERA; RAFAEL TRIANA; ELEMENT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802</text:p>
          </table:table-cell>
          <table:table-cell table:style-name="ce1" office:value-type="string" calcext:value-type="string">
            <text:p>IP 172.20.33.04 MASCK 255.255.255.0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97614" calcext:value-type="float">
            <text:p>46597614</text:p>
          </table:table-cell>
          <table:table-cell table:style-name="ce1" office:value-type="float" office:value="-741083357" calcext:value-type="float">
            <text:p>-74108335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5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TS ADMINISTRACION TOTAL SAS</text:p>
          </table:table-cell>
          <table:table-cell table:style-name="ce1" office:value-type="string" calcext:value-type="string">
            <text:p>EDIFICIO MTS ELEMENTO GEN05</text:p>
          </table:table-cell>
          <table:table-cell table:style-name="ce1" office:value-type="string" calcext:value-type="string">
            <text:p>SEDE MOSQUERA; RAFAEL TRIANA; ELEMENT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803</text:p>
          </table:table-cell>
          <table:table-cell table:style-name="ce1" office:value-type="string" calcext:value-type="string">
            <text:p>IP 172.20.33.05 MASCK 255.255.255.0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97614" calcext:value-type="float">
            <text:p>46597614</text:p>
          </table:table-cell>
          <table:table-cell table:style-name="ce1" office:value-type="float" office:value="-741083357" calcext:value-type="float">
            <text:p>-74108335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8:56" calcext:value-type="date">
            <text:p>14/07/26 15:08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TS ADMINISTRACION TOTAL SAS</text:p>
          </table:table-cell>
          <table:table-cell table:style-name="ce1" office:value-type="string" calcext:value-type="string">
            <text:p>EDIFICIO MTS ELEMENTO GEN06</text:p>
          </table:table-cell>
          <table:table-cell table:style-name="ce1" office:value-type="string" calcext:value-type="string">
            <text:p>SEDE MOSQUERA; RAFAEL TRIANA; ELEMENT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804</text:p>
          </table:table-cell>
          <table:table-cell table:style-name="ce1" office:value-type="string" calcext:value-type="string">
            <text:p>IP 172.20.33.06 MASCK 255.255.255.0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97614" calcext:value-type="float">
            <text:p>46597614</text:p>
          </table:table-cell>
          <table:table-cell table:style-name="ce1" office:value-type="float" office:value="-741083357" calcext:value-type="float">
            <text:p>-74108335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5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TS ADMINISTRACION TOTAL SAS</text:p>
          </table:table-cell>
          <table:table-cell table:style-name="ce1" office:value-type="string" calcext:value-type="string">
            <text:p>EDIFICIO MTS ELEMENTO GEN07</text:p>
          </table:table-cell>
          <table:table-cell table:style-name="ce1" office:value-type="string" calcext:value-type="string">
            <text:p>SEDE MOSQUERA; RAFAEL TRIANA; ELEMENT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805</text:p>
          </table:table-cell>
          <table:table-cell table:style-name="ce1" office:value-type="string" calcext:value-type="string">
            <text:p>IP 172203307 MASCK 2552552550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97614" calcext:value-type="float">
            <text:p>46597614</text:p>
          </table:table-cell>
          <table:table-cell table:style-name="ce1" office:value-type="float" office:value="-741083357" calcext:value-type="float">
            <text:p>-74108335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TS ADMINISTRACION TOTAL SAS</text:p>
          </table:table-cell>
          <table:table-cell table:style-name="ce1" office:value-type="string" calcext:value-type="string">
            <text:p>EDIFICIO MTS ELEMENTO GEN08</text:p>
          </table:table-cell>
          <table:table-cell table:style-name="ce1" office:value-type="string" calcext:value-type="string">
            <text:p>SEDE MOSQUERA; RAFAEL TRIANA; ELEMENT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806</text:p>
          </table:table-cell>
          <table:table-cell table:style-name="ce1" office:value-type="string" calcext:value-type="string">
            <text:p>IP 172.20.33.08 MASCK 255.255.255.0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97614" calcext:value-type="float">
            <text:p>46597614</text:p>
          </table:table-cell>
          <table:table-cell table:style-name="ce1" office:value-type="float" office:value="-741083357" calcext:value-type="float">
            <text:p>-74108335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07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TS ADMINISTRACION TOTAL SAS</text:p>
          </table:table-cell>
          <table:table-cell table:style-name="ce1" office:value-type="string" calcext:value-type="string">
            <text:p>EDIFICIO MTS ELEMENTO GEN09</text:p>
          </table:table-cell>
          <table:table-cell table:style-name="ce1" office:value-type="string" calcext:value-type="string">
            <text:p>SEDE MOSQUERA; RAFAEL TRIANA; ELEMENT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807</text:p>
          </table:table-cell>
          <table:table-cell table:style-name="ce1" office:value-type="string" calcext:value-type="string">
            <text:p>IP 172.20.33.09 MASCK 255.255.255.0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97614" calcext:value-type="float">
            <text:p>46597614</text:p>
          </table:table-cell>
          <table:table-cell table:style-name="ce1" office:value-type="float" office:value="-741083357" calcext:value-type="float">
            <text:p>-74108335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TS ADMINISTRACION TOTAL SAS</text:p>
          </table:table-cell>
          <table:table-cell table:style-name="ce1" office:value-type="string" calcext:value-type="string">
            <text:p>EDIFICIO MTS ELEMENTO GEN10</text:p>
          </table:table-cell>
          <table:table-cell table:style-name="ce1" office:value-type="string" calcext:value-type="string">
            <text:p>SEDE MOSQUERA; RAFAEL TRIANA; ELEMENT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808</text:p>
          </table:table-cell>
          <table:table-cell table:style-name="ce1" office:value-type="string" calcext:value-type="string">
            <text:p>IP 172.20.33.10 MASCK 255.255.255.0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97614" calcext:value-type="float">
            <text:p>46597614</text:p>
          </table:table-cell>
          <table:table-cell table:style-name="ce1" office:value-type="float" office:value="-741083357" calcext:value-type="float">
            <text:p>-74108335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8:55" calcext:value-type="date">
            <text:p>14/07/26 15:08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TS ADMINISTRACION TOTAL SAS</text:p>
          </table:table-cell>
          <table:table-cell table:style-name="ce1" office:value-type="string" calcext:value-type="string">
            <text:p>EDIFICIO MTS ELEMENTO GEN11</text:p>
          </table:table-cell>
          <table:table-cell table:style-name="ce1" office:value-type="string" calcext:value-type="string">
            <text:p>SEDE MOSQUERA; RAFAEL TRIANA; ELEMENT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809</text:p>
          </table:table-cell>
          <table:table-cell table:style-name="ce1" office:value-type="string" calcext:value-type="string">
            <text:p>IP 172.20.33.11 MASCK 255.255.255.0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97614" calcext:value-type="float">
            <text:p>46597614</text:p>
          </table:table-cell>
          <table:table-cell table:style-name="ce1" office:value-type="float" office:value="-741083357" calcext:value-type="float">
            <text:p>-74108335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5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TS ADMINISTRACION TOTAL SAS</text:p>
          </table:table-cell>
          <table:table-cell table:style-name="ce1" office:value-type="string" calcext:value-type="string">
            <text:p>EDIFICIO MTS ELEMENTO GEN12</text:p>
          </table:table-cell>
          <table:table-cell table:style-name="ce1" office:value-type="string" calcext:value-type="string">
            <text:p>SEDE MOSQUERA; RAFAEL TRIANA; ELEMENT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810</text:p>
          </table:table-cell>
          <table:table-cell table:style-name="ce1" office:value-type="string" calcext:value-type="string">
            <text:p>IP 172.20.33.12 MASCK 255.255.255.0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97614" calcext:value-type="float">
            <text:p>46597614</text:p>
          </table:table-cell>
          <table:table-cell table:style-name="ce1" office:value-type="float" office:value="-741083357" calcext:value-type="float">
            <text:p>-74108335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8:55" calcext:value-type="date">
            <text:p>14/07/26 15:08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TS CONSULTORÍA + GESTIÓN S.A.S</text:p>
          </table:table-cell>
          <table:table-cell table:style-name="ce1" office:value-type="string" calcext:value-type="string">
            <text:p>MEGAPORT CENTRO DE NEGOCIOS</text:p>
          </table:table-cell>
          <table:table-cell table:style-name="ce1" office:value-type="string" calcext:value-type="string">
            <text:p>SEDE MOSQUERA; RAFAEL TRIANA; MEGAPORT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mkit-1|Análogo</text:p>
          </table:table-cell>
          <table:table-cell table:style-name="ce1" office:value-type="string" calcext:value-type="string">
            <text:p>Camkit1 Analogo</text:p>
          </table:table-cell>
          <table:table-cell table:style-name="ce1" office:value-type="string" calcext:value-type="string">
            <text:p>BOG1964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789379" calcext:value-type="float">
            <text:p>46789379</text:p>
          </table:table-cell>
          <table:table-cell table:style-name="ce1" office:value-type="float" office:value="-741148092" calcext:value-type="float">
            <text:p>-74114809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13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TS CONSULTORÍA + GESTIÓN S.A.S</text:p>
          </table:table-cell>
          <table:table-cell table:style-name="ce1" office:value-type="string" calcext:value-type="string">
            <text:p>PARQUE INDUSTRIAL QUADRATTO MTS</text:p>
          </table:table-cell>
          <table:table-cell table:style-name="ce1" office:value-type="string" calcext:value-type="string">
            <text:p>SEDE MOSQUERA; RAFAEL TRIANA; QUADRATT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2072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601308" calcext:value-type="float">
            <text:p>47601308</text:p>
          </table:table-cell>
          <table:table-cell table:style-name="ce1" office:value-type="float" office:value="-741743602" calcext:value-type="float">
            <text:p>-74174360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MUEBLES JAMAR</text:p>
          </table:table-cell>
          <table:table-cell table:style-name="ce1" office:value-type="string" calcext:value-type="string">
            <text:p>JAMAR CENDIS GALAPA</text:p>
          </table:table-cell>
          <table:table-cell table:style-name="ce1" office:value-type="string" calcext:value-type="string">
            <text:p>SEDE BARRANQUILLA; CENDI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301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936493" calcext:value-type="float">
            <text:p>10936493</text:p>
          </table:table-cell>
          <table:table-cell table:style-name="ce1" office:value-type="float" office:value="-74855015" calcext:value-type="float">
            <text:p>-7485501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9-04T10:44:51" calcext:value-type="date">
            <text:p>04/09/23 10:44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NATIONAL CLINICS CENTENARIO S.A.S</text:p>
          </table:table-cell>
          <table:table-cell table:style-name="ce1" office:value-type="string" calcext:value-type="string">
            <text:p>NATIONAL CLINICS CENTENARIO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083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05994" calcext:value-type="float">
            <text:p>4605994</text:p>
          </table:table-cell>
          <table:table-cell table:style-name="ce1" office:value-type="float" office:value="-74082881" calcext:value-type="float">
            <text:p>-7408288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4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NOVALENE ZONA FRANCA S.A.S</text:p>
          </table:table-cell>
          <table:table-cell table:style-name="ce1" office:value-type="string" calcext:value-type="string">
            <text:p>NOVALENE ZONA FRANCA</text:p>
          </table:table-cell>
          <table:table-cell table:style-name="ce1" office:value-type="string" calcext:value-type="string">
            <text:p>SEDE MOSQUERA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CC2.X-3.X|Trifasico|24VDC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MOVISTAR M2M</text:p>
          </table:table-cell>
          <table:table-cell table:style-name="ce1" office:value-type="float" office:value="8.93407250000616E+018" calcext:value-type="float">
            <text:p>8,93407250000616E+018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20753" calcext:value-type="float">
            <text:p>4720753</text:p>
          </table:table-cell>
          <table:table-cell table:style-name="ce1" office:value-type="float" office:value="-742429038" calcext:value-type="float">
            <text:p>-74242903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5-10-01T08:28:34" calcext:value-type="date">
            <text:p>01/10/25 08:28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NOVASALUD CARIBE IPS S.A</text:p>
          </table:table-cell>
          <table:table-cell table:style-name="ce1" office:value-type="string" calcext:value-type="string">
            <text:p>NOVA SALUD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319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914243" calcext:value-type="float">
            <text:p>10914243</text:p>
          </table:table-cell>
          <table:table-cell table:style-name="ce1" office:value-type="float" office:value="-74773474" calcext:value-type="float">
            <text:p>-7477347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8-16T10:46:18" calcext:value-type="date">
            <text:p>16/08/23 10:46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ALMA GRANDE MALL COMERCIALPH</text:p>
          </table:table-cell>
          <table:table-cell table:style-name="ce1" office:value-type="string" calcext:value-type="string">
            <text:p>PALMA GRANDE MALL COMERCIAL PH</text:p>
          </table:table-cell>
          <table:table-cell table:style-name="ce1" office:value-type="string" calcext:value-type="string">
            <text:p>SEDE MEDELLIN; PALMA GRANDE MALL COMERCIAL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441</text:p>
          </table:table-cell>
          <table:table-cell table:style-name="ce1" office:value-type="float" office:value="8.9340711002999E+018" calcext:value-type="float">
            <text:p>8,9340711002999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2028" calcext:value-type="float">
            <text:p>622028</text:p>
          </table:table-cell>
          <table:table-cell table:style-name="ce1" office:value-type="float" office:value="-75566482" calcext:value-type="float">
            <text:p>-7556648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08T05:43:38" calcext:value-type="date">
            <text:p>08/07/26 05:4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PALMS AVENUE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195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1762" calcext:value-type="float">
            <text:p>621762</text:p>
          </table:table-cell>
          <table:table-cell table:style-name="ce1" office:value-type="float" office:value="-75565365" calcext:value-type="float">
            <text:p>-7556536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ARQUE COMERCIAL GUACARI SINCELEJO</text:p>
          </table:table-cell>
          <table:table-cell table:style-name="ce1" office:value-type="string" calcext:value-type="string">
            <text:p>PARQUE COMERCIAL GUACARI GEN01</text:p>
          </table:table-cell>
          <table:table-cell table:style-name="ce1" office:value-type="string" calcext:value-type="string">
            <text:p>SEDE MEDELLIN; GUACARI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431 / M2M</text:p>
          </table:table-cell>
          <table:table-cell table:style-name="ce1" office:value-type="float" office:value="8.93407510025853E+018" calcext:value-type="float">
            <text:p>8,93407510025853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3024786" calcext:value-type="float">
            <text:p>93024786</text:p>
          </table:table-cell>
          <table:table-cell table:style-name="ce1" office:value-type="float" office:value="-753832228" calcext:value-type="float">
            <text:p>-75383222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4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ARQUE COMERCIAL GUACARI SINCELEJO</text:p>
          </table:table-cell>
          <table:table-cell table:style-name="ce1" office:value-type="string" calcext:value-type="string">
            <text:p>PARQUE COMERCIAL GUACARI GEN02</text:p>
          </table:table-cell>
          <table:table-cell table:style-name="ce1" office:value-type="string" calcext:value-type="string">
            <text:p>SEDE MEDELLIN; GUACARI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432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301" calcext:value-type="float">
            <text:p>9301</text:p>
          </table:table-cell>
          <table:table-cell table:style-name="ce1" office:value-type="float" office:value="-75382" calcext:value-type="float">
            <text:p>-7538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01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ARQUE COMERCIAL GUACARI SINCELEJO</text:p>
          </table:table-cell>
          <table:table-cell table:style-name="ce1" office:value-type="string" calcext:value-type="string">
            <text:p>PARQUE COMERCIAL GUACARI GEN03</text:p>
          </table:table-cell>
          <table:table-cell table:style-name="ce1" office:value-type="string" calcext:value-type="string">
            <text:p>SEDE MEDELLIN; GUACARI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433 / M2M</text:p>
          </table:table-cell>
          <table:table-cell table:style-name="ce1" office:value-type="float" office:value="8.93407510025853E+018" calcext:value-type="float">
            <text:p>8,93407510025853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301" calcext:value-type="float">
            <text:p>9301</text:p>
          </table:table-cell>
          <table:table-cell table:style-name="ce1" office:value-type="float" office:value="-75382" calcext:value-type="float">
            <text:p>-7538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09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ARQUE COMERCIAL GUACARI SINCELEJO</text:p>
          </table:table-cell>
          <table:table-cell table:style-name="ce1" office:value-type="string" calcext:value-type="string">
            <text:p>PARQUE COMERCIAL GUACARI GEN04 PROCINAL</text:p>
          </table:table-cell>
          <table:table-cell table:style-name="ce1" office:value-type="string" calcext:value-type="string">
            <text:p>SEDE MEDELLIN; GUACARI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459 / M2M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301" calcext:value-type="float">
            <text:p>9301</text:p>
          </table:table-cell>
          <table:table-cell table:style-name="ce1" office:value-type="float" office:value="-75382" calcext:value-type="float">
            <text:p>-7538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4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ARQUE EMPRESARIAL PH</text:p>
          </table:table-cell>
          <table:table-cell table:style-name="ce1" office:value-type="string" calcext:value-type="string">
            <text:p>EDIFICIO PARQUE EMPRESARIAL ACEIS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321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96902" calcext:value-type="float">
            <text:p>6196902</text:p>
          </table:table-cell>
          <table:table-cell table:style-name="ce1" office:value-type="float" office:value="-75558557" calcext:value-type="float">
            <text:p>-7555855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DC VINOS Y LICORES SAS</text:p>
          </table:table-cell>
          <table:table-cell table:style-name="ce1" office:value-type="string" calcext:value-type="string">
            <text:p>PDC VINOS Y LICORES</text:p>
          </table:table-cell>
          <table:table-cell table:style-name="ce1" office:value-type="string" calcext:value-type="string">
            <text:p>SEDE MOSQUERA; RAFAEL TRIANA; PDC VINO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130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28" calcext:value-type="float">
            <text:p>4628</text:p>
          </table:table-cell>
          <table:table-cell table:style-name="ce1" office:value-type="float" office:value="-74114" calcext:value-type="float">
            <text:p>-7411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EPSICO ALIMENTOS COLOMBIA LTDA - ENERGIA</text:p>
          </table:table-cell>
          <table:table-cell table:style-name="ce1" office:value-type="string" calcext:value-type="string">
            <text:p>PEPSICO BARRANQUILLA</text:p>
          </table:table-cell>
          <table:table-cell table:style-name="ce1" office:value-type="string" calcext:value-type="string">
            <text:p>SEDE BARRANQUILLA; JULIAN RINCON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CC1302-PCC1.1|Trifasico|12VDC</text:p>
          </table:table-cell>
          <table:table-cell table:style-name="ce1" office:value-type="string" calcext:value-type="string">
            <text:p>CamKit2</text:p>
          </table:table-cell>
          <table:table-cell/>
          <table:table-cell table:style-name="ce1" office:value-type="float" office:value="5.71017024083857E+016" calcext:value-type="float">
            <text:p>5,71017024083857E+016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9638174" calcext:value-type="float">
            <text:p>109638174</text:p>
          </table:table-cell>
          <table:table-cell table:style-name="ce1" office:value-type="float" office:value="-748397657" calcext:value-type="float">
            <text:p>-748397657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6-25T14:02:49" calcext:value-type="date">
            <text:p>25/06/26 14:02</text:p>
          </table:table-cell>
          <table:table-cell table:style-name="ce4" office:value-type="date" office:date-value="2026-07-14T15:07:54" calcext:value-type="date">
            <text:p>14/07/26 15:07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EPSICO ALIMENTOS COLOMBIA LTDA - ENERGIA</text:p>
          </table:table-cell>
          <table:table-cell table:style-name="ce1" office:value-type="string" calcext:value-type="string">
            <text:p>PEPSICO BUCARAMANGA</text:p>
          </table:table-cell>
          <table:table-cell table:style-name="ce1" office:value-type="string" calcext:value-type="string">
            <text:p>SEDE MOSQUER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OVISTAR M2M</text:p>
          </table:table-cell>
          <table:table-cell table:style-name="ce1" office:value-type="float" office:value="8.93407610014978E+018" calcext:value-type="float">
            <text:p>8,93407610014978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0629047" calcext:value-type="float">
            <text:p>70629047</text:p>
          </table:table-cell>
          <table:table-cell table:style-name="ce1" office:value-type="float" office:value="-731584332" calcext:value-type="float">
            <text:p>-731584332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6-02T10:46:06" calcext:value-type="date">
            <text:p>02/06/26 10:46</text:p>
          </table:table-cell>
          <table:table-cell table:style-name="ce4" office:value-type="date" office:date-value="2026-07-14T15:10:2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EPSICO ALIMENTOS COLOMBIA LTDA - ENERGIA</text:p>
          </table:table-cell>
          <table:table-cell table:style-name="ce1" office:value-type="string" calcext:value-type="string">
            <text:p>PRINCIPAL-MC INNOVA</text:p>
          </table:table-cell>
          <table:table-cell table:style-name="ce1" office:value-type="string" calcext:value-type="string">
            <text:p>SEDE MOSQUER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4033077E+016" calcext:value-type="float">
            <text:p>5,71017024033077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807844" calcext:value-type="float">
            <text:p>47807844</text:p>
          </table:table-cell>
          <table:table-cell table:style-name="ce1" office:value-type="float" office:value="-741735992" calcext:value-type="float">
            <text:p>-741735992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3-26T15:20:37" calcext:value-type="date">
            <text:p>26/03/26 15:20</text:p>
          </table:table-cell>
          <table:table-cell table:style-name="ce4" office:value-type="date" office:date-value="2026-07-14T15:10:1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ERFECT BODY</text:p>
          </table:table-cell>
          <table:table-cell table:style-name="ce1" office:value-type="string" calcext:value-type="string">
            <text:p>PERFECT BODY SANTAMARTA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333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240907" calcext:value-type="float">
            <text:p>11240907</text:p>
          </table:table-cell>
          <table:table-cell table:style-name="ce1" office:value-type="float" office:value="-74191795" calcext:value-type="float">
            <text:p>-7419179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09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ERIODICO EL UNIVERSAL CARTAGENA</text:p>
          </table:table-cell>
          <table:table-cell table:style-name="ce1" office:value-type="string" calcext:value-type="string">
            <text:p>EL UNIVERSAL CARTAGENA GEN01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Exemys</text:p>
          </table:table-cell>
          <table:table-cell table:style-name="ce1" office:value-type="string" calcext:value-type="string">
            <text:p>Exemys Digital</text:p>
          </table:table-cell>
          <table:table-cell table:style-name="ce1" office:value-type="string" calcext:value-type="string">
            <text:p>Digital</text:p>
          </table:table-cell>
          <table:table-cell table:style-name="ce1" office:value-type="string" calcext:value-type="string">
            <text:p>BQL-0204</text:p>
          </table:table-cell>
          <table:table-cell/>
          <table:table-cell table:style-name="ce1" office:value-type="string" calcext:value-type="string">
            <text:p>Exemys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21037" calcext:value-type="float">
            <text:p>10421037</text:p>
          </table:table-cell>
          <table:table-cell table:style-name="ce1" office:value-type="float" office:value="-75540175" calcext:value-type="float">
            <text:p>-7554017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1:00" calcext:value-type="date">
            <text:p>14/07/26 15:11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LATINUM SUPERIOR</text:p>
          </table:table-cell>
          <table:table-cell table:style-name="ce1" office:value-type="string" calcext:value-type="string">
            <text:p>CONJUNTO PLATINUM SUPERIOR PH ACEIS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4084094E+016" calcext:value-type="float">
            <text:p>5,71017024084094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6.2876</text:p>
          </table:table-cell>
          <table:table-cell table:style-name="ce1" office:value-type="float" office:value="-75539" calcext:value-type="float">
            <text:p>-7553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LAZA MAYOR CONVENCIONES Y EXPOSICIONES S.A</text:p>
          </table:table-cell>
          <table:table-cell table:style-name="ce1" office:value-type="string" calcext:value-type="string">
            <text:p>PLAZA MAYOR GEN CUMMINS</text:p>
          </table:table-cell>
          <table:table-cell table:style-name="ce1" office:value-type="string" calcext:value-type="string">
            <text:p>SEDE MEDELLIN; PLAZA MAYOR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457</text:p>
          </table:table-cell>
          <table:table-cell table:style-name="ce1" office:value-type="float" office:value="8.93407510025659E+020" calcext:value-type="float">
            <text:p>8,93407510025659E+020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438399" calcext:value-type="float">
            <text:p>62438399</text:p>
          </table:table-cell>
          <table:table-cell table:style-name="ce1" office:value-type="float" office:value="-755780887" calcext:value-type="float">
            <text:p>-75578088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20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LAZA MAYOR CONVENCIONES Y EXPOSICIONES S.A</text:p>
          </table:table-cell>
          <table:table-cell table:style-name="ce1" office:value-type="string" calcext:value-type="string">
            <text:p>PLAZA MAYOR GEN DOOSAN</text:p>
          </table:table-cell>
          <table:table-cell table:style-name="ce1" office:value-type="string" calcext:value-type="string">
            <text:p>SEDE MEDELLIN; PLAZA MAYOR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695</text:p>
          </table:table-cell>
          <table:table-cell table:style-name="ce1" office:value-type="float" office:value="5.71017024033077E+016" calcext:value-type="float">
            <text:p>5,71017024033077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438399" calcext:value-type="float">
            <text:p>62438399</text:p>
          </table:table-cell>
          <table:table-cell table:style-name="ce1" office:value-type="float" office:value="-755780887" calcext:value-type="float">
            <text:p>-75578088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20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OLLOS JA S.A</text:p>
          </table:table-cell>
          <table:table-cell table:style-name="ce1" office:value-type="string" calcext:value-type="string">
            <text:p>POLLOS JA GEN 100kW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336</text:p>
          </table:table-cell>
          <table:table-cell table:style-name="ce1" office:value-type="float" office:value="5.71011014028868E+016" calcext:value-type="float">
            <text:p>5,71011014028868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08843" calcext:value-type="float">
            <text:p>11008843</text:p>
          </table:table-cell>
          <table:table-cell table:style-name="ce1" office:value-type="float" office:value="-74919727" calcext:value-type="float">
            <text:p>-7491972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03-17T20:12:30" calcext:value-type="date">
            <text:p>17/03/24 20:1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OLLOS JA S.A</text:p>
          </table:table-cell>
          <table:table-cell table:style-name="ce1" office:value-type="string" calcext:value-type="string">
            <text:p>POLLOS JA GEN 130kW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335</text:p>
          </table:table-cell>
          <table:table-cell table:style-name="ce1" office:value-type="float" office:value="5.71011014012604E+016" calcext:value-type="float">
            <text:p>5,71011014012604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08843" calcext:value-type="float">
            <text:p>11008843</text:p>
          </table:table-cell>
          <table:table-cell table:style-name="ce1" office:value-type="float" office:value="-74919727" calcext:value-type="float">
            <text:p>-7491972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11-21T10:22:06" calcext:value-type="date">
            <text:p>21/11/24 10:2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OSTOBON SA - ESTACIONARIO</text:p>
          </table:table-cell>
          <table:table-cell table:style-name="ce1" office:value-type="string" calcext:value-type="string">
            <text:p>OBRA: CEDI (CENTRO DE DISTRIBUCION) RIONEGRO</text:p>
          </table:table-cell>
          <table:table-cell table:style-name="ce1" office:value-type="string" calcext:value-type="string">
            <text:p>SEDE MEDELLIN; Obra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SO600|Trifasico|12VDC</text:p>
          </table:table-cell>
          <table:table-cell table:style-name="ce1" office:value-type="string" calcext:value-type="string">
            <text:p>CamKit2</text:p>
          </table:table-cell>
          <table:table-cell/>
          <table:table-cell table:style-name="ce1" office:value-type="float" office:value="8.93407550000437E+018" calcext:value-type="float">
            <text:p>8,93407550000437E+018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630565" calcext:value-type="float">
            <text:p>61630565</text:p>
          </table:table-cell>
          <table:table-cell table:style-name="ce1" office:value-type="float" office:value="-753675834" calcext:value-type="float">
            <text:p>-75367583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11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RICESMART DE COLOMBIA</text:p>
          </table:table-cell>
          <table:table-cell table:style-name="ce1" office:value-type="string" calcext:value-type="string">
            <text:p>PRICESMART BARRANQUILLA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CC2.X-3.X|Trifasico|24VDC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MOVISTAR M2M</text:p>
          </table:table-cell>
          <table:table-cell table:style-name="ce1" office:value-type="float" office:value="8.93407650000415E+018" calcext:value-type="float">
            <text:p>8,93407650000415E+018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181016657858" calcext:value-type="float">
            <text:p>110181016657858</text:p>
          </table:table-cell>
          <table:table-cell table:style-name="ce1" office:value-type="float" office:value="-748348224163055" calcext:value-type="float">
            <text:p>-74834822416305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8:33" calcext:value-type="date">
            <text:p>14/07/26 15:08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RICESMART DE COLOMBIA</text:p>
          </table:table-cell>
          <table:table-cell table:style-name="ce1" office:value-type="string" calcext:value-type="string">
            <text:p>PRICESMART COLOMBIA</text:p>
          </table:table-cell>
          <table:table-cell table:style-name="ce1" office:value-type="string" calcext:value-type="string">
            <text:p>SEDE BARRANQUILLA; PRICESMART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338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1856" calcext:value-type="float">
            <text:p>1101856</text:p>
          </table:table-cell>
          <table:table-cell table:style-name="ce1" office:value-type="float" office:value="-74835001" calcext:value-type="float">
            <text:p>-7483500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22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RIMAX COLOMBIA S.A</text:p>
          </table:table-cell>
          <table:table-cell table:style-name="ce1" office:value-type="string" calcext:value-type="string">
            <text:p>PRIMAX GEN01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0911</text:p>
          </table:table-cell>
          <table:table-cell table:style-name="ce1" office:value-type="float" office:value="5.71011013079764E+016" calcext:value-type="float">
            <text:p>5,71011013079764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76835" calcext:value-type="float">
            <text:p>4676835</text:p>
          </table:table-cell>
          <table:table-cell table:style-name="ce1" office:value-type="float" office:value="-74058279" calcext:value-type="float">
            <text:p>-7405827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ROYECTO OPTIMUS COMPLEJO EMPRESARIAL Y HOTELEROS PH</text:p>
          </table:table-cell>
          <table:table-cell table:style-name="ce1" office:value-type="string" calcext:value-type="string">
            <text:p>PROYECTO OPTIMUS GEN OFICINAS LOCALES 450kW</text:p>
          </table:table-cell>
          <table:table-cell table:style-name="ce1" office:value-type="string" calcext:value-type="string">
            <text:p>SEDE MOSQUERA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176</text:p>
          </table:table-cell>
          <table:table-cell table:style-name="ce1" office:value-type="float" office:value="12896005745903" calcext:value-type="float">
            <text:p>12896005745903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5" calcext:value-type="float">
            <text:p>4685</text:p>
          </table:table-cell>
          <table:table-cell table:style-name="ce1" office:value-type="float" office:value="-74126" calcext:value-type="float">
            <text:p>-7412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ROYECTO OPTIMUS COMPLEJO EMPRESARIAL Y HOTELEROS PH</text:p>
          </table:table-cell>
          <table:table-cell table:style-name="ce1" office:value-type="string" calcext:value-type="string">
            <text:p>PROYECTO OPTIMUS GEN OFICINAS LOCALES 750kW</text:p>
          </table:table-cell>
          <table:table-cell table:style-name="ce1" office:value-type="string" calcext:value-type="string">
            <text:p>SEDE MOSQUERA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177</text:p>
          </table:table-cell>
          <table:table-cell table:style-name="ce1" office:value-type="float" office:value="8.93407510026199E+018" calcext:value-type="float">
            <text:p>8,93407510026199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5" calcext:value-type="float">
            <text:p>4685</text:p>
          </table:table-cell>
          <table:table-cell table:style-name="ce1" office:value-type="float" office:value="-74126" calcext:value-type="float">
            <text:p>-7412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PROYECTO OPTIMUS COMPLEJO EMPRESARIAL Y HOTELEROS PH</text:p>
          </table:table-cell>
          <table:table-cell table:style-name="ce1" office:value-type="string" calcext:value-type="string">
            <text:p>PROYECTO OPTIMUS GEN ZONAS COMUNES 750kW</text:p>
          </table:table-cell>
          <table:table-cell table:style-name="ce1" office:value-type="string" calcext:value-type="string">
            <text:p>SEDE MOSQUERA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178</text:p>
          </table:table-cell>
          <table:table-cell table:style-name="ce1" office:value-type="float" office:value="8.93407510026199E+018" calcext:value-type="float">
            <text:p>8,93407510026199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5" calcext:value-type="float">
            <text:p>4685</text:p>
          </table:table-cell>
          <table:table-cell table:style-name="ce1" office:value-type="float" office:value="-74126" calcext:value-type="float">
            <text:p>-7412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RUTA N ACEIS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003</text:p>
          </table:table-cell>
          <table:table-cell table:style-name="ce1" office:value-type="string" calcext:value-type="string">
            <text:p>IP 10.10.20.29 NetMask 255.255.254.0 GateIP 10.10.20.1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64515" calcext:value-type="float">
            <text:p>6264515</text:p>
          </table:table-cell>
          <table:table-cell table:style-name="ce1" office:value-type="float" office:value="-75566574" calcext:value-type="float">
            <text:p>-7556657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14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ALITRE PLAZA CENTRO COMERCIAL PH</text:p>
          </table:table-cell>
          <table:table-cell table:style-name="ce1" office:value-type="string" calcext:value-type="string">
            <text:p>CC SALITRE PLAZA SUB 1 GEN 1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186 / IB-LITE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5753282061" calcext:value-type="float">
            <text:p>4655753282061</text:p>
          </table:table-cell>
          <table:table-cell table:style-name="ce1" office:value-type="float" office:value="-741115593910218" calcext:value-type="float">
            <text:p>-74111559391021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ALITRE PLAZA CENTRO COMERCIAL PH</text:p>
          </table:table-cell>
          <table:table-cell table:style-name="ce1" office:value-type="string" calcext:value-type="string">
            <text:p>CC SALITRE PLAZA SUB 1 GEN 2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182 / IB-LITE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56035739573" calcext:value-type="float">
            <text:p>46556035739573</text:p>
          </table:table-cell>
          <table:table-cell table:style-name="ce1" office:value-type="float" office:value="-741114091873169" calcext:value-type="float">
            <text:p>-74111409187316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ALITRE PLAZA CENTRO COMERCIAL PH</text:p>
          </table:table-cell>
          <table:table-cell table:style-name="ce1" office:value-type="string" calcext:value-type="string">
            <text:p>CC SALITRE PLAZA SUB 1 GEN 3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183 / IB-LITE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54966395781" calcext:value-type="float">
            <text:p>46554966395781</text:p>
          </table:table-cell>
          <table:table-cell table:style-name="ce1" office:value-type="float" office:value="-741113877296447" calcext:value-type="float">
            <text:p>-74111387729644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ALITRE PLAZA CENTRO COMERCIAL PH</text:p>
          </table:table-cell>
          <table:table-cell table:style-name="ce1" office:value-type="string" calcext:value-type="string">
            <text:p>CC SALITRE PLAZA SUB 2 GEN 1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184 / IB-LITE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54538658218" calcext:value-type="float">
            <text:p>46554538658218</text:p>
          </table:table-cell>
          <table:table-cell table:style-name="ce1" office:value-type="float" office:value="-741113877296448" calcext:value-type="float">
            <text:p>-74111387729644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ALITRE PLAZA CENTRO COMERCIAL PH</text:p>
          </table:table-cell>
          <table:table-cell table:style-name="ce1" office:value-type="string" calcext:value-type="string">
            <text:p>CC SALITRE PLAZA SUB 2 GEN 2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185 / IB-LITE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54966395781" calcext:value-type="float">
            <text:p>46554966395781</text:p>
          </table:table-cell>
          <table:table-cell table:style-name="ce1" office:value-type="float" office:value="-741108298301697" calcext:value-type="float">
            <text:p>-74110829830169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ALUD Y SERVICIOS</text:p>
          </table:table-cell>
          <table:table-cell table:style-name="ce1" office:value-type="string" calcext:value-type="string">
            <text:p>EDIFICIO SALUD Y SERVICIO ACEIS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332</text:p>
          </table:table-cell>
          <table:table-cell table:style-name="ce1" office:value-type="float" office:value="5.71017024033077E+016" calcext:value-type="float">
            <text:p>5,71017024033077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6.22</text:p>
          </table:table-cell>
          <table:table-cell table:style-name="ce1" office:value-type="float" office:value="-75564" calcext:value-type="float">
            <text:p>-7556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9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EMPERTEX DE COLOMBIA</text:p>
          </table:table-cell>
          <table:table-cell table:style-name="ce1" office:value-type="string" calcext:value-type="string">
            <text:p>SEMPERTEX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357</text:p>
          </table:table-cell>
          <table:table-cell table:style-name="ce1" office:value-type="float" office:value="5.71014016070465E+016" calcext:value-type="float">
            <text:p>5,71014016070465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01189" calcext:value-type="float">
            <text:p>11001189</text:p>
          </table:table-cell>
          <table:table-cell table:style-name="ce1" office:value-type="float" office:value="-74777244" calcext:value-type="float">
            <text:p>-7477724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8-11T09:08:48" calcext:value-type="date">
            <text:p>11/08/23 09:08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ERVIENTREGA S A</text:p>
          </table:table-cell>
          <table:table-cell table:style-name="ce1" office:value-type="string" calcext:value-type="string">
            <text:p>SERVIENTREGA MEDELLIN DATACENTER</text:p>
          </table:table-cell>
          <table:table-cell table:style-name="ce1" office:value-type="string" calcext:value-type="string">
            <text:p>SEDE MEDELLIN; MEDELLIN; ANTIOQUIA; RODOLFO VELEZ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580</text:p>
          </table:table-cell>
          <table:table-cell table:style-name="ce1" office:value-type="float" office:value="8.95202001929E+018" calcext:value-type="float">
            <text:p>8,95202001929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20876" calcext:value-type="float">
            <text:p>6220876</text:p>
          </table:table-cell>
          <table:table-cell table:style-name="ce1" office:value-type="float" office:value="-75575707" calcext:value-type="float">
            <text:p>-7557570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1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ERVIENTREGA S A</text:p>
          </table:table-cell>
          <table:table-cell table:style-name="ce1" office:value-type="string" calcext:value-type="string">
            <text:p>SERVIENTREGA MEDELLIN SOTANO</text:p>
          </table:table-cell>
          <table:table-cell table:style-name="ce1" office:value-type="string" calcext:value-type="string">
            <text:p>SEDE MEDELLIN; MEDELLIN; ANTIOQUI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579</text:p>
          </table:table-cell>
          <table:table-cell table:style-name="ce1" office:value-type="float" office:value="8.93407720000165E+018" calcext:value-type="float">
            <text:p>8,9340772000016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21557" calcext:value-type="float">
            <text:p>6221557</text:p>
          </table:table-cell>
          <table:table-cell table:style-name="ce1" office:value-type="float" office:value="-7557637" calcext:value-type="float">
            <text:p>-755763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2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ERVIENTREGA S A DIRECCION GENERAL</text:p>
          </table:table-cell>
          <table:table-cell table:style-name="ce1" office:value-type="string" calcext:value-type="string">
            <text:p>SERVIENTREGA DIRECCION GENERAL</text:p>
          </table:table-cell>
          <table:table-cell table:style-name="ce1" office:value-type="string" calcext:value-type="string">
            <text:p>SEDE MOSQUERA; RAFAEL TRIANA; BOGOT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532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4.61</text:p>
          </table:table-cell>
          <table:table-cell table:style-name="ce1" office:value-type="float" office:value="-74102" calcext:value-type="float">
            <text:p>-7410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ERVIENTREGA S A DIRECCION GENERAL</text:p>
          </table:table-cell>
          <table:table-cell table:style-name="ce1" office:value-type="string" calcext:value-type="string">
            <text:p>SERVIENTREGA DIRECCION GENERAL GEN02</text:p>
          </table:table-cell>
          <table:table-cell table:style-name="ce1" office:value-type="string" calcext:value-type="string">
            <text:p>SEDE MOSQUERA; RAFAEL TRIANA; BOGOT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533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980523" calcext:value-type="float">
            <text:p>10980523</text:p>
          </table:table-cell>
          <table:table-cell table:style-name="ce1" office:value-type="float" office:value="-74754942" calcext:value-type="float">
            <text:p>-7475494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IS VIDA SAS</text:p>
          </table:table-cell>
          <table:table-cell table:style-name="ce1" office:value-type="string" calcext:value-type="string">
            <text:p>SISVIDA GEN01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837</text:p>
          </table:table-cell>
          <table:table-cell table:style-name="ce1" office:value-type="float" office:value="123110542343704" calcext:value-type="float">
            <text:p>123110542343704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48243" calcext:value-type="float">
            <text:p>4748243</text:p>
          </table:table-cell>
          <table:table-cell table:style-name="ce1" office:value-type="float" office:value="-74046048" calcext:value-type="float">
            <text:p>-7404604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CIEDAD MEDICA SANTA MARTA</text:p>
          </table:table-cell>
          <table:table-cell table:style-name="ce1" office:value-type="string" calcext:value-type="string">
            <text:p>SOCIEDAD MEDICA SANTA MARTA GEN 1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364</text:p>
          </table:table-cell>
          <table:table-cell table:style-name="ce1" office:value-type="float" office:value="5.71015018070594E+016" calcext:value-type="float">
            <text:p>5,71015018070594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2367271637543" calcext:value-type="float">
            <text:p>112367271637543</text:p>
          </table:table-cell>
          <table:table-cell table:style-name="ce1" office:value-type="float" office:value="-742100930213928" calcext:value-type="float">
            <text:p>-74210093021392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CIEDAD MEDICA SANTA MARTA</text:p>
          </table:table-cell>
          <table:table-cell table:style-name="ce1" office:value-type="string" calcext:value-type="string">
            <text:p>SOCIEDAD MEDICA SANTA MARTA GEN 2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365</text:p>
          </table:table-cell>
          <table:table-cell table:style-name="ce1" office:value-type="string" calcext:value-type="string">
            <text:p>5710150180771 0044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2367271637543" calcext:value-type="float">
            <text:p>112367271637543</text:p>
          </table:table-cell>
          <table:table-cell table:style-name="ce1" office:value-type="float" office:value="-742100930213928" calcext:value-type="float">
            <text:p>-742100930213928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6-28T09:09:07" calcext:value-type="date">
            <text:p>28/06/26 09:09</text:p>
          </table:table-cell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CIEDAD NACIONAL DE LA CRUZ ROJA COLOMBIANA</text:p>
          </table:table-cell>
          <table:table-cell table:style-name="ce1" office:value-type="string" calcext:value-type="string">
            <text:p>CRUZ ROJA SECCIONAL NACIONAL</text:p>
          </table:table-cell>
          <table:table-cell table:style-name="ce1" office:value-type="string" calcext:value-type="string">
            <text:p>SEDE MOSQUERA; JUAN DAVID CALL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199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75" calcext:value-type="float">
            <text:p>4675</text:p>
          </table:table-cell>
          <table:table-cell table:style-name="ce1" office:value-type="float" office:value="-74087" calcext:value-type="float">
            <text:p>-7408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CIEDAD PORTUARIA AGUA DULCE</text:p>
          </table:table-cell>
          <table:table-cell table:style-name="ce1" office:value-type="string" calcext:value-type="string">
            <text:p>GRUA RTG AGUADULCE QSZ</text:p>
          </table:table-cell>
          <table:table-cell table:style-name="ce1" office:value-type="string" calcext:value-type="string">
            <text:p>SEDE CALI; FERNANDO MUÑOZ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CC2.X-3.X|Trifasico|24VDC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MOVISTAR M2M</text:p>
          </table:table-cell>
          <table:table-cell table:style-name="ce1" office:value-type="float" office:value="8.93407550000496E+018" calcext:value-type="float">
            <text:p>8,93407550000496E+018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8907858" calcext:value-type="float">
            <text:p>38907858</text:p>
          </table:table-cell>
          <table:table-cell table:style-name="ce1" office:value-type="float" office:value="-77079787" calcext:value-type="float">
            <text:p>-7707978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5-01T16:57:04" calcext:value-type="date">
            <text:p>01/05/26 16:57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ARMENIA</text:p>
          </table:table-cell>
          <table:table-cell table:style-name="ce1" office:value-type="string" calcext:value-type="string">
            <text:p>SEDE PEREIRA; DANIEL OCAMPO; ARMENIA; jmalagonlo; CAMKIT2; HOMECENTER ARMENIA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CC1302-PCC1.1|Trifasico|24VDC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IBG0189</text:p>
          </table:table-cell>
          <table:table-cell/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534463" calcext:value-type="float">
            <text:p>4534463</text:p>
          </table:table-cell>
          <table:table-cell table:style-name="ce1" office:value-type="float" office:value="-75664705" calcext:value-type="float">
            <text:p>-7566470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5-11-04T07:06:12" calcext:value-type="date">
            <text:p>04/11/25 07:06</text:p>
          </table:table-cell>
          <table:table-cell/>
        </table:table-row>
        <table:table-row table:style-name="ro9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BARRANQUILLA CENTRO - SUR</text:p>
          </table:table-cell>
          <table:table-cell table:style-name="ce1" office:value-type="string" calcext:value-type="string">
            <text:p>SEDE BARRANQUILLA; BARRANQUILLASUR; dforerom; HOMECENTER BARRANQUILLA CENTRO - SUR; PLANTAS HOMECENTER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48</text:p>
          </table:table-cell>
          <table:table-cell table:style-name="ce1" office:value-type="float" office:value="8.93407110030027E+018" calcext:value-type="float">
            <text:p>8,93407110030027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988411" calcext:value-type="float">
            <text:p>10988411</text:p>
          </table:table-cell>
          <table:table-cell table:style-name="ce1" office:value-type="float" office:value="-74787154" calcext:value-type="float">
            <text:p>-7478715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11-29T06:18:17" calcext:value-type="date">
            <text:p>29/11/23 06:18</text:p>
          </table:table-cell>
          <table:table-cell/>
        </table:table-row>
        <table:table-row table:style-name="ro9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BARRANQUILLA NORTE GEN02</text:p>
          </table:table-cell>
          <table:table-cell table:style-name="ce1" office:value-type="string" calcext:value-type="string">
            <text:p>SEDE BARRANQUILLA; BARRANQUILLANORTE; dforerom; HOMECENTER BARRANQUILLA NORTE GEN02; PLANTAS HOMECENTER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43</text:p>
          </table:table-cell>
          <table:table-cell table:style-name="ce1" office:value-type="float" office:value="5.71011011071929E+016" calcext:value-type="float">
            <text:p>5,71011011071929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988408" calcext:value-type="float">
            <text:p>10988408</text:p>
          </table:table-cell>
          <table:table-cell table:style-name="ce1" office:value-type="float" office:value="-74787391" calcext:value-type="float">
            <text:p>-7478739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11-05T07:59:30" calcext:value-type="date">
            <text:p>05/11/23 07:59</text:p>
          </table:table-cell>
          <table:table-cell/>
        </table:table-row>
        <table:table-row table:style-name="ro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BELLO GEN01</text:p>
          </table:table-cell>
          <table:table-cell table:style-name="ce1" office:value-type="string" calcext:value-type="string">
            <text:p>SEDE MEDELLIN; BELLO; hocampom; RODOLFO VELEZ; HOMECENTER BELLO GEN01; HOMECENTER BELLO</text:p>
          </table:table-cell>
          <table:table-cell table:style-name="ce1" office:value-type="string" calcext:value-type="string">
            <text:p>Exemys</text:p>
          </table:table-cell>
          <table:table-cell table:style-name="ce1" office:value-type="string" calcext:value-type="string">
            <text:p>Exemys Digital</text:p>
          </table:table-cell>
          <table:table-cell table:style-name="ce1" office:value-type="string" calcext:value-type="string">
            <text:p>Digital</text:p>
          </table:table-cell>
          <table:table-cell table:style-name="ce1" office:value-type="string" calcext:value-type="string">
            <text:p>MED476</text:p>
          </table:table-cell>
          <table:table-cell/>
          <table:table-cell table:style-name="ce1" office:value-type="string" calcext:value-type="string">
            <text:p>Exemys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339064" calcext:value-type="float">
            <text:p>6339064</text:p>
          </table:table-cell>
          <table:table-cell table:style-name="ce1" office:value-type="float" office:value="-75543425" calcext:value-type="float">
            <text:p>-7554342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11-16T22:06:00" calcext:value-type="date">
            <text:p>16/11/23 22:06</text:p>
          </table:table-cell>
          <table:table-cell/>
        </table:table-row>
        <table:table-row table:style-name="ro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BELLO GEN02</text:p>
          </table:table-cell>
          <table:table-cell table:style-name="ce1" office:value-type="string" calcext:value-type="string">
            <text:p>SEDE MEDELLIN; BELLO; hocampom; RODOLFO VELEZ; HOMECENTER BELLO GEN02; HOMECENTER BELLO</text:p>
          </table:table-cell>
          <table:table-cell table:style-name="ce1" office:value-type="string" calcext:value-type="string">
            <text:p>Exemys</text:p>
          </table:table-cell>
          <table:table-cell table:style-name="ce1" office:value-type="string" calcext:value-type="string">
            <text:p>Exemys Digital</text:p>
          </table:table-cell>
          <table:table-cell table:style-name="ce1" office:value-type="string" calcext:value-type="string">
            <text:p>Digital</text:p>
          </table:table-cell>
          <table:table-cell table:style-name="ce1" office:value-type="string" calcext:value-type="string">
            <text:p>MED477</text:p>
          </table:table-cell>
          <table:table-cell/>
          <table:table-cell table:style-name="ce1" office:value-type="string" calcext:value-type="string">
            <text:p>Exemys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339064" calcext:value-type="float">
            <text:p>6339064</text:p>
          </table:table-cell>
          <table:table-cell table:style-name="ce1" office:value-type="float" office:value="-75543425" calcext:value-type="float">
            <text:p>-7554342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11-16T22:06:00" calcext:value-type="date">
            <text:p>16/11/23 22:06</text:p>
          </table:table-cell>
          <table:table-cell/>
        </table:table-row>
        <table:table-row table:style-name="ro9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BUCARAMANGA GEN01</text:p>
          </table:table-cell>
          <table:table-cell table:style-name="ce1" office:value-type="string" calcext:value-type="string">
            <text:p>SEDE MOSQUERA; BUCARAMANGA; hocampom; NELSON ROMERO; HOMECENTER BUCARAMANGA GEN01; PLANTAS HOMECENTER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BOG1205</text:p>
          </table:table-cell>
          <table:table-cell/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115649" calcext:value-type="float">
            <text:p>7115649</text:p>
          </table:table-cell>
          <table:table-cell table:style-name="ce1" office:value-type="float" office:value="-73120416" calcext:value-type="float">
            <text:p>-7312041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3-24T08:30:25" calcext:value-type="date">
            <text:p>24/03/26 08:30</text:p>
          </table:table-cell>
          <table:table-cell/>
        </table:table-row>
        <table:table-row table:style-name="ro6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CALI NORTE GEN01 455kW</text:p>
          </table:table-cell>
          <table:table-cell table:style-name="ce1" office:value-type="string" calcext:value-type="string">
            <text:p>SEDE CALI; FERNANDO MUÑOZ; CALINORTE; jmalagonlo; HOMECENTER CALI NORTE GEN01 455kW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CAL0140</text:p>
          </table:table-cell>
          <table:table-cell/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472076" calcext:value-type="float">
            <text:p>3472076</text:p>
          </table:table-cell>
          <table:table-cell table:style-name="ce1" office:value-type="float" office:value="-76528965" calcext:value-type="float">
            <text:p>-7652896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04-08T07:57:44" calcext:value-type="date">
            <text:p>08/04/24 07:57</text:p>
          </table:table-cell>
          <table:table-cell/>
        </table:table-row>
        <table:table-row table:style-name="ro6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CALI NORTE GEN02 725kW</text:p>
          </table:table-cell>
          <table:table-cell table:style-name="ce1" office:value-type="string" calcext:value-type="string">
            <text:p>SEDE CALI; FERNANDO MUÑOZ; CALINORTE; jmalagonlo; HOMECENTER CALI NORTE GEN02 725kW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CAL0139</text:p>
          </table:table-cell>
          <table:table-cell/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472076" calcext:value-type="float">
            <text:p>3472076</text:p>
          </table:table-cell>
          <table:table-cell table:style-name="ce1" office:value-type="float" office:value="-76528965" calcext:value-type="float">
            <text:p>-7652896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04-17T08:10:59" calcext:value-type="date">
            <text:p>17/04/24 08:10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CALI NORTE GEN03</text:p>
          </table:table-cell>
          <table:table-cell table:style-name="ce1" office:value-type="string" calcext:value-type="string">
            <text:p>SEDE CALI; FERNANDO MUÑOZ; CALINORTE; jmalagonlo; HOMECENTER CALI NORTE GEN03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CAL0141</text:p>
          </table:table-cell>
          <table:table-cell/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472076" calcext:value-type="float">
            <text:p>3472076</text:p>
          </table:table-cell>
          <table:table-cell table:style-name="ce1" office:value-type="float" office:value="-76528965" calcext:value-type="float">
            <text:p>-7652896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4" calcext:value-type="date">
            <text:p>14/07/26 15:09</text:p>
          </table:table-cell>
          <table:table-cell/>
        </table:table-row>
        <table:table-row table:style-name="ro6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CALI SUR GEN01</text:p>
          </table:table-cell>
          <table:table-cell table:style-name="ce1" office:value-type="string" calcext:value-type="string">
            <text:p>SEDE CALI; FERNANDO MUÑOZ; CALISUR; jmalagonlo; HOMECENTER CALI SUR; HOMECENTER CALI SUR GEN01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CAL0137</text:p>
          </table:table-cell>
          <table:table-cell/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366996" calcext:value-type="float">
            <text:p>3366996</text:p>
          </table:table-cell>
          <table:table-cell table:style-name="ce1" office:value-type="float" office:value="-76526969" calcext:value-type="float">
            <text:p>-7652696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0-12-28T16:39:01" calcext:value-type="date">
            <text:p>28/12/20 16:39</text:p>
          </table:table-cell>
          <table:table-cell/>
        </table:table-row>
        <table:table-row table:style-name="ro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CALI SUR GEN02 ALMACEN</text:p>
          </table:table-cell>
          <table:table-cell table:style-name="ce1" office:value-type="string" calcext:value-type="string">
            <text:p>SEDE CALI; FERNANDO MUÑOZ; CALISUR; jmalagonlo; HOMECENTER CALI SUR; HOMECENTER CALI SUR GEN02 ALMACEN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CAL0138</text:p>
          </table:table-cell>
          <table:table-cell/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366996" calcext:value-type="float">
            <text:p>3366996</text:p>
          </table:table-cell>
          <table:table-cell table:style-name="ce1" office:value-type="float" office:value="-76526969" calcext:value-type="float">
            <text:p>-7652696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1-07-12T03:14:41" calcext:value-type="date">
            <text:p>12/07/21 03:14</text:p>
          </table:table-cell>
          <table:table-cell/>
        </table:table-row>
        <table:table-row table:style-name="ro10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CALLE 26 DORADO GEN01 (test)</text:p>
          </table:table-cell>
          <table:table-cell table:style-name="ce1" office:value-type="string" calcext:value-type="string">
            <text:p>SEDE MOSQUERA; jpinedap; HOMECENTER DORADO; NELSON ROMERO; Sodimac-Girardot-venecia-Mosquera-Dorado; HOMECENTER CALLE 26 DORADO GEN01 (test)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203</text:p>
          </table:table-cell>
          <table:table-cell table:style-name="ce1" office:value-type="float" office:value="8.9340711002998E+018" calcext:value-type="float">
            <text:p>8,9340711002998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589278" calcext:value-type="float">
            <text:p>4589278</text:p>
          </table:table-cell>
          <table:table-cell table:style-name="ce1" office:value-type="float" office:value="-74205077" calcext:value-type="float">
            <text:p>-7420507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2" calcext:value-type="date">
            <text:p>24/06/26 09:13</text:p>
          </table:table-cell>
          <table:table-cell/>
        </table:table-row>
        <table:table-row table:style-name="ro11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CALLE 26 DORADO GEN02 (test)</text:p>
          </table:table-cell>
          <table:table-cell table:style-name="ce1" office:value-type="string" calcext:value-type="string">
            <text:p>SEDE MOSQUERA; jpinedap; HOMECENTER DORADO; NELSON ROMERO; Sodimac-Girardot-venecia-Mosquera-Dorado; HOMECENTER CALLE 26 DORADO GEN02 (test); HOMECENTER CALLE 26 DORADO GEN02 (test)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204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589278" calcext:value-type="float">
            <text:p>4589278</text:p>
          </table:table-cell>
          <table:table-cell table:style-name="ce1" office:value-type="float" office:value="-74205077" calcext:value-type="float">
            <text:p>-7420507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0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CALLE 30</text:p>
          </table:table-cell>
          <table:table-cell table:style-name="ce1" office:value-type="string" calcext:value-type="string">
            <text:p>SEDE BARRANQUILLA; CALLE30; PLANTAS HOMECENTER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46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945754" calcext:value-type="float">
            <text:p>10945754</text:p>
          </table:table-cell>
          <table:table-cell table:style-name="ce1" office:value-type="float" office:value="-74784" calcext:value-type="float">
            <text:p>-7478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5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CALLE 80 ALMACEN</text:p>
          </table:table-cell>
          <table:table-cell table:style-name="ce1" office:value-type="string" calcext:value-type="string">
            <text:p>SEDE MOSQUERA; HOMECENTER CALLE 80; NELSON ROMERO; HOMECENTER CALLE 80 ALMACEN; HOMECENTER CALLE 80 ALMACEN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BOG1213</text:p>
          </table:table-cell>
          <table:table-cell/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4898" calcext:value-type="float">
            <text:p>4684898</text:p>
          </table:table-cell>
          <table:table-cell table:style-name="ce1" office:value-type="float" office:value="-74079061" calcext:value-type="float">
            <text:p>-7407906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40" calcext:value-type="date">
            <text:p>14/07/26 15:09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CALLE 80 OFICINAS</text:p>
          </table:table-cell>
          <table:table-cell table:style-name="ce1" office:value-type="string" calcext:value-type="string">
            <text:p>SEDE MOSQUERA; HOMECENTER CALLE 80; NELSON ROMERO; HOMECENTER CALLE 80 OFICINAS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BOG1216</text:p>
          </table:table-cell>
          <table:table-cell/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4898" calcext:value-type="float">
            <text:p>4684898</text:p>
          </table:table-cell>
          <table:table-cell table:style-name="ce1" office:value-type="float" office:value="-74079061" calcext:value-type="float">
            <text:p>-7407906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8:07" calcext:value-type="date">
            <text:p>14/07/26 15:08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CC CARIBE PLAZA GEN 1</text:p>
          </table:table-cell>
          <table:table-cell table:style-name="ce1" office:value-type="string" calcext:value-type="string">
            <text:p>SEDE BARRANQUILLA; HOMECENTER; CARIBE PLAZA; PLANTAS HOMECENTER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44</text:p>
          </table:table-cell>
          <table:table-cell table:style-name="ce1" office:value-type="float" office:value="123110542035961" calcext:value-type="float">
            <text:p>123110542035961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14635" calcext:value-type="float">
            <text:p>10414635</text:p>
          </table:table-cell>
          <table:table-cell table:style-name="ce1" office:value-type="float" office:value="-75529931" calcext:value-type="float">
            <text:p>-7552993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04-08T07:49:36" calcext:value-type="date">
            <text:p>08/04/24 07:49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CC CARIBE PLAZA GEN 2</text:p>
          </table:table-cell>
          <table:table-cell table:style-name="ce1" office:value-type="string" calcext:value-type="string">
            <text:p>SEDE BARRANQUILLA; HOMECENTER; CARIBE PLAZA; PLANTAS HOMECENTER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45</text:p>
          </table:table-cell>
          <table:table-cell table:style-name="ce1" office:value-type="float" office:value="123110543521316" calcext:value-type="float">
            <text:p>1231105435213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14757" calcext:value-type="float">
            <text:p>10414757</text:p>
          </table:table-cell>
          <table:table-cell table:style-name="ce1" office:value-type="float" office:value="-75529381" calcext:value-type="float">
            <text:p>-7552938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04-08T07:50:07" calcext:value-type="date">
            <text:p>08/04/24 07:5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CEDIS CAPLAN</text:p>
          </table:table-cell>
          <table:table-cell table:style-name="ce1" office:value-type="string" calcext:value-type="string">
            <text:p>SEDE MOSQUERA; Camkit; CAPLAN; NELSON ROMERO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mkit-1|Análogo</text:p>
          </table:table-cell>
          <table:table-cell table:style-name="ce1" office:value-type="string" calcext:value-type="string">
            <text:p>Camkit1 Analogo</text:p>
          </table:table-cell>
          <table:table-cell table:style-name="ce1" office:value-type="string" calcext:value-type="string">
            <text:p>BOG1939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35829" calcext:value-type="float">
            <text:p>4735829</text:p>
          </table:table-cell>
          <table:table-cell table:style-name="ce1" office:value-type="float" office:value="-741642094" calcext:value-type="float">
            <text:p>-74164209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35" calcext:value-type="date">
            <text:p>14/07/26 15:09</text:p>
          </table:table-cell>
          <table:table-cell/>
        </table:table-row>
        <table:table-row table:style-name="ro4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CHIA - CAJICA</text:p>
          </table:table-cell>
          <table:table-cell table:style-name="ce1" office:value-type="string" calcext:value-type="string">
            <text:p>SEDE MOSQUERA; HOMECENTER CHIA - CAJICA; NELSON ROMERO; HOMECENTER CHIA - CAJICA; HOMECENTER CHIA - CAJIC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206</text:p>
          </table:table-cell>
          <table:table-cell table:style-name="ce1" office:value-type="float" office:value="8.93407610014978E+018" calcext:value-type="float">
            <text:p>8,93407610014978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92442731174390" calcext:value-type="float">
            <text:p>4892442731174390</text:p>
          </table:table-cell>
          <table:table-cell table:style-name="ce1" office:value-type="float" office:value="-7403251677372900" calcext:value-type="float">
            <text:p>-7403251677372900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7-07T11:19:59" calcext:value-type="date">
            <text:p>07/07/26 11:19</text:p>
          </table:table-cell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6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CUCUTA GEN01</text:p>
          </table:table-cell>
          <table:table-cell table:style-name="ce1" office:value-type="string" calcext:value-type="string">
            <text:p>SEDE MOSQUERA; hocampom; HOMECENTER CUCUTA; NELSON ROMERO; HOMECENTER CUCUTA GEN01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ModbusGenset PCC 1301/1.x/0500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MOVISTAR M2M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886264" calcext:value-type="float">
            <text:p>7886264</text:p>
          </table:table-cell>
          <table:table-cell table:style-name="ce1" office:value-type="float" office:value="-72492949" calcext:value-type="float">
            <text:p>-7249294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38" calcext:value-type="date">
            <text:p>14/07/26 15:09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CUCUTA GEN02</text:p>
          </table:table-cell>
          <table:table-cell table:style-name="ce1" office:value-type="string" calcext:value-type="string">
            <text:p>SEDE MOSQUERA; HOMECENTER CUCUTA; NELSON ROMERO; HOMECENTER CUCUTA GEN02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OVISTAR M2M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886264" calcext:value-type="float">
            <text:p>7886264</text:p>
          </table:table-cell>
          <table:table-cell table:style-name="ce1" office:value-type="float" office:value="-72492949" calcext:value-type="float">
            <text:p>-7249294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ENVIGADO</text:p>
          </table:table-cell>
          <table:table-cell table:style-name="ce1" office:value-type="string" calcext:value-type="string">
            <text:p>SEDE MEDELLIN; ENVIGADO; hocampom; RODOLFO VELEZ; HOMECENTER ENVIGAD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475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75628" calcext:value-type="float">
            <text:p>6175628</text:p>
          </table:table-cell>
          <table:table-cell table:style-name="ce1" office:value-type="float" office:value="-7559392" calcext:value-type="float">
            <text:p>-755939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5" calcext:value-type="date">
            <text:p>14/07/26 15:10</text:p>
          </table:table-cell>
          <table:table-cell/>
        </table:table-row>
        <table:table-row table:style-name="ro1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GIRARDOT</text:p>
          </table:table-cell>
          <table:table-cell table:style-name="ce1" office:value-type="string" calcext:value-type="string">
            <text:p>SEDE IBAGUE; JUAN RICARDO HINCAPIE; GIRARDOT; jpinedap; Sodimac-Girardot-venecia-Mosquera-Dorado; HOMECENTER GIRARDOT; HOMECENTER GIRARDOT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IBG0190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309" calcext:value-type="float">
            <text:p>4309</text:p>
          </table:table-cell>
          <table:table-cell table:style-name="ce1" office:value-type="float" office:value="-74794" calcext:value-type="float">
            <text:p>-7479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09" calcext:value-type="date">
            <text:p>14/07/26 15:10</text:p>
          </table:table-cell>
          <table:table-cell/>
        </table:table-row>
        <table:table-row table:style-name="ro4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IBAGUE GEN01</text:p>
          </table:table-cell>
          <table:table-cell table:style-name="ce1" office:value-type="string" calcext:value-type="string">
            <text:p>SEDE IBAGUE; JUAN RICARDO HINCAPIE; IBAGUE GEN01; jmalagonlo; HOMECENTER IBAGUÉ; HOMECENTER IBAGUE GEN01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IBG0191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439024" calcext:value-type="float">
            <text:p>4439024</text:p>
          </table:table-cell>
          <table:table-cell table:style-name="ce1" office:value-type="float" office:value="-75186035" calcext:value-type="float">
            <text:p>-7518603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8" calcext:value-type="date">
            <text:p>14/07/26 15:10</text:p>
          </table:table-cell>
          <table:table-cell/>
        </table:table-row>
        <table:table-row table:style-name="ro4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IBAGUE GEN02</text:p>
          </table:table-cell>
          <table:table-cell table:style-name="ce1" office:value-type="string" calcext:value-type="string">
            <text:p>SEDE IBAGUE; JUAN RICARDO HINCAPIE; IBAGUE GEN02; jmalagonlo; HOMECENTER IBAGUÉ; HOMECENTER IBAGUE GEN02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IBG0192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439024" calcext:value-type="float">
            <text:p>4439024</text:p>
          </table:table-cell>
          <table:table-cell table:style-name="ce1" office:value-type="float" office:value="-75186035" calcext:value-type="float">
            <text:p>-7518603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INDUSTRIALES GEN01</text:p>
          </table:table-cell>
          <table:table-cell table:style-name="ce1" office:value-type="string" calcext:value-type="string">
            <text:p>SEDE MEDELLIN; INDUSTRIALES; hocampom; RODOLFO VELEZ; HOMECENTER INDUSTRIALES GEN01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473</text:p>
          </table:table-cell>
          <table:table-cell table:style-name="ce1" office:value-type="float" office:value="8.93407720000166E+018" calcext:value-type="float">
            <text:p>8,93407720000166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1649" calcext:value-type="float">
            <text:p>621649</text:p>
          </table:table-cell>
          <table:table-cell table:style-name="ce1" office:value-type="float" office:value="-75576657" calcext:value-type="float">
            <text:p>-7557665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04-15T00:23:58" calcext:value-type="date">
            <text:p>15/04/24 00:23</text:p>
          </table:table-cell>
          <table:table-cell/>
        </table:table-row>
        <table:table-row table:style-name="ro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INDUSTRIALES GEN02</text:p>
          </table:table-cell>
          <table:table-cell table:style-name="ce1" office:value-type="string" calcext:value-type="string">
            <text:p>SEDE MEDELLIN; INDUSTRIALES; hocampom; RODOLFO VELEZ; HOMECENTER INDUSTRIALES GEN02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4095817E+016" calcext:value-type="float">
            <text:p>5,71017024095817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1649" calcext:value-type="float">
            <text:p>621649</text:p>
          </table:table-cell>
          <table:table-cell table:style-name="ce1" office:value-type="float" office:value="-75576657" calcext:value-type="float">
            <text:p>-7557665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1" calcext:value-type="date">
            <text:p>24/06/26 09:13</text:p>
          </table:table-cell>
          <table:table-cell/>
        </table:table-row>
        <table:table-row table:style-name="ro4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MALL PLAZA (test)</text:p>
          </table:table-cell>
          <table:table-cell table:style-name="ce1" office:value-type="string" calcext:value-type="string">
            <text:p>SEDE MOSQUERA; CALIMA; jpinedap; HOMECENTER MALL PLAZA (test); HOMECENTER MALL PLAZA (test); JEISON FELIPE/DUVAN ROCHA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DeepSea|Trifasico|24VDC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BOG1214</text:p>
          </table:table-cell>
          <table:table-cell table:style-name="ce1" office:value-type="float" office:value="8.93407650000414E+018" calcext:value-type="float">
            <text:p>8,93407650000414E+018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18925" calcext:value-type="float">
            <text:p>4618925</text:p>
          </table:table-cell>
          <table:table-cell table:style-name="ce1" office:value-type="float" office:value="-74086523" calcext:value-type="float">
            <text:p>-7408652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5-11-18T19:15:08" calcext:value-type="date">
            <text:p>18/11/25 19:15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MANIZALES GEN01</text:p>
          </table:table-cell>
          <table:table-cell table:style-name="ce1" office:value-type="string" calcext:value-type="string">
            <text:p>SEDE PEREIRA; MANIZALES; HOMECENTER MANIZALES GEN01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DeepSea|Trifasico|24VDC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4084095E+016" calcext:value-type="float">
            <text:p>5,71017024084095E+016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053735" calcext:value-type="float">
            <text:p>5053735</text:p>
          </table:table-cell>
          <table:table-cell table:style-name="ce1" office:value-type="float" office:value="-75482623" calcext:value-type="float">
            <text:p>-7548262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15" calcext:value-type="date">
            <text:p>14/07/26 15:09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MOLINOS GEN01</text:p>
          </table:table-cell>
          <table:table-cell table:style-name="ce1" office:value-type="string" calcext:value-type="string">
            <text:p>SEDE MEDELLIN; MOLINOS; hocampom; RODOLFO VELEZ; HOMECENTER MOLINOS GEN01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MED469</text:p>
          </table:table-cell>
          <table:table-cell/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3384" calcext:value-type="float">
            <text:p>623384</text:p>
          </table:table-cell>
          <table:table-cell table:style-name="ce1" office:value-type="float" office:value="-75604606" calcext:value-type="float">
            <text:p>-7560460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1-12-27T03:12:52" calcext:value-type="date">
            <text:p>27/12/21 03:12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MOLINOS GEN02</text:p>
          </table:table-cell>
          <table:table-cell table:style-name="ce1" office:value-type="string" calcext:value-type="string">
            <text:p>SEDE MEDELLIN; MOLINOS; hocampom; RODOLFO VELEZ; HOMECENTER MOLINOS GEN02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MED470</text:p>
          </table:table-cell>
          <table:table-cell/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3384" calcext:value-type="float">
            <text:p>623384</text:p>
          </table:table-cell>
          <table:table-cell table:style-name="ce1" office:value-type="float" office:value="-75604606" calcext:value-type="float">
            <text:p>-7560460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1-10-24T05:41:14" calcext:value-type="date">
            <text:p>24/10/21 05:41</text:p>
          </table:table-cell>
          <table:table-cell/>
        </table:table-row>
        <table:table-row table:style-name="ro5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MONTERIA</text:p>
          </table:table-cell>
          <table:table-cell table:style-name="ce1" office:value-type="string" calcext:value-type="string">
            <text:p>SEDE MEDELLIN; MONTERIA; dforerom; RODOLFO VELEZ; HOMECENTER MONTERIA; PLANTAS HOMECENTER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479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777934" calcext:value-type="float">
            <text:p>8777934</text:p>
          </table:table-cell>
          <table:table-cell table:style-name="ce1" office:value-type="float" office:value="-75862308" calcext:value-type="float">
            <text:p>-7586230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1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MOSQUERA</text:p>
          </table:table-cell>
          <table:table-cell table:style-name="ce1" office:value-type="string" calcext:value-type="string">
            <text:p>SEDE MOSQUERA; MOSQUERA; jpinedap; Sodimac-Girardot-venecia-Mosquera-Dorado; HOMECENTER MOSQUERA; HOMECENTER MOSQUERA; JEISON FELIPE/DUVAN ROCH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215</text:p>
          </table:table-cell>
          <table:table-cell table:style-name="ce1" office:value-type="float" office:value="8.93407510026199E+018" calcext:value-type="float">
            <text:p>8,93407510026199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18925" calcext:value-type="float">
            <text:p>4618925</text:p>
          </table:table-cell>
          <table:table-cell table:style-name="ce1" office:value-type="float" office:value="-74086523" calcext:value-type="float">
            <text:p>-7408652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6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NEIVA GEN01</text:p>
          </table:table-cell>
          <table:table-cell table:style-name="ce1" office:value-type="string" calcext:value-type="string">
            <text:p>SEDE IBAGUE; JUAN RICARDO HINCAPIE; NEIVA; jmalagonlo; HOMECENTER NEIVA GEN01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IBG0194</text:p>
          </table:table-cell>
          <table:table-cell/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952302" calcext:value-type="float">
            <text:p>2952302</text:p>
          </table:table-cell>
          <table:table-cell table:style-name="ce1" office:value-type="float" office:value="-75287014" calcext:value-type="float">
            <text:p>-7528701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13" calcext:value-type="date">
            <text:p>14/07/26 15:09</text:p>
          </table:table-cell>
          <table:table-cell/>
        </table:table-row>
        <table:table-row table:style-name="ro10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NORTE GEN01</text:p>
          </table:table-cell>
          <table:table-cell table:style-name="ce1" office:value-type="string" calcext:value-type="string">
            <text:p>SEDE MOSQUERA; NORTE; HOMECENTER NORTE; NELSON ROMERO; HOMECENTER NORTE GEN01; HOMECENTER NORTE GEN01-HOMECENTER NORTE GEN02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BOG1211</text:p>
          </table:table-cell>
          <table:table-cell/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55834" calcext:value-type="float">
            <text:p>4755834</text:p>
          </table:table-cell>
          <table:table-cell table:style-name="ce1" office:value-type="float" office:value="-74046869" calcext:value-type="float">
            <text:p>-7404686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0" calcext:value-type="date">
            <text:p>14/07/26 15:10</text:p>
          </table:table-cell>
          <table:table-cell/>
        </table:table-row>
        <table:table-row table:style-name="ro8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NORTE GEN02</text:p>
          </table:table-cell>
          <table:table-cell table:style-name="ce1" office:value-type="string" calcext:value-type="string">
            <text:p>SEDE MOSQUERA; HOMECENTER NORTE; NELSON ROMERO; HOMECENTER NORTE GEN02; HOMECENTER NORTE GEN01-HOMECENTER NORTE GEN02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BOG1212</text:p>
          </table:table-cell>
          <table:table-cell/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55834" calcext:value-type="float">
            <text:p>4755834</text:p>
          </table:table-cell>
          <table:table-cell table:style-name="ce1" office:value-type="float" office:value="-74046869" calcext:value-type="float">
            <text:p>-7404686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08T19:17:59" calcext:value-type="date">
            <text:p>08/07/26 19:17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PALMIRA</text:p>
          </table:table-cell>
          <table:table-cell table:style-name="ce1" office:value-type="string" calcext:value-type="string">
            <text:p>SEDE CALI; FERNANDO MUÑOZ; PALMIRA; jmalagonlo; HOMECENTER PALMIR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AL0040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538" calcext:value-type="float">
            <text:p>3538</text:p>
          </table:table-cell>
          <table:table-cell table:style-name="ce1" office:value-type="string" calcext:value-type="string">
            <text:p>-76.3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PEREIRA GEN01</text:p>
          </table:table-cell>
          <table:table-cell table:style-name="ce1" office:value-type="string" calcext:value-type="string">
            <text:p>SEDE PEREIRA; DANIEL OCAMPO; PEREIRA; jmalagonlo; HOMECENTER PEREIRA GEN01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IBG0195</text:p>
          </table:table-cell>
          <table:table-cell table:style-name="ce1" office:value-type="float" office:value="8.93407510025853E+018" calcext:value-type="float">
            <text:p>8,93407510025853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05925" calcext:value-type="float">
            <text:p>4805925</text:p>
          </table:table-cell>
          <table:table-cell table:style-name="ce1" office:value-type="float" office:value="-75716167" calcext:value-type="float">
            <text:p>-7571616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14" calcext:value-type="date">
            <text:p>24/06/26 09:02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PEREIRA GEN02</text:p>
          </table:table-cell>
          <table:table-cell table:style-name="ce1" office:value-type="string" calcext:value-type="string">
            <text:p>SEDE PEREIRA; DANIEL OCAMPO; PEREIRA; jmalagonlo; HOMECENTER PEREIRA GEN02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IBG0196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05925" calcext:value-type="float">
            <text:p>4805925</text:p>
          </table:table-cell>
          <table:table-cell table:style-name="ce1" office:value-type="float" office:value="-75716167" calcext:value-type="float">
            <text:p>-7571616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1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RIONEGRO</text:p>
          </table:table-cell>
          <table:table-cell table:style-name="ce1" office:value-type="string" calcext:value-type="string">
            <text:p>SEDE MEDELLIN; RIONEGRO; hocampom; HOMECENTER RIONEG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478</text:p>
          </table:table-cell>
          <table:table-cell table:style-name="ce1" office:value-type="float" office:value="5.71017024033077E+016" calcext:value-type="float">
            <text:p>5,71017024033077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47019" calcext:value-type="float">
            <text:p>6147019</text:p>
          </table:table-cell>
          <table:table-cell table:style-name="ce1" office:value-type="float" office:value="-75378528" calcext:value-type="float">
            <text:p>-7537852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04T10:51:00" calcext:value-type="date">
            <text:p>04/07/26 10:51</text:p>
          </table:table-cell>
          <table:table-cell/>
        </table:table-row>
        <table:table-row table:style-name="ro4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SAN FERNANDO CARTAGENA</text:p>
          </table:table-cell>
          <table:table-cell table:style-name="ce1" office:value-type="string" calcext:value-type="string">
            <text:p>SEDE BARRANQUILLA; SAN FERNANDO; CARTAGENA; dforerom; HOMECENTER SAN FERNANDO CARTAGENA; PLANTAS HOMECENTER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47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384" calcext:value-type="float">
            <text:p>10384</text:p>
          </table:table-cell>
          <table:table-cell table:style-name="ce1" office:value-type="float" office:value="-75469" calcext:value-type="float">
            <text:p>-7546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1-06-12T14:38:25" calcext:value-type="date">
            <text:p>12/06/21 14:38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SAN JUAN GEN01</text:p>
          </table:table-cell>
          <table:table-cell table:style-name="ce1" office:value-type="string" calcext:value-type="string">
            <text:p>SEDE MEDELLIN; SANJUAN; hocampom; RODOLFO VELEZ; HOMECENTER SAN JUAN GEN01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471</text:p>
          </table:table-cell>
          <table:table-cell table:style-name="ce1" office:value-type="float" office:value="8.93407510025854E+018" calcext:value-type="float">
            <text:p>8,9340751002585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49403" calcext:value-type="float">
            <text:p>6249403</text:p>
          </table:table-cell>
          <table:table-cell table:style-name="ce1" office:value-type="float" office:value="-75584138" calcext:value-type="float">
            <text:p>-7558413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2:18:40" calcext:value-type="date">
            <text:p>14/07/26 12:18</text:p>
          </table:table-cell>
          <table:table-cell/>
        </table:table-row>
        <table:table-row table:style-name="ro6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SAN JUAN GEN02 545kW</text:p>
          </table:table-cell>
          <table:table-cell table:style-name="ce1" office:value-type="string" calcext:value-type="string">
            <text:p>SEDE MEDELLIN; SANJUAN; hocampom; RODOLFO VELEZ; HOMECENTER SAN JUAN GEN02 545kW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MED472</text:p>
          </table:table-cell>
          <table:table-cell table:style-name="ce1" office:value-type="float" office:value="8.93407720000166E+018" calcext:value-type="float">
            <text:p>8,93407720000166E+018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49403" calcext:value-type="float">
            <text:p>6249403</text:p>
          </table:table-cell>
          <table:table-cell table:style-name="ce1" office:value-type="float" office:value="-75584138" calcext:value-type="float">
            <text:p>-7558413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04-17T08:10:59" calcext:value-type="date">
            <text:p>17/04/24 08:10</text:p>
          </table:table-cell>
          <table:table-cell/>
        </table:table-row>
        <table:table-row table:style-name="ro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SANTA MARTA</text:p>
          </table:table-cell>
          <table:table-cell table:style-name="ce1" office:value-type="string" calcext:value-type="string">
            <text:p>SEDE BARRANQUILLA; STAMARTA; dforerom; HOMECENTER SANTA MARTA; PLANTAS HOMECENTER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49</text:p>
          </table:table-cell>
          <table:table-cell table:style-name="ce1" office:value-type="float" office:value="8.93407610014978E+018" calcext:value-type="float">
            <text:p>8,93407610014978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240615" calcext:value-type="float">
            <text:p>11240615</text:p>
          </table:table-cell>
          <table:table-cell table:style-name="ce1" office:value-type="float" office:value="-74181259" calcext:value-type="float">
            <text:p>-7418125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8-24T11:06:23" calcext:value-type="date">
            <text:p>24/08/23 11:06</text:p>
          </table:table-cell>
          <table:table-cell/>
        </table:table-row>
        <table:table-row table:style-name="ro5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SIBERIA TENJO GEN01</text:p>
          </table:table-cell>
          <table:table-cell table:style-name="ce1" office:value-type="string" calcext:value-type="string">
            <text:p>SEDE MOSQUERA; SIBERIATENJO; calle; jvaquiro; HOMECENTER SIBERIA TENJO GEN01; JEISON FELIPE/DUVAN ROCHA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BOG1228</text:p>
          </table:table-cell>
          <table:table-cell/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65289" calcext:value-type="float">
            <text:p>4765289</text:p>
          </table:table-cell>
          <table:table-cell table:style-name="ce1" office:value-type="float" office:value="-74155395" calcext:value-type="float">
            <text:p>-7415539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5:41" calcext:value-type="date">
            <text:p>14/07/26 15:05</text:p>
          </table:table-cell>
          <table:table-cell/>
        </table:table-row>
        <table:table-row table:style-name="ro5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SOACHA GEN01</text:p>
          </table:table-cell>
          <table:table-cell table:style-name="ce1" office:value-type="string" calcext:value-type="string">
            <text:p>SEDE MOSQUERA; SOACHA; jpinedap; NELSON ROMERO; HOMECENTER SOACHA GEN01; HOMECENTER SOACHA GEN01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BOG1218</text:p>
          </table:table-cell>
          <table:table-cell/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589278" calcext:value-type="float">
            <text:p>4589278</text:p>
          </table:table-cell>
          <table:table-cell table:style-name="ce1" office:value-type="float" office:value="-74205077" calcext:value-type="float">
            <text:p>-7420507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30" calcext:value-type="date">
            <text:p>14/07/26 15:09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SOACHA GEN02</text:p>
          </table:table-cell>
          <table:table-cell table:style-name="ce1" office:value-type="string" calcext:value-type="string">
            <text:p>SEDE MOSQUERA; SOACHA; jpinedap; NELSON ROMERO; HOMECENTER SOACHA GEN02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BOG1219</text:p>
          </table:table-cell>
          <table:table-cell/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589278" calcext:value-type="float">
            <text:p>4589278</text:p>
          </table:table-cell>
          <table:table-cell table:style-name="ce1" office:value-type="float" office:value="-74205077" calcext:value-type="float">
            <text:p>-7420507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30" calcext:value-type="date">
            <text:p>14/07/26 15:09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SUBA GEN01</text:p>
          </table:table-cell>
          <table:table-cell table:style-name="ce1" office:value-type="string" calcext:value-type="string">
            <text:p>SEDE MOSQUERA; HOMECENTER SUBA; NELSON ROMERO; HOMECENTER SUBA GEN01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BOG1220</text:p>
          </table:table-cell>
          <table:table-cell table:style-name="ce1" office:value-type="float" office:value="8.93407720000166E+018" calcext:value-type="float">
            <text:p>8,93407720000166E+018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51488" calcext:value-type="float">
            <text:p>4751488</text:p>
          </table:table-cell>
          <table:table-cell table:style-name="ce1" office:value-type="float" office:value="-74094876" calcext:value-type="float">
            <text:p>-7409487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19" calcext:value-type="date">
            <text:p>14/07/26 15:09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SUBA GEN02</text:p>
          </table:table-cell>
          <table:table-cell table:style-name="ce1" office:value-type="string" calcext:value-type="string">
            <text:p>SEDE MOSQUERA; HOMECENTER SUBA; NELSON ROMERO; HOMECENTER SUBA GEN02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BOG1221</text:p>
          </table:table-cell>
          <table:table-cell/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51488" calcext:value-type="float">
            <text:p>4751488</text:p>
          </table:table-cell>
          <table:table-cell table:style-name="ce1" office:value-type="float" office:value="-74094876" calcext:value-type="float">
            <text:p>-7409487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19" calcext:value-type="date">
            <text:p>14/07/26 15:09</text:p>
          </table:table-cell>
          <table:table-cell/>
        </table:table-row>
        <table:table-row table:style-name="ro14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SUR VENECIA GEN01</text:p>
          </table:table-cell>
          <table:table-cell table:style-name="ce1" office:value-type="string" calcext:value-type="string">
            <text:p>SEDE MOSQUERA; SUR; VENECIA; NELSON ROMERO; HOMECENTER SUR VENECIA GEN01; Sodimac-Girardot-venecia-Mosquera-Dorado; HOMECENTER SUR VENECIA GEN01</text:p>
          </table:table-cell>
          <table:table-cell table:style-name="ce1" office:value-type="string" calcext:value-type="string">
            <text:p>Exemys</text:p>
          </table:table-cell>
          <table:table-cell table:style-name="ce1" office:value-type="string" calcext:value-type="string">
            <text:p>Exemys Digital</text:p>
          </table:table-cell>
          <table:table-cell table:style-name="ce1" office:value-type="string" calcext:value-type="string">
            <text:p>Digital</text:p>
          </table:table-cell>
          <table:table-cell table:style-name="ce1" office:value-type="string" calcext:value-type="string">
            <text:p>BOG1224</text:p>
          </table:table-cell>
          <table:table-cell/>
          <table:table-cell table:style-name="ce1" office:value-type="string" calcext:value-type="string">
            <text:p>Exemys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03768" calcext:value-type="float">
            <text:p>4603768</text:p>
          </table:table-cell>
          <table:table-cell table:style-name="ce1" office:value-type="float" office:value="-7413314" calcext:value-type="float">
            <text:p>-741331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00" calcext:value-type="date">
            <text:p>14/07/26 15:09</text:p>
          </table:table-cell>
          <table:table-cell/>
        </table:table-row>
        <table:table-row table:style-name="ro3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TINTAL</text:p>
          </table:table-cell>
          <table:table-cell table:style-name="ce1" office:value-type="string" calcext:value-type="string">
            <text:p>SEDE MOSQUERA; jpinedap; HOMECENTER TINTAL; NELSON ROMERO; HOMECENTER TINTAL; HOMECENTER TINTAL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222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51258" calcext:value-type="float">
            <text:p>4651258</text:p>
          </table:table-cell>
          <table:table-cell table:style-name="ce1" office:value-type="float" office:value="-74146124" calcext:value-type="float">
            <text:p>-7414612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TULUA</text:p>
          </table:table-cell>
          <table:table-cell table:style-name="ce1" office:value-type="string" calcext:value-type="string">
            <text:p>SEDE CALI; FERNANDO MUÑOZ; HOMECENTER; TULUA; HOMECENTER TULUÁ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AL0012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071671" calcext:value-type="float">
            <text:p>4071671</text:p>
          </table:table-cell>
          <table:table-cell table:style-name="ce1" office:value-type="float" office:value="-76190564" calcext:value-type="float">
            <text:p>-7619056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07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TUNJA</text:p>
          </table:table-cell>
          <table:table-cell table:style-name="ce1" office:value-type="string" calcext:value-type="string">
            <text:p>SEDE MOSQUERA; Camkit; HOMECENTER TUNJA; NELSON ROMERO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mkit-1|Análogo</text:p>
          </table:table-cell>
          <table:table-cell table:style-name="ce1" office:value-type="string" calcext:value-type="string">
            <text:p>Camkit1 Analogo</text:p>
          </table:table-cell>
          <table:table-cell table:style-name="ce1" office:value-type="string" calcext:value-type="string">
            <text:p>BOG1251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5572894" calcext:value-type="float">
            <text:p>55572894</text:p>
          </table:table-cell>
          <table:table-cell table:style-name="ce1" office:value-type="float" office:value="-733472566" calcext:value-type="float">
            <text:p>-73347256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5-20T19:05:42" calcext:value-type="date">
            <text:p>20/05/26 19:05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VALLEDUPAR</text:p>
          </table:table-cell>
          <table:table-cell table:style-name="ce1" office:value-type="string" calcext:value-type="string">
            <text:p>SEDE BARRANQUILLA; VALLEDUPAR; dforerom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50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74393" calcext:value-type="float">
            <text:p>10474393</text:p>
          </table:table-cell>
          <table:table-cell table:style-name="ce1" office:value-type="float" office:value="-73243682" calcext:value-type="float">
            <text:p>-7324368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9" calcext:value-type="date">
            <text:p>14/07/26 15:10</text:p>
          </table:table-cell>
          <table:table-cell/>
        </table:table-row>
        <table:table-row table:style-name="ro1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VILLAVICENCIO GEN01</text:p>
          </table:table-cell>
          <table:table-cell table:style-name="ce1" office:value-type="string" calcext:value-type="string">
            <text:p>SEDE MOSQUERA; VILLAVICENCIO GEN01; VILLAVICENCIO; jpinedap; HOMECENTER VILLAVICENCIO GEN01-HOMECENTER VILLAVICENCIO GEN02; JEISON FELIPE/DUVAN ROCHA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ModbusGenset PCC 1301/1.x/0500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VVC1225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121694" calcext:value-type="float">
            <text:p>4121694</text:p>
          </table:table-cell>
          <table:table-cell table:style-name="ce1" office:value-type="float" office:value="-736411" calcext:value-type="float">
            <text:p>-73641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2-03-31T16:58:56" calcext:value-type="date">
            <text:p>31/03/22 16:58</text:p>
          </table:table-cell>
          <table:table-cell/>
        </table:table-row>
        <table:table-row table:style-name="ro1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VILLAVICENCIO GEN02</text:p>
          </table:table-cell>
          <table:table-cell table:style-name="ce1" office:value-type="string" calcext:value-type="string">
            <text:p>SEDE MOSQUERA; VILLAVICENCIO GEN02; VILLAVICENCIO; jpinedap; HOMECENTER VILLAVICENCIO GEN01-HOMECENTER VILLAVICENCIO GEN02; JEISON FELIPE/DUVAN ROCHA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ModbusGenset PCC 1301/1.x/0500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VVC1226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121694" calcext:value-type="float">
            <text:p>4121694</text:p>
          </table:table-cell>
          <table:table-cell table:style-name="ce1" office:value-type="float" office:value="-736411" calcext:value-type="float">
            <text:p>-73641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2-01T09:50:39" calcext:value-type="date">
            <text:p>01/02/23 09:50</text:p>
          </table:table-cell>
          <table:table-cell/>
        </table:table-row>
        <table:table-row table:style-name="ro7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ODIMAC COLOMBIA S A</text:p>
          </table:table-cell>
          <table:table-cell table:style-name="ce1" office:value-type="string" calcext:value-type="string">
            <text:p>HOMECENTER YOPAL</text:p>
          </table:table-cell>
          <table:table-cell table:style-name="ce1" office:value-type="string" calcext:value-type="string">
            <text:p>SEDE MOSQUERA; YOPAL; jpinedap; HOMECENTER YOPAL; JEISON FELIPE/DUVAN ROCH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VVC1227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343394" calcext:value-type="float">
            <text:p>5343394</text:p>
          </table:table-cell>
          <table:table-cell table:style-name="ce1" office:value-type="float" office:value="-72381527" calcext:value-type="float">
            <text:p>-72381527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SQUARE APARTAMENTOS ACEIS</text:p>
          </table:table-cell>
          <table:table-cell table:style-name="ce1" office:value-type="string" calcext:value-type="string">
            <text:p>SEDE MEDELLIN; MEDELLIN; SQUARE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599 / Claro</text:p>
          </table:table-cell>
          <table:table-cell table:style-name="ce1" office:value-type="float" office:value="5.71015019120989E+016" calcext:value-type="float">
            <text:p>5,71015019120989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94534" calcext:value-type="float">
            <text:p>6194534</text:p>
          </table:table-cell>
          <table:table-cell table:style-name="ce1" office:value-type="float" office:value="-75575955" calcext:value-type="float">
            <text:p>-7557595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QUARE OFICINAS ACEIS</text:p>
          </table:table-cell>
          <table:table-cell table:style-name="ce1" office:value-type="string" calcext:value-type="string">
            <text:p>SQUARE OFICINAS MTS</text:p>
          </table:table-cell>
          <table:table-cell table:style-name="ce1" office:value-type="string" calcext:value-type="string">
            <text:p>SEDE MEDELLIN; RODOLFO VELEZ; SQUARE;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598</text:p>
          </table:table-cell>
          <table:table-cell table:style-name="ce1" office:value-type="float" office:value="5.71015019120989E+016" calcext:value-type="float">
            <text:p>5,71015019120989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94534" calcext:value-type="float">
            <text:p>6194534</text:p>
          </table:table-cell>
          <table:table-cell table:style-name="ce1" office:value-type="float" office:value="-75575955" calcext:value-type="float">
            <text:p>-7557595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5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TEPAN COLOMBIA SAS</text:p>
          </table:table-cell>
          <table:table-cell table:style-name="ce1" office:value-type="string" calcext:value-type="string">
            <text:p>STEPAN LA MANUELA</text:p>
          </table:table-cell>
          <table:table-cell table:style-name="ce1" office:value-type="string" calcext:value-type="string">
            <text:p>SEDE PEREIRA; DANIEL OCAMPO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PCC2.X-3.X|Trifasico|24VDC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PEI0628</text:p>
          </table:table-cell>
          <table:table-cell table:style-name="ce1" office:value-type="float" office:value="8.93407550000496E+018" calcext:value-type="float">
            <text:p>8,93407550000496E+018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9991944" calcext:value-type="float">
            <text:p>49991944</text:p>
          </table:table-cell>
          <table:table-cell table:style-name="ce1" office:value-type="float" office:value="-755960858" calcext:value-type="float">
            <text:p>-75596085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06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UMICOL</text:p>
          </table:table-cell>
          <table:table-cell table:style-name="ce1" office:value-type="string" calcext:value-type="string">
            <text:p>SUMICOL 250KW</text:p>
          </table:table-cell>
          <table:table-cell table:style-name="ce1" office:value-type="string" calcext:value-type="string">
            <text:p>SEDE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481</text:p>
          </table:table-cell>
          <table:table-cell table:style-name="ce1" office:value-type="float" office:value="8.93407510025853E+018" calcext:value-type="float">
            <text:p>8,93407510025853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535813" calcext:value-type="float">
            <text:p>61535813</text:p>
          </table:table-cell>
          <table:table-cell table:style-name="ce1" office:value-type="float" office:value="-756218334" calcext:value-type="float">
            <text:p>-75621833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03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URTIGAS</text:p>
          </table:table-cell>
          <table:table-cell table:style-name="ce1" office:value-type="string" calcext:value-type="string">
            <text:p>SURTIGAS MONTERIA</text:p>
          </table:table-cell>
          <table:table-cell table:style-name="ce1" office:value-type="string" calcext:value-type="string">
            <text:p>SEDE MEDELLIN; SURTIGA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635</text:p>
          </table:table-cell>
          <table:table-cell table:style-name="ce1" office:value-type="float" office:value="5.71015019120967E+016" calcext:value-type="float">
            <text:p>5,71015019120967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765403" calcext:value-type="float">
            <text:p>8765403</text:p>
          </table:table-cell>
          <table:table-cell table:style-name="ce1" office:value-type="float" office:value="-75871344" calcext:value-type="float">
            <text:p>-7587134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7-31T08:53:03" calcext:value-type="date">
            <text:p>31/07/23 08:5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SURTIGAS</text:p>
          </table:table-cell>
          <table:table-cell table:style-name="ce1" office:value-type="string" calcext:value-type="string">
            <text:p>SURTIGAS SINCELEJO</text:p>
          </table:table-cell>
          <table:table-cell table:style-name="ce1" office:value-type="string" calcext:value-type="string">
            <text:p>SEDE MEDELLIN; SURTIGA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636</text:p>
          </table:table-cell>
          <table:table-cell table:style-name="ce1" office:value-type="float" office:value="8.93407510025853E+018" calcext:value-type="float">
            <text:p>8,93407510025853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304651" calcext:value-type="float">
            <text:p>9304651</text:p>
          </table:table-cell>
          <table:table-cell table:style-name="ce1" office:value-type="float" office:value="-75389942" calcext:value-type="float">
            <text:p>-7538994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04T05:14:27" calcext:value-type="date">
            <text:p>04/07/26 05:14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TECNOGLASS CUMANDES</text:p>
          </table:table-cell>
          <table:table-cell table:style-name="ce1" office:value-type="string" calcext:value-type="string">
            <text:p>TECNOGLASS GEN 20 kW</text:p>
          </table:table-cell>
          <table:table-cell table:style-name="ce1" office:value-type="string" calcext:value-type="string">
            <text:p>SEDE BARRANQUILLA; TECNOGLAS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548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36282" calcext:value-type="float">
            <text:p>11036282</text:p>
          </table:table-cell>
          <table:table-cell table:style-name="ce1" office:value-type="float" office:value="-74827651" calcext:value-type="float">
            <text:p>-7482765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TECNOGLASS CUMANDES</text:p>
          </table:table-cell>
          <table:table-cell table:style-name="ce1" office:value-type="string" calcext:value-type="string">
            <text:p>TECNOGLASS GEN 60 kW</text:p>
          </table:table-cell>
          <table:table-cell table:style-name="ce1" office:value-type="string" calcext:value-type="string">
            <text:p>SEDE BARRANQUILLA; TECNOGLAS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547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36282" calcext:value-type="float">
            <text:p>11036282</text:p>
          </table:table-cell>
          <table:table-cell table:style-name="ce1" office:value-type="float" office:value="-74827651" calcext:value-type="float">
            <text:p>-7482765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2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TELEPERFORMANCE</text:p>
          </table:table-cell>
          <table:table-cell table:style-name="ce1" office:value-type="string" calcext:value-type="string">
            <text:p>PUERTA DEL SOL</text:p>
          </table:table-cell>
          <table:table-cell table:style-name="ce1" office:value-type="string" calcext:value-type="string">
            <text:p>SEDE MOSQUER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OVISTAR M2M</text:p>
          </table:table-cell>
          <table:table-cell table:style-name="ce1" office:value-type="float" office:value="8.93407610014978E+018" calcext:value-type="float">
            <text:p>8,93407610014978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861583" calcext:value-type="float">
            <text:p>46861583</text:p>
          </table:table-cell>
          <table:table-cell table:style-name="ce1" office:value-type="float" office:value="-741242419" calcext:value-type="float">
            <text:p>-741242419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2-02T14:49:39" calcext:value-type="date">
            <text:p>02/02/26 14:49</text:p>
          </table:table-cell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TELEPERFORMANCE</text:p>
          </table:table-cell>
          <table:table-cell table:style-name="ce1" office:value-type="string" calcext:value-type="string">
            <text:p>TELEPERFORMANCE HSB-S01-SGE-GE01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Camkit-2|AMF-25TCP/IP</text:p>
          </table:table-cell>
          <table:table-cell table:style-name="ce1" office:value-type="string" calcext:value-type="string">
            <text:p>CamKit2</text:p>
          </table:table-cell>
          <table:table-cell table:number-columns-repeated="2"/>
          <table:table-cell table:style-name="ce1" office:value-type="string" calcext:value-type="string">
            <text:p>Cam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598878" calcext:value-type="float">
            <text:p>47598878</text:p>
          </table:table-cell>
          <table:table-cell table:style-name="ce1" office:value-type="float" office:value="-740447929" calcext:value-type="float">
            <text:p>-74044792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8:53" calcext:value-type="date">
            <text:p>14/07/26 15:08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TERMINAL DE TRANSPORTE DE BARRANQUILLA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02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922" calcext:value-type="float">
            <text:p>10922</text:p>
          </table:table-cell>
          <table:table-cell table:style-name="ce1" office:value-type="float" office:value="-74781" calcext:value-type="float">
            <text:p>-7478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05-01T09:24:51" calcext:value-type="date">
            <text:p>01/05/24 09:24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TERRACINA PLAZA PH ACEIS</text:p>
          </table:table-cell>
          <table:table-cell table:style-name="ce1" office:value-type="string" calcext:value-type="string">
            <text:p>SEDE MEDELLIN; TERRACINA PLAZA PH ACEI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4084095E+016" calcext:value-type="float">
            <text:p>5,71017024084095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6.1676</text:p>
          </table:table-cell>
          <table:table-cell table:style-name="ce1" office:value-type="float" office:value="-7556958" calcext:value-type="float">
            <text:p>-755695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TERRANUM DESARROLLO S.A.S.</text:p>
          </table:table-cell>
          <table:table-cell table:style-name="ce1" office:value-type="string" calcext:value-type="string">
            <text:p>EDIFICIO EMPRESARIAL CORTEZZA LAS PALMAS ZONAS COMUNES</text:p>
          </table:table-cell>
          <table:table-cell table:style-name="ce1" office:value-type="string" calcext:value-type="string">
            <text:p>SEDE MEDELLIN; CORTEZZ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665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26641" calcext:value-type="float">
            <text:p>6226641</text:p>
          </table:table-cell>
          <table:table-cell table:style-name="ce1" office:value-type="float" office:value="-75559295" calcext:value-type="float">
            <text:p>-7555929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TERRANUM DESARROLLO S.A.S.</text:p>
          </table:table-cell>
          <table:table-cell table:style-name="ce1" office:value-type="string" calcext:value-type="string">
            <text:p>EDIFICIO EMPRESARIAL CORTEZZA LAS PALMAS ZONAS PRIVADAS</text:p>
          </table:table-cell>
          <table:table-cell table:style-name="ce1" office:value-type="string" calcext:value-type="string">
            <text:p>SEDE MEDELLIN; CORTEZZ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664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26641" calcext:value-type="float">
            <text:p>6226641</text:p>
          </table:table-cell>
          <table:table-cell table:style-name="ce1" office:value-type="float" office:value="-75559295" calcext:value-type="float">
            <text:p>-7555929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2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TORRE AMADEUS</text:p>
          </table:table-cell>
          <table:table-cell table:style-name="ce1" office:value-type="string" calcext:value-type="string">
            <text:p>TORRE AMADEUS GEN01</text:p>
          </table:table-cell>
          <table:table-cell table:style-name="ce1" office:value-type="string" calcext:value-type="string">
            <text:p>SEDE MOSQUERA; TORREAMADEU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number-columns-repeated="2"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66748" calcext:value-type="float">
            <text:p>4666748</text:p>
          </table:table-cell>
          <table:table-cell table:style-name="ce1" office:value-type="float" office:value="-74051411" calcext:value-type="float">
            <text:p>-7405141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TORRE AMADEUS</text:p>
          </table:table-cell>
          <table:table-cell table:style-name="ce1" office:value-type="string" calcext:value-type="string">
            <text:p>TORRE AMADEUS GEN02</text:p>
          </table:table-cell>
          <table:table-cell table:style-name="ce1" office:value-type="string" calcext:value-type="string">
            <text:p>SEDE MOSQUERA; RAFAEL TRIANA; TORREAMADEU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number-columns-repeated="2"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66648" calcext:value-type="float">
            <text:p>4666648</text:p>
          </table:table-cell>
          <table:table-cell table:style-name="ce1" office:value-type="float" office:value="-74051511" calcext:value-type="float">
            <text:p>-7405151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TORRE AMADEUS</text:p>
          </table:table-cell>
          <table:table-cell table:style-name="ce1" office:value-type="string" calcext:value-type="string">
            <text:p>TORRE AMADEUS GEN03</text:p>
          </table:table-cell>
          <table:table-cell table:style-name="ce1" office:value-type="string" calcext:value-type="string">
            <text:p>SEDE MOSQUERA; RAFAEL TRIANA; TORREAMADEUS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number-columns-repeated="2"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66548" calcext:value-type="float">
            <text:p>4666548</text:p>
          </table:table-cell>
          <table:table-cell table:style-name="ce1" office:value-type="float" office:value="-74051611" calcext:value-type="float">
            <text:p>-7405161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5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TORRE EMPRESARIAL DAVIVIENDA</text:p>
          </table:table-cell>
          <table:table-cell table:style-name="ce1" office:value-type="string" calcext:value-type="string">
            <text:p>EDIFICIO TORRE EMPRESARIAL DAVIVIENDA ACEIS</text:p>
          </table:table-cell>
          <table:table-cell table:style-name="ce1" office:value-type="string" calcext:value-type="string">
            <text:p>SEDE MEDELLIN; DAVIVIEND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4033077E+016" calcext:value-type="float">
            <text:p>5,71017024033077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1653" calcext:value-type="float">
            <text:p>6201653</text:p>
          </table:table-cell>
          <table:table-cell table:style-name="ce1" office:value-type="float" office:value="-75572155" calcext:value-type="float">
            <text:p>-75572155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4:56:50" calcext:value-type="date">
            <text:p>14/07/26 14:56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IC BARCELONA DE INDIAS</text:p>
          </table:table-cell>
          <table:table-cell table:style-name="ce1" office:value-type="string" calcext:value-type="string">
            <text:p>BARCELONA DE INDIAS SARRIA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417</text:p>
          </table:table-cell>
          <table:table-cell table:style-name="ce1" office:value-type="float" office:value="8.93407610014978E+018" calcext:value-type="float">
            <text:p>8,93407610014978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669941913844" calcext:value-type="float">
            <text:p>104669941913844</text:p>
          </table:table-cell>
          <table:table-cell table:style-name="ce1" office:value-type="float" office:value="-75500302612781" calcext:value-type="float">
            <text:p>-7550030261278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12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UIC BARCELONA DE INDIAS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105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516679" calcext:value-type="float">
            <text:p>10516679</text:p>
          </table:table-cell>
          <table:table-cell table:style-name="ce1" office:value-type="float" office:value="-75476479" calcext:value-type="float">
            <text:p>-7547647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14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DEL NORTE</text:p>
          </table:table-cell>
          <table:table-cell table:style-name="ce1" office:value-type="string" calcext:value-type="string">
            <text:p>UNINORTE BIBLIOTECA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21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18211" calcext:value-type="float">
            <text:p>11018211</text:p>
          </table:table-cell>
          <table:table-cell table:style-name="ce1" office:value-type="float" office:value="-74851941" calcext:value-type="float">
            <text:p>-7485194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14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DEL NORTE</text:p>
          </table:table-cell>
          <table:table-cell table:style-name="ce1" office:value-type="string" calcext:value-type="string">
            <text:p>UNINORTE BLOQUE J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763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185641" calcext:value-type="float">
            <text:p>110185641</text:p>
          </table:table-cell>
          <table:table-cell table:style-name="ce1" office:value-type="float" office:value="-748497898" calcext:value-type="float">
            <text:p>-74849789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08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DEL NORTE</text:p>
          </table:table-cell>
          <table:table-cell table:style-name="ce1" office:value-type="string" calcext:value-type="string">
            <text:p>UNINORTE CAFE DUNORT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22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18632" calcext:value-type="float">
            <text:p>11018632</text:p>
          </table:table-cell>
          <table:table-cell table:style-name="ce1" office:value-type="float" office:value="-7485119" calcext:value-type="float">
            <text:p>-748511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4-05-01T09:24:51" calcext:value-type="date">
            <text:p>01/05/24 09:24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DEL NORTE</text:p>
          </table:table-cell>
          <table:table-cell table:style-name="ce1" office:value-type="string" calcext:value-type="string">
            <text:p>UNINORTE CAMPO DEPORTIVO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29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21" calcext:value-type="float">
            <text:p>11021</text:p>
          </table:table-cell>
          <table:table-cell table:style-name="ce1" office:value-type="float" office:value="-740890000000001" calcext:value-type="float">
            <text:p>-74089000000000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8T10:11:56" calcext:value-type="date">
            <text:p>28/06/26 10:11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DEL NORTE</text:p>
          </table:table-cell>
          <table:table-cell table:style-name="ce1" office:value-type="string" calcext:value-type="string">
            <text:p>UNINORTE EDIFICIO ADMINISTRATIVO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23</text:p>
          </table:table-cell>
          <table:table-cell table:style-name="ce1" office:value-type="float" office:value="5.71011015114494E+016" calcext:value-type="float">
            <text:p>5,71011015114494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19466" calcext:value-type="float">
            <text:p>11019466</text:p>
          </table:table-cell>
          <table:table-cell table:style-name="ce1" office:value-type="float" office:value="-74850211" calcext:value-type="float">
            <text:p>-7485021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14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DEL NORTE</text:p>
          </table:table-cell>
          <table:table-cell table:style-name="ce1" office:value-type="string" calcext:value-type="string">
            <text:p>UNINORTE EDIFICIO MULTIPROPOSITO GEN01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26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18759" calcext:value-type="float">
            <text:p>11018759</text:p>
          </table:table-cell>
          <table:table-cell table:style-name="ce1" office:value-type="float" office:value="-74850031" calcext:value-type="float">
            <text:p>-7485003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14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DEL NORTE</text:p>
          </table:table-cell>
          <table:table-cell table:style-name="ce1" office:value-type="string" calcext:value-type="string">
            <text:p>UNINORTE EDIFICIO MULTIPROPOSITO GEN02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27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18759" calcext:value-type="float">
            <text:p>11018759</text:p>
          </table:table-cell>
          <table:table-cell table:style-name="ce1" office:value-type="float" office:value="-74850031" calcext:value-type="float">
            <text:p>-7485003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13:08" calcext:value-type="date">
            <text:p>24/06/26 09:1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DEL NORTE</text:p>
          </table:table-cell>
          <table:table-cell table:style-name="ce1" office:value-type="string" calcext:value-type="string">
            <text:p>UNINORTE EMISORA RADIO ENLACE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24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21834" calcext:value-type="float">
            <text:p>11021834</text:p>
          </table:table-cell>
          <table:table-cell table:style-name="ce1" office:value-type="float" office:value="-74849989" calcext:value-type="float">
            <text:p>-74849989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DEL NORTE</text:p>
          </table:table-cell>
          <table:table-cell table:style-name="ce1" office:value-type="string" calcext:value-type="string">
            <text:p>UNINORTE FOOD TRUCK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25</text:p>
          </table:table-cell>
          <table:table-cell table:style-name="ce1" office:value-type="float" office:value="5.71011014028872E+016" calcext:value-type="float">
            <text:p>5,71011014028872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19466" calcext:value-type="float">
            <text:p>11019466</text:p>
          </table:table-cell>
          <table:table-cell table:style-name="ce1" office:value-type="float" office:value="-74850211" calcext:value-type="float">
            <text:p>-7485021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0-12-08T15:00:15" calcext:value-type="date">
            <text:p>08/12/20 15:0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DEL NORTE</text:p>
          </table:table-cell>
          <table:table-cell table:style-name="ce1" office:value-type="string" calcext:value-type="string">
            <text:p>UNINORTE PLANTA MOVIL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28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21771" calcext:value-type="float">
            <text:p>11021771</text:p>
          </table:table-cell>
          <table:table-cell table:style-name="ce1" office:value-type="float" office:value="-74850804" calcext:value-type="float">
            <text:p>-7485080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1-02-27T12:43:22" calcext:value-type="date">
            <text:p>27/02/21 12:43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DEL NORTE</text:p>
          </table:table-cell>
          <table:table-cell table:style-name="ce1" office:value-type="string" calcext:value-type="string">
            <text:p>UNINORTE SANTAMARTA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30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243892" calcext:value-type="float">
            <text:p>11243892</text:p>
          </table:table-cell>
          <table:table-cell table:style-name="ce1" office:value-type="float" office:value="-74210814" calcext:value-type="float">
            <text:p>-7421081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6-24T09:02:14" calcext:value-type="date">
            <text:p>24/06/26 09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DEL VALLE</text:p>
          </table:table-cell>
          <table:table-cell table:style-name="ce1" office:value-type="string" calcext:value-type="string">
            <text:p>CUMMINS-AC125 EDIFICIO B23</text:p>
          </table:table-cell>
          <table:table-cell table:style-name="ce1" office:value-type="string" calcext:value-type="string">
            <text:p>SEDE CALI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AMF-5|Trifasico</text:p>
          </table:table-cell>
          <table:table-cell table:style-name="ce1" office:value-type="string" calcext:value-type="string">
            <text:p>AMF5</text:p>
          </table:table-cell>
          <table:table-cell/>
          <table:table-cell table:style-name="ce1" office:value-type="float" office:value="5.71017024084094E+016" calcext:value-type="float">
            <text:p>5,71017024084094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3730399" calcext:value-type="float">
            <text:p>33730399</text:p>
          </table:table-cell>
          <table:table-cell table:style-name="ce1" office:value-type="float" office:value="-765438255" calcext:value-type="float">
            <text:p>-765438255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2-17T08:32:29" calcext:value-type="date">
            <text:p>17/02/26 08:32</text:p>
          </table:table-cell>
          <table:table-cell table:style-name="ce4" office:value-type="date" office:date-value="2026-07-14T15:09:56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DEL VALLE</text:p>
          </table:table-cell>
          <table:table-cell table:style-name="ce1" office:value-type="string" calcext:value-type="string">
            <text:p>UNIVALLE CATERPILLAR CASETA 2</text:p>
          </table:table-cell>
          <table:table-cell table:style-name="ce1" office:value-type="string" calcext:value-type="string">
            <text:p>SEDE CALI; FERNANDO MUÑOZ; OITEL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mkit-1|CarterpillarEMCP-4.2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L0598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3758083" calcext:value-type="float">
            <text:p>33758083</text:p>
          </table:table-cell>
          <table:table-cell table:style-name="ce1" office:value-type="float" office:value="-765355613" calcext:value-type="float">
            <text:p>-76535561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8:50" calcext:value-type="date">
            <text:p>14/07/26 15:08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DEL VALLE</text:p>
          </table:table-cell>
          <table:table-cell table:style-name="ce1" office:value-type="string" calcext:value-type="string">
            <text:p>UNIVALLE CUMMINS 120-MICROBIOLOGIA</text:p>
          </table:table-cell>
          <table:table-cell table:style-name="ce1" office:value-type="string" calcext:value-type="string">
            <text:p>SEDE CALI; FERNANDO MUÑOZ; MICROBIOLOGI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AL0606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431974" calcext:value-type="float">
            <text:p>3431974</text:p>
          </table:table-cell>
          <table:table-cell table:style-name="ce1" office:value-type="float" office:value="-7654752" calcext:value-type="float">
            <text:p>-7654752</text:p>
          </table:table-cell>
          <table:table-cell table:style-name="ce4" office:value-type="date" office:date-value="1899-12-31" calcext:value-type="date">
            <text:p>31/12/99 00:00</text:p>
          </table:table-cell>
          <table:table-cell/>
          <table:table-cell table:style-name="ce4" office:value-type="date" office:date-value="2026-07-02T10:38:37" calcext:value-type="date">
            <text:p>02/07/26 10:38</text:p>
          </table:table-cell>
          <table:table-cell table:style-name="ce4" office:value-type="date" office:date-value="2026-07-14T15:10:15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DEL VALLE</text:p>
          </table:table-cell>
          <table:table-cell table:style-name="ce1" office:value-type="string" calcext:value-type="string">
            <text:p>UNIVALLE CUMMINS E10-FAI</text:p>
          </table:table-cell>
          <table:table-cell table:style-name="ce1" office:value-type="string" calcext:value-type="string">
            <text:p>SEDE CALI; FERNANDO MUÑOZ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AMF-25|Trifasico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AL0600</text:p>
          </table:table-cell>
          <table:table-cell table:style-name="ce1" office:value-type="float" office:value="8.93407610015345E+018" calcext:value-type="float">
            <text:p>8,9340761001534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3758083" calcext:value-type="float">
            <text:p>33758083</text:p>
          </table:table-cell>
          <table:table-cell table:style-name="ce1" office:value-type="float" office:value="-765663316" calcext:value-type="float">
            <text:p>-76566331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2-05-31T12:59:47" calcext:value-type="date">
            <text:p>31/05/22 12:5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DEL VALLE</text:p>
          </table:table-cell>
          <table:table-cell table:style-name="ce1" office:value-type="string" calcext:value-type="string">
            <text:p>UNIVALLE CUMMINS E20 NORTE</text:p>
          </table:table-cell>
          <table:table-cell table:style-name="ce1" office:value-type="string" calcext:value-type="string">
            <text:p>SEDE CALI; FERNANDO MUÑOZ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mkit-1|Análogo</text:p>
          </table:table-cell>
          <table:table-cell table:style-name="ce1" office:value-type="string" calcext:value-type="string">
            <text:p>Camkit1 Analogo</text:p>
          </table:table-cell>
          <table:table-cell table:style-name="ce1" office:value-type="string" calcext:value-type="string">
            <text:p>CAL0602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3758083" calcext:value-type="float">
            <text:p>33758083</text:p>
          </table:table-cell>
          <table:table-cell table:style-name="ce1" office:value-type="float" office:value="-765355613" calcext:value-type="float">
            <text:p>-76535561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2-15T08:02:41" calcext:value-type="date">
            <text:p>15/02/26 08:02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DEL VALLE</text:p>
          </table:table-cell>
          <table:table-cell table:style-name="ce1" office:value-type="string" calcext:value-type="string">
            <text:p>UNIVALLE CUMMINS E20 SUR</text:p>
          </table:table-cell>
          <table:table-cell table:style-name="ce1" office:value-type="string" calcext:value-type="string">
            <text:p>SEDE CALI; FERNANDO MUÑOZ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ModbusGenset PCC 1301/1.x/0500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L0601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3758083" calcext:value-type="float">
            <text:p>33758083</text:p>
          </table:table-cell>
          <table:table-cell table:style-name="ce1" office:value-type="float" office:value="-765355613" calcext:value-type="float">
            <text:p>-76535561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08T09:14:48" calcext:value-type="date">
            <text:p>08/07/26 09:14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DEL VALLE</text:p>
          </table:table-cell>
          <table:table-cell table:style-name="ce1" office:value-type="string" calcext:value-type="string">
            <text:p>UNIVALLE DEUTZ A7 SERVICIO MEDICO</text:p>
          </table:table-cell>
          <table:table-cell table:style-name="ce1" office:value-type="string" calcext:value-type="string">
            <text:p>SEDE CALI; FERNANDO MUÑOZ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mkit-1|Deepsea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L0604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3758083" calcext:value-type="float">
            <text:p>33758083</text:p>
          </table:table-cell>
          <table:table-cell table:style-name="ce1" office:value-type="float" office:value="-765355613" calcext:value-type="float">
            <text:p>-76535561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28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DEL VALLE</text:p>
          </table:table-cell>
          <table:table-cell table:style-name="ce1" office:value-type="string" calcext:value-type="string">
            <text:p>UNIVALLE DOOSAN B13</text:p>
          </table:table-cell>
          <table:table-cell table:style-name="ce1" office:value-type="string" calcext:value-type="string">
            <text:p>SEDE CALI; FERNANDO MUÑOZ; DOOSAN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mkit-1|Deepsea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L0603</text:p>
          </table:table-cell>
          <table:table-cell/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.37570237554335E+016" calcext:value-type="float">
            <text:p>3,37570237554335E+016</text:p>
          </table:table-cell>
          <table:table-cell table:style-name="ce1" office:value-type="float" office:value="-7652993093468430" calcext:value-type="float">
            <text:p>-7652993093468430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35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DEL VALLE</text:p>
          </table:table-cell>
          <table:table-cell table:style-name="ce1" office:value-type="string" calcext:value-type="string">
            <text:p>UNIVALLE HINO 116-SAN FERNANDO</text:p>
          </table:table-cell>
          <table:table-cell table:style-name="ce1" office:value-type="string" calcext:value-type="string">
            <text:p>SEDE CALI; FERNANDO MUÑOZ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mkit-1|Análogo</text:p>
          </table:table-cell>
          <table:table-cell table:style-name="ce1" office:value-type="string" calcext:value-type="string">
            <text:p>Camkit1 Analogo</text:p>
          </table:table-cell>
          <table:table-cell table:style-name="ce1" office:value-type="string" calcext:value-type="string">
            <text:p>CAL0605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431974" calcext:value-type="float">
            <text:p>3431974</text:p>
          </table:table-cell>
          <table:table-cell table:style-name="ce1" office:value-type="float" office:value="-7654752" calcext:value-type="float">
            <text:p>-7654752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4-16T14:19:16" calcext:value-type="date">
            <text:p>16/04/26 14:1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DEL VALLE</text:p>
          </table:table-cell>
          <table:table-cell table:style-name="ce1" office:value-type="string" calcext:value-type="string">
            <text:p>UNIVALLE MM FIRE - RCI (test)</text:p>
          </table:table-cell>
          <table:table-cell table:style-name="ce1" office:value-type="string" calcext:value-type="string">
            <text:p>SEDE CALI; FERNANDO MUÑOZ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mkit-1|Análogo</text:p>
          </table:table-cell>
          <table:table-cell table:style-name="ce1" office:value-type="string" calcext:value-type="string">
            <text:p>Camkit1 Analogo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5.71017024095818E+016" calcext:value-type="float">
            <text:p>5,71017024095818E+016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3758083" calcext:value-type="float">
            <text:p>33758083</text:p>
          </table:table-cell>
          <table:table-cell table:style-name="ce1" office:value-type="float" office:value="-765355613" calcext:value-type="float">
            <text:p>-76535561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0:26:22" calcext:value-type="date">
            <text:p>14/07/26 10:26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DEL VALLE</text:p>
          </table:table-cell>
          <table:table-cell table:style-name="ce1" office:value-type="string" calcext:value-type="string">
            <text:p>UNIVALLE PERKINS 35KVA</text:p>
          </table:table-cell>
          <table:table-cell table:style-name="ce1" office:value-type="string" calcext:value-type="string">
            <text:p>SEDE CALI; FERNANDO MUÑOZ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Camkit-1|Análogo</text:p>
          </table:table-cell>
          <table:table-cell table:style-name="ce1" office:value-type="string" calcext:value-type="string">
            <text:p>Camkit1 Analogo</text:p>
          </table:table-cell>
          <table:table-cell table:style-name="ce1" office:value-type="string" calcext:value-type="string">
            <text:p>CAL0599</text:p>
          </table:table-cell>
          <table:table-cell table:style-name="ce1" office:value-type="float" office:value="8.93407540000731E+018" calcext:value-type="float">
            <text:p>8,93407540000731E+018</text:p>
          </table:table-cell>
          <table:table-cell table:style-name="ce1" office:value-type="string" calcext:value-type="string">
            <text:p>CamKit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3758083" calcext:value-type="float">
            <text:p>33758083</text:p>
          </table:table-cell>
          <table:table-cell table:style-name="ce1" office:value-type="float" office:value="-765355613" calcext:value-type="float">
            <text:p>-76535561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8:43" calcext:value-type="date">
            <text:p>14/07/26 15:08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DEL VALLE</text:p>
          </table:table-cell>
          <table:table-cell table:style-name="ce1" office:value-type="string" calcext:value-type="string">
            <text:p>UNIVALLE PERKINS 50KVA OITEL</text:p>
          </table:table-cell>
          <table:table-cell table:style-name="ce1" office:value-type="string" calcext:value-type="string">
            <text:p>SEDE CALI; FERNANDO MUÑOZ; OITEL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CAL0597</text:p>
          </table:table-cell>
          <table:table-cell table:style-name="ce1" office:value-type="float" office:value="8.93407510025853E+018" calcext:value-type="float">
            <text:p>8,93407510025853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3758083" calcext:value-type="float">
            <text:p>33758083</text:p>
          </table:table-cell>
          <table:table-cell table:style-name="ce1" office:value-type="float" office:value="-765355613" calcext:value-type="float">
            <text:p>-76535561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8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EAFIT</text:p>
          </table:table-cell>
          <table:table-cell table:style-name="ce1" office:value-type="string" calcext:value-type="string">
            <text:p>UNIVERSIDAD EAFIT BLOQUE 13</text:p>
          </table:table-cell>
          <table:table-cell table:style-name="ce1" office:value-type="string" calcext:value-type="string">
            <text:p>SEDE MEDELLIN; BLOQ13; EAFIT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512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0716" calcext:value-type="float">
            <text:p>6200716</text:p>
          </table:table-cell>
          <table:table-cell table:style-name="ce1" office:value-type="float" office:value="-75578343" calcext:value-type="float">
            <text:p>-7557834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EAFIT</text:p>
          </table:table-cell>
          <table:table-cell table:style-name="ce1" office:value-type="string" calcext:value-type="string">
            <text:p>UNIVERSIDAD EAFIT BLOQUE 18 TERRAZA</text:p>
          </table:table-cell>
          <table:table-cell table:style-name="ce1" office:value-type="string" calcext:value-type="string">
            <text:p>SEDE MEDELLIN; BLOQ 18 TERRAZA; EAFIT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515</text:p>
          </table:table-cell>
          <table:table-cell table:style-name="ce1" office:value-type="float" office:value="5.71017024095817E+016" calcext:value-type="float">
            <text:p>5,71017024095817E+016</text:p>
          </table:table-cell>
          <table:table-cell table:style-name="ce1" office:value-type="string" calcext:value-type="string">
            <text:p>Comap; Prolub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0716" calcext:value-type="float">
            <text:p>6200716</text:p>
          </table:table-cell>
          <table:table-cell table:style-name="ce1" office:value-type="float" office:value="-75578343" calcext:value-type="float">
            <text:p>-7557834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EAFIT</text:p>
          </table:table-cell>
          <table:table-cell table:style-name="ce1" office:value-type="string" calcext:value-type="string">
            <text:p>UNIVERSIDAD EAFIT BLOQUE 19 SOTANO</text:p>
          </table:table-cell>
          <table:table-cell table:style-name="ce1" office:value-type="string" calcext:value-type="string">
            <text:p>SEDE MEDELLIN; BLOQ19SOT; EAFIT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513</text:p>
          </table:table-cell>
          <table:table-cell table:style-name="ce1" office:value-type="float" office:value="8.93407610014965E+018" calcext:value-type="float">
            <text:p>8,93407610014965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0716" calcext:value-type="float">
            <text:p>6200716</text:p>
          </table:table-cell>
          <table:table-cell table:style-name="ce1" office:value-type="float" office:value="-75578343" calcext:value-type="float">
            <text:p>-7557834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EAFIT</text:p>
          </table:table-cell>
          <table:table-cell table:style-name="ce1" office:value-type="string" calcext:value-type="string">
            <text:p>UNIVERSIDAD EAFIT BLOQUE 3</text:p>
          </table:table-cell>
          <table:table-cell table:style-name="ce1" office:value-type="string" calcext:value-type="string">
            <text:p>SEDE MEDELLIN; BLOQ3; EAFIT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514</text:p>
          </table:table-cell>
          <table:table-cell table:style-name="ce1" office:value-type="float" office:value="8.93407610014978E+018" calcext:value-type="float">
            <text:p>8,93407610014978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0716" calcext:value-type="float">
            <text:p>6200716</text:p>
          </table:table-cell>
          <table:table-cell table:style-name="ce1" office:value-type="float" office:value="-75578343" calcext:value-type="float">
            <text:p>-7557834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EAFIT</text:p>
          </table:table-cell>
          <table:table-cell table:style-name="ce1" office:value-type="string" calcext:value-type="string">
            <text:p>UNIVERSIDAD EAFIT BLOQUE 30</text:p>
          </table:table-cell>
          <table:table-cell table:style-name="ce1" office:value-type="string" calcext:value-type="string">
            <text:p>SEDE MEDELLIN; BLOQ19TERR; EAFIT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510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0716" calcext:value-type="float">
            <text:p>6200716</text:p>
          </table:table-cell>
          <table:table-cell table:style-name="ce1" office:value-type="float" office:value="-75578343" calcext:value-type="float">
            <text:p>-7557834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9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EAFIT</text:p>
          </table:table-cell>
          <table:table-cell table:style-name="ce1" office:value-type="string" calcext:value-type="string">
            <text:p>UNIVERSIDAD EAFIT BLOQUE 32</text:p>
          </table:table-cell>
          <table:table-cell table:style-name="ce1" office:value-type="string" calcext:value-type="string">
            <text:p>SEDE MEDELLIN; BLOQ32; EAFIT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511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0716" calcext:value-type="float">
            <text:p>6200716</text:p>
          </table:table-cell>
          <table:table-cell table:style-name="ce1" office:value-type="float" office:value="-75578343" calcext:value-type="float">
            <text:p>-7557834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EAFIT</text:p>
          </table:table-cell>
          <table:table-cell table:style-name="ce1" office:value-type="string" calcext:value-type="string">
            <text:p>UNIVERSIDAD EAFIT BLOQUE 38</text:p>
          </table:table-cell>
          <table:table-cell table:style-name="ce1" office:value-type="string" calcext:value-type="string">
            <text:p>SEDE MEDELLIN; BLOQ38; EAFIT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516</text:p>
          </table:table-cell>
          <table:table-cell table:style-name="ce1" office:value-type="float" office:value="8.93407610015474E+018" calcext:value-type="float">
            <text:p>8,93407610015474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0716" calcext:value-type="float">
            <text:p>6200716</text:p>
          </table:table-cell>
          <table:table-cell table:style-name="ce1" office:value-type="float" office:value="-75578343" calcext:value-type="float">
            <text:p>-7557834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EAFIT</text:p>
          </table:table-cell>
          <table:table-cell table:style-name="ce1" office:value-type="string" calcext:value-type="string">
            <text:p>UNIVERSIDAD EAFIT BLOQUE IDIOMAS</text:p>
          </table:table-cell>
          <table:table-cell table:style-name="ce1" office:value-type="string" calcext:value-type="string">
            <text:p>SEDE MEDELLIN; BLOQ IDIOMAS; EAFIT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583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01738769139" calcext:value-type="float">
            <text:p>6201738769139</text:p>
          </table:table-cell>
          <table:table-cell table:style-name="ce1" office:value-type="float" office:value="-755759417451918" calcext:value-type="float">
            <text:p>-75575941745191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EAFIT</text:p>
          </table:table-cell>
          <table:table-cell table:style-name="ce1" office:value-type="string" calcext:value-type="string">
            <text:p>UNIVERSIDAD EAFIT LLANO GRANDE</text:p>
          </table:table-cell>
          <table:table-cell table:style-name="ce1" office:value-type="string" calcext:value-type="string">
            <text:p>SEDE MEDELLIN; LLANOGRANDE; EAFIT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517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05634" calcext:value-type="float">
            <text:p>6105634</text:p>
          </table:table-cell>
          <table:table-cell table:style-name="ce1" office:value-type="float" office:value="-75457996" calcext:value-type="float">
            <text:p>-7545799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number-columns-repeated="2" table:style-name="ce1" office:value-type="string" calcext:value-type="string">
            <text:p>UNIVERSIDAD LA GRAN COLOMBIA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271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29755" calcext:value-type="float">
            <text:p>4629755</text:p>
          </table:table-cell>
          <table:table-cell table:style-name="ce1" office:value-type="float" office:value="-74067763" calcext:value-type="float">
            <text:p>-7406776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2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LA GRAN COLOMBIA</text:p>
          </table:table-cell>
          <table:table-cell table:style-name="ce1" office:value-type="string" calcext:value-type="string">
            <text:p>UNIVERSIDAD LA GRAN COLOMBIA G2 ING CIVIL</text:p>
          </table:table-cell>
          <table:table-cell table:style-name="ce1" office:value-type="string" calcext:value-type="string">
            <text:p>SEDE MOSQUERA; RAFAEL TRIAN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568</text:p>
          </table:table-cell>
          <table:table-cell table:style-name="ce1" office:value-type="float" office:value="8.93407510025852E+018" calcext:value-type="float">
            <text:p>8,93407510025852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29755" calcext:value-type="float">
            <text:p>4629755</text:p>
          </table:table-cell>
          <table:table-cell table:style-name="ce1" office:value-type="float" office:value="-74067763" calcext:value-type="float">
            <text:p>-74067763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1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UNIVERSIDAD TECNOLOGICA DE BOLIVAR</text:p>
          </table:table-cell>
          <table:table-cell table:style-name="ce1" office:value-type="string" calcext:value-type="string">
            <text:p>UTB TURBACO PLANTA 200KW EDIFICIO A2</text:p>
          </table:table-cell>
          <table:table-cell table:style-name="ce1" office:value-type="string" calcext:value-type="string">
            <text:p>SEDE BARRANQUILLA; BOLIVAR GEN02; UTB TURBAC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441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413244" calcext:value-type="float">
            <text:p>10413244</text:p>
          </table:table-cell>
          <table:table-cell table:style-name="ce1" office:value-type="float" office:value="-75538416" calcext:value-type="float">
            <text:p>-7553841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11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VENTAS Y SERVICIOS SA</text:p>
          </table:table-cell>
          <table:table-cell table:style-name="ce1" office:value-type="string" calcext:value-type="string">
            <text:p>NEXA MEDELLIN</text:p>
          </table:table-cell>
          <table:table-cell table:style-name="ce1" office:value-type="string" calcext:value-type="string">
            <text:p>SEDE MEDELLIN; NEXA MEDELLIN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MED657</text:p>
          </table:table-cell>
          <table:table-cell/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370646" calcext:value-type="float">
            <text:p>62370646</text:p>
          </table:table-cell>
          <table:table-cell table:style-name="ce1" office:value-type="float" office:value="-755726398" calcext:value-type="float">
            <text:p>-755726398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5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WV HOTELS S.A.S</text:p>
          </table:table-cell>
          <table:table-cell table:style-name="ce1" office:value-type="string" calcext:value-type="string">
            <text:p>HOTEL HILTON SANTA MARTA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515 / Claro</text:p>
          </table:table-cell>
          <table:table-cell table:style-name="ce1" office:value-type="float" office:value="5.71015019120934E+016" calcext:value-type="float">
            <text:p>5,71015019120934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239224" calcext:value-type="float">
            <text:p>11239224</text:p>
          </table:table-cell>
          <table:table-cell table:style-name="ce1" office:value-type="float" office:value="-74216144" calcext:value-type="float">
            <text:p>-74216144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3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YAZAKI CIEMEL SA</text:p>
          </table:table-cell>
          <table:table-cell table:style-name="ce1" office:value-type="string" calcext:value-type="string">
            <text:p>YAZAKY CIEMEL GEN01</text:p>
          </table:table-cell>
          <table:table-cell table:style-name="ce1" office:value-type="string" calcext:value-type="string">
            <text:p>SEDE MOSQUERA; NELSON ROMERO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OG1313</text:p>
          </table:table-cell>
          <table:table-cell table:style-name="ce1" office:value-type="float" office:value="8.93407510026199E+018" calcext:value-type="float">
            <text:p>8,93407510026199E+018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50452" calcext:value-type="float">
            <text:p>4850452</text:p>
          </table:table-cell>
          <table:table-cell table:style-name="ce1" office:value-type="float" office:value="-74026096" calcext:value-type="float">
            <text:p>-7402609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10:10" calcext:value-type="date">
            <text:p>14/07/26 15:10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ZONA FRANCA PERMANENTE LA CAYENA</text:p>
          </table:table-cell>
          <table:table-cell table:style-name="ce1" office:value-type="string" calcext:value-type="string">
            <text:p>ZONA FRANCA LA CAYENA GEN01</text:p>
          </table:table-cell>
          <table:table-cell table:style-name="ce1" office:value-type="string" calcext:value-type="string">
            <text:p>SEDE BARRANQUILLA</text:p>
          </table:table-cell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xemys analog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BQL-0393</text:p>
          </table:table-cell>
          <table:table-cell/>
          <table:table-cell table:style-name="ce1" office:value-type="string" calcext:value-type="string">
            <text:p>ExemysGR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898335" calcext:value-type="float">
            <text:p>10898335</text:p>
          </table:table-cell>
          <table:table-cell table:style-name="ce1" office:value-type="float" office:value="-74893446" calcext:value-type="float">
            <text:p>-74893446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6-07-14T15:09:37" calcext:value-type="date">
            <text:p>14/07/26 15:09</text:p>
          </table:table-cell>
          <table:table-cell/>
        </table:table-row>
        <table:table-row table:style-name="ro2"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CANAL - EQUITEL CUMANDES ESTACIONARIOS | COL - CUMMINS DE LOS ANDES</text:p>
          </table:table-cell>
          <table:table-cell table:style-name="ce1" office:value-type="string" calcext:value-type="string">
            <text:p>ZUREK LEQUERICA (ISLAS ROSARIO)</text:p>
          </table:table-cell>
          <table:table-cell table:style-name="ce1" office:value-type="string" calcext:value-type="string">
            <text:p>ZUREK LEQUERICA ISLAS DEL ROSARIO GEN02 35 KW</text:p>
          </table:table-cell>
          <table:table-cell table:style-name="ce1" office:value-type="string" calcext:value-type="string">
            <text:p>SEDE BARRANQUILLA; GASEOSAS LUX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Comap WS40</text:p>
          </table:table-cell>
          <table:table-cell table:style-name="ce1" office:value-type="string" calcext:value-type="string">
            <text:p>RTMBOX003</text:p>
          </table:table-cell>
          <table:table-cell table:style-name="ce1" office:value-type="string" calcext:value-type="string">
            <text:p>BQL-0235</text:p>
          </table:table-cell>
          <table:table-cell table:style-name="ce1" office:value-type="float" office:value="5.71014618017129E+016" calcext:value-type="float">
            <text:p>5,71014618017129E+016</text:p>
          </table:table-cell>
          <table:table-cell table:style-name="ce1" office:value-type="string" calcext:value-type="string">
            <text:p>Comap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176931" calcext:value-type="float">
            <text:p>10176931</text:p>
          </table:table-cell>
          <table:table-cell table:style-name="ce1" office:value-type="float" office:value="-75742621" calcext:value-type="float">
            <text:p>-75742621</text:p>
          </table:table-cell>
          <table:table-cell table:style-name="ce4" office:value-type="date" office:date-value="1899-12-31" calcext:value-type="date">
            <text:p>31/12/99 00:00</text:p>
          </table:table-cell>
          <table:table-cell table:number-columns-repeated="2"/>
          <table:table-cell table:style-name="ce4" office:value-type="date" office:date-value="2023-01-03T14:58:57" calcext:value-type="date">
            <text:p>03/01/23 14:58</text:p>
          </table:table-cell>
          <table:table-cell/>
        </table:table-row>
        <table:table-row table:style-name="ro15" table:number-rows-repeated="36710">
          <table:table-cell table:number-columns-repeated="19"/>
        </table:table-row>
        <table:table-row table:style-name="ro15">
          <table:table-cell table:number-columns-repeated="19"/>
        </table:table-row>
      </table:table>
      <table:named-expressions/>
      <table:database-ranges>
        <table:database-range table:name="__Anonymous_Sheet_DB__0" table:target-range-address="Hoja1.A1:Hoja1.O57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14T15:26:58.079000000</meta:creation-date>
    <dc:date>2026-07-14T15:40:06.328000000</dc:date>
    <meta:editing-duration>PT13M9S</meta:editing-duration>
    <meta:editing-cycles>1</meta:editing-cycles>
    <meta:document-statistic meta:table-count="1" meta:cell-count="9085" meta:object-count="0"/>
    <meta:generator>LibreOffice/7.5.6.2$Windows_X86_64 LibreOffice_project/f654817fb68d6d4600d7d2f6b647e47729f55f15</meta:generator>
  </office:meta>
</office:document-meta>
</file>